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Table1" style:family="table">
      <style:table-properties style:width="4.7486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0.3701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right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text-properties officeooo:paragraph-rsid="0011a6cd"/>
    </style:style>
    <style:style style:name="P11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2" style:family="paragraph" style:parent-style-name="Standard">
      <style:text-properties officeooo:paragraph-rsid="00176dab"/>
    </style:style>
    <style:style style:name="P13" style:family="paragraph" style:parent-style-name="Standard">
      <style:paragraph-properties fo:margin-left="1.25in" fo:text-indent="0in" style:auto-text-indent="false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6" style:family="paragraph" style:parent-style-name="Standard">
      <style:paragraph-properties fo:margin-left="1.75in" fo:text-indent="0in" style:auto-text-indent="false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text-properties officeooo:paragraph-rsid="001c4e47"/>
    </style:style>
    <style:style style:name="P20" style:family="paragraph" style:parent-style-name="Standard">
      <style:text-properties officeooo:paragraph-rsid="001c2bf2"/>
    </style:style>
    <style:style style:name="P21" style:family="paragraph" style:parent-style-name="Standard">
      <style:paragraph-properties fo:margin-left="0in" fo:text-indent="0in" style:auto-text-indent="false"/>
      <style:text-properties officeooo:paragraph-rsid="002312db"/>
    </style:style>
    <style:style style:name="P22" style:family="paragraph" style:parent-style-name="Standard">
      <style:text-properties officeooo:paragraph-rsid="001081f5"/>
    </style:style>
    <style:style style:name="P23" style:family="paragraph" style:parent-style-name="Standard">
      <style:text-properties officeooo:paragraph-rsid="001105c6"/>
    </style:style>
    <style:style style:name="P24" style:family="paragraph" style:parent-style-name="Standard">
      <style:paragraph-properties fo:margin-left="1.5in" fo:text-indent="0in" style:auto-text-indent="false"/>
    </style:style>
    <style:style style:name="P25" style:family="paragraph" style:parent-style-name="Standard">
      <style:text-properties officeooo:paragraph-rsid="00086dd0"/>
    </style:style>
    <style:style style:name="P26" style:family="paragraph" style:parent-style-name="Standard">
      <style:paragraph-properties fo:margin-left="0.5in" fo:text-indent="0in" style:auto-text-indent="false"/>
    </style:style>
    <style:style style:name="P27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28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29" style:family="paragraph" style:parent-style-name="Standard">
      <style:paragraph-properties fo:margin-left="0.75in" fo:text-indent="0in" style:auto-text-indent="false"/>
    </style:style>
    <style:style style:name="P30" style:family="paragraph" style:parent-style-name="Standard">
      <style:text-properties officeooo:paragraph-rsid="001324cb"/>
    </style:style>
    <style:style style:name="P31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32" style:family="paragraph" style:parent-style-name="Standard">
      <style:paragraph-properties fo:margin-left="1in" fo:text-indent="0in" style:auto-text-indent="false"/>
    </style:style>
    <style:style style:name="P33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4" style:family="paragraph" style:parent-style-name="Standard">
      <style:text-properties officeooo:paragraph-rsid="00195f46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6" style:family="paragraph" style:parent-style-name="Standard">
      <style:paragraph-properties fo:text-align="end" style:justify-single-word="false"/>
      <style:text-properties officeooo:paragraph-rsid="001c19ba"/>
    </style:style>
    <style:style style:name="P37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38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9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40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41" style:family="paragraph" style:parent-style-name="Standard">
      <style:paragraph-properties fo:text-align="start" style:justify-single-word="false"/>
      <style:text-properties officeooo:paragraph-rsid="0007bf68"/>
    </style:style>
    <style:style style:name="P42" style:family="paragraph" style:parent-style-name="Standard">
      <style:text-properties officeooo:paragraph-rsid="001e17ae"/>
    </style:style>
    <style:style style:name="P43" style:family="paragraph" style:parent-style-name="Standard">
      <style:paragraph-properties fo:margin-left="0.25in" fo:text-indent="0in" style:auto-text-indent="false"/>
      <style:text-properties officeooo:paragraph-rsid="0000c400"/>
    </style:style>
    <style:style style:name="P44" style:family="paragraph" style:parent-style-name="Standard">
      <style:paragraph-properties fo:margin-left="1in" fo:text-indent="0in" style:auto-text-indent="false"/>
      <style:text-properties officeooo:paragraph-rsid="001e17ae"/>
    </style:style>
    <style:style style:name="P45" style:family="paragraph" style:parent-style-name="Standard">
      <style:paragraph-properties fo:margin-left="0.25in" fo:text-indent="0in" style:auto-text-indent="false"/>
      <style:text-properties officeooo:paragraph-rsid="001f9474"/>
    </style:style>
    <style:style style:name="P46" style:family="paragraph" style:parent-style-name="Heading_20_2_20_Long_20_Box">
      <style:text-properties fo:background-color="transparent"/>
    </style:style>
    <style:style style:name="P47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48" style:family="paragraph" style:parent-style-name="Standard">
      <style:paragraph-properties fo:margin-left="0.25in" fo:text-indent="0in" style:auto-text-indent="false"/>
      <style:text-properties officeooo:paragraph-rsid="001c1c1f"/>
    </style:style>
    <style:style style:name="P49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50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51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style:text-underline-style="solid" style:text-underline-width="auto" style:text-underline-color="font-color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19ca7c" fo:background-color="transparent" loext:char-shading-value="0"/>
    </style:style>
    <style:style style:name="T8" style:family="text">
      <style:text-properties fo:color="#666666" loext:opacity="100%" style:font-name="Noto Sans" fo:font-size="8.60000038146973pt" fo:background-color="transparent" loext:char-shading-value="0"/>
    </style:style>
    <style:style style:name="T9" style:family="text">
      <style:text-properties officeooo:rsid="001c1c1f"/>
    </style:style>
    <style:style style:name="T10" style:family="text">
      <style:text-properties fo:font-size="8.60000038146973pt"/>
    </style:style>
    <style:style style:name="T11" style:family="text">
      <style:text-properties officeooo:rsid="0016e83a"/>
    </style:style>
    <style:style style:name="T12" style:family="text">
      <style:text-properties officeooo:rsid="00176dab" fo:background-color="transparent" loext:char-shading-value="0"/>
    </style:style>
    <style:style style:name="T13" style:family="text">
      <style:text-properties fo:font-size="8.60000038146973pt" fo:background-color="transparent" loext:char-shading-value="0"/>
    </style:style>
    <style:style style:name="T14" style:family="text">
      <style:text-properties officeooo:rsid="001081f5" fo:background-color="transparent" loext:char-shading-value="0"/>
    </style:style>
    <style:style style:name="T15" style:family="text">
      <style:text-properties officeooo:rsid="0017e1c4"/>
    </style:style>
    <style:style style:name="T16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7" style:family="text">
      <style:text-properties officeooo:rsid="001c2bf2" fo:background-color="transparent" loext:char-shading-value="0"/>
    </style:style>
    <style:style style:name="T18" style:family="text">
      <style:text-properties fo:font-size="8.60000038146973pt" officeooo:rsid="00176dab" fo:background-color="transparent" loext:char-shading-value="0"/>
    </style:style>
    <style:style style:name="T19" style:family="text">
      <style:text-properties fo:font-size="8.60000038146973pt" officeooo:rsid="0000c400"/>
    </style:style>
    <style:style style:name="T20" style:family="text">
      <style:text-properties style:text-position="super 58%" officeooo:rsid="00232009" fo:background-color="transparent" loext:char-shading-value="0"/>
    </style:style>
    <style:style style:name="T21" style:family="text">
      <style:text-properties officeooo:rsid="00232009" fo:background-color="transparent" loext:char-shading-value="0"/>
    </style:style>
    <style:style style:name="T22" style:family="text">
      <style:text-properties style:text-position="super 58%" officeooo:rsid="000e90cb" fo:background-color="transparent" loext:char-shading-value="0"/>
    </style:style>
    <style:style style:name="T23" style:family="text">
      <style:text-properties officeooo:rsid="000e90cb" fo:background-color="transparent" loext:char-shading-value="0"/>
    </style:style>
    <style:style style:name="T24" style:family="text">
      <style:text-properties fo:font-size="7.90000009536743pt" fo:background-color="transparent" loext:char-shading-value="0"/>
    </style:style>
    <style:style style:name="T25" style:family="text">
      <style:text-properties officeooo:rsid="001c4e47"/>
    </style:style>
    <style:style style:name="T26" style:family="text">
      <style:text-properties fo:font-size="8.60000038146973pt" officeooo:rsid="001af3bc" fo:background-color="transparent" loext:char-shading-value="0"/>
    </style:style>
    <style:style style:name="T27" style:family="text">
      <style:text-properties officeooo:rsid="000ef31a"/>
    </style:style>
    <style:style style:name="T28" style:family="text">
      <style:text-properties officeooo:rsid="001081f5"/>
    </style:style>
    <style:style style:name="T29" style:family="text">
      <style:text-properties officeooo:rsid="000ef31a" fo:background-color="transparent" loext:char-shading-value="0"/>
    </style:style>
    <style:style style:name="T30" style:family="text">
      <style:text-properties officeooo:rsid="000ce31b" fo:background-color="transparent" loext:char-shading-value="0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ize="8.60000038146973pt" officeooo:rsid="001c19ba" fo:background-color="transparent" loext:char-shading-value="0"/>
    </style:style>
    <style:style style:name="T33" style:family="text">
      <style:text-properties officeooo:rsid="00195f46" fo:background-color="transparent" loext:char-shading-value="0"/>
    </style:style>
    <style:style style:name="T34" style:family="text">
      <style:text-properties officeooo:rsid="00113855" fo:background-color="transparent" loext:char-shading-value="0"/>
    </style:style>
    <style:style style:name="T35" style:family="text">
      <style:text-properties style:text-position="super 58%" fo:background-color="transparent" loext:char-shading-value="0"/>
    </style:style>
    <style:style style:name="T36" style:family="text">
      <style:text-properties fo:font-size="8.60000038146973pt" officeooo:rsid="00195f46" fo:background-color="transparent" loext:char-shading-value="0"/>
    </style:style>
    <style:style style:name="T37" style:family="text">
      <style:text-properties officeooo:rsid="0008dabd"/>
    </style:style>
    <style:style style:name="T38" style:family="text">
      <style:text-properties style:text-position="super 58%" fo:font-size="8.60000038146973pt" officeooo:rsid="0019ca7c" fo:background-color="transparent" loext:char-shading-value="0"/>
    </style:style>
    <style:style style:name="T39" style:family="text">
      <style:text-properties fo:font-size="8.60000038146973pt" officeooo:rsid="0019ca7c" fo:background-color="transparent" loext:char-shading-value="0"/>
    </style:style>
    <style:style style:name="T40" style:family="text">
      <style:text-properties fo:font-size="8.60000038146973pt" officeooo:rsid="001c1c1f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St Iona, Metr. Moscow + All Russia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III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IV</text:span></text:span>: <text:span text:style-name="T3">Lk 24:1-12 (§112)</text:span></text:p>
              </table:table-cell>
              <table:table-cell table:style-name="Table4.A2" office:value-type="string">
                <text:p text:style-name="P3"><text:span text:style-name="src-spoken"><text:span text:style-name="T1">[ §1d – Polyeleos svc ]</text:span>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var-field"><text:span text:style-name="T5">10+2 total</text:span></text:span></text:p>
        <text:p text:style-name="P6"><text:span text:style-name="var-field">6</text:span> <text:span text:style-name="src-sung"><text:span text:style-name="T1">stichira:</text:span></text:span><text:tab/><text:tab/><text:span text:style-name="src-sung">[Oktoichos,T.</text:span><text:span text:style-name="src-tone-sung"><text:span text:style-name="T6">III</text:span></text:span><text:span text:style-name="src-sung">]</text:span><text:tab/><text:span text:style-name="incipit-sung">“By Thy Cross hast Thou destroyed the might”…</text:span></text:p>
        <text:p text:style-name="P7"><text:span text:style-name="var-field">4</text:span>” <text:tab/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IV</text:span></text:span><text:span text:style-name="src-spoken"><text:span text:style-name="T1">]</text:span></text:span> <text:tab/><text:tab/><text:span text:style-name="var-incipit-spoken">“When the divine calling came upon thee, O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VI</text:span></text:span><text:span text:style-name="src-spoken"><text:span text:style-name="T1">]</text:span></text:span> <text:tab/><text:tab/><text:span text:style-name="var-incipit-spoken">“The divine shrine of thy relics is redolent with”…</text:span></text:p>
        <text:p text:style-name="P8"><text:span text:style-name="cue-doxology-sung">“Now”…</text:span>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How can we not marvel at thy bearing the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P10"><text:span text:style-name="cue-strong"><text:span text:style-name="T8">3 Readings:</text:span></text:span><text:span text:style-name="cue-strong"><text:span text:style-name="T1"> </text:span></text:span><text:tab/><text:tab/><text:span text:style-name="src-spoken"><text:span text:style-name="T1">[Minai.]</text:span></text:span><text:tab/><text:tab/><text:tab/><text:span text:style-name="incipit-spoken"><text:span text:style-name="T1">“A Reading from </text:span></text:span><text:span text:style-name="var-incipit-spoken">Proverbs</text:span><text:span text:style-name="incipit-spoken"><text:span text:style-name="T1">”…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O Christ, Who by Thy suffering didst darke</text:span><text:span text:style-name="incipit-sung"><text:span text:style-name="T9">n</text:span></text:span><text:span text:style-name="incipit-sung">”…</text:span></text:p>
        <text:p text:style-name="P7"><text:span text:style-name="cue-doxology-sung"><text:span text:style-name="T10">“Glory”…</text:span></text:span> 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IV</text:span></text:span><text:span text:style-name="src-spoken"><text:span text:style-name="T1">]</text:span></text:span> <text:tab/><text:tab/><text:span text:style-name="var-incipit-spoken">“When with God’s aid, O holy hierarch, thou didst”…</text:span></text:p>
        <text:p text:style-name="P11"><text:span text:style-name="cue-doxology-sung">“Now”…</text:span> <text:tab/><text:tab/><text:span text:style-name="src-sung">[Oktoich.,T.</text:span><text:span text:style-name="var-src-tone"><text:span text:style-name="T11">IV</text:span></text:span><text:span text:style-name="src-sung">]</text:span> <text:tab/><text:tab/><text:span text:style-name="var-incipit-sung">“Mercifully regard the supplications of thy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2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2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3">“O Theotokos and Virgin, rejoice, O Mary full of”…</text:span></text:span></text:p>
        <text:p text:style-name="P13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III</text:span></text:span><text:span text:style-name="src-sung">]</text:span><text:tab/> <text:span text:style-name="counter-strong"><text:span text:style-name="T13">2x</text:span></text:span><text:tab/><text:span text:style-name="incipit-sung">“Let the heavens be glad; let earthly thing</text:span><text:span text:style-name="incipit-sung"><text:span text:style-name="T9">s</text:span></text:span><text:span text:style-name="incipit-sung">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4">Minai</text:span></text:span><text:span text:style-name="src-sung"><text:span text:style-name="T1">.,T.</text:span></text:span><text:span text:style-name="var-src-tone">IV</text:span><text:span text:style-name="src-sung"><text:span text:style-name="T1">]</text:span></text:span><text:tab/> <text:span text:style-name="counter-strong"><text:span text:style-name="T13">1x</text:span></text:span> <text:tab/><text:span text:style-name="var-incipit-sung">“Having dedicated thyself wholly to the Lord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5">IV</text:span></text:span><text:span text:style-name="src-sung">]</text:span> <text:tab/><text:tab/><text:span text:style-name="var-incipit-sung">“The mystery hidden from before the ages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8">1</text:span></text:span><text:span text:style-name="cue-strong"><text:span text:style-name="T16">st</text:span></text:span><text:span text:style-name="cue-strong"><text:span text:style-name="T8"> chant/Psaltiri</text:span></text:span><text:tab/><text:span text:style-name="src-spoken">[Vigil bk p.61]</text:span> <text:tab/><text:tab/><text:span text:style-name="incipit-spoken">“Save me, O Lord, for a righteous man there </text:span><text:span text:style-name="incipit-spoken"><text:span text:style-name="T9">is</text:span></text:span><text:span text:style-name="incipit-spoken">”…</text:span></text:p>
        <text:p text:style-name="P17">Little Ektenia</text:p>
        <text:p text:style-name="P18"><text:span text:style-name="cue-strong"><text:span text:style-name="T8">Sess. hymns:</text:span></text:span><text:tab/><text:span text:style-name="src-spoken">[Oktoich.,T.</text:span><text:span text:style-name="src-tone-spoken">III</text:span><text:span text:style-name="src-spoken">]</text:span> <text:tab/><text:tab/><text:span text:style-name="incipit-spoken">“Christ hath arisen from the dead, the firs</text:span><text:span text:style-name="incipit-spoken"><text:span text:style-name="T9">tfruits</text:span></text:span><text:span text:style-name="incipit-spoken">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8">2</text:span></text:span><text:span text:style-name="cue-strong"><text:span text:style-name="T16">nd</text:span></text:span><text:span text:style-name="cue-strong"><text:span text:style-name="T8"> chant/Psaltiri</text:span></text:span><text:tab/><text:span text:style-name="src-spoken">[Vigil bk p.73]</text:span> <text:tab/><text:tab/><text:span text:style-name="incipit-spoken">“The heavens declare the glory of God, and </text:span><text:span text:style-name="incipit-spoken"><text:span text:style-name="T9">the</text:span></text:span><text:span text:style-name="incipit-spoken">”…</text:span></text:p>
        <text:p text:style-name="P17">Little Ektenia</text:p>
        <text:p text:style-name="P18"><text:span text:style-name="cue-strong"><text:span text:style-name="T8">Sess. hymns:</text:span></text:span><text:tab/><text:span text:style-name="src-spoken">[Oktoich.,T.</text:span><text:span text:style-name="src-tone-spoken">III</text:span><text:span text:style-name="src-spoken">]</text:span> <text:tab/><text:tab/><text:span text:style-name="incipit-spoken">“Terrified of Thine immutable divinity and”…</text:span></text:p>
        <text:p text:style-name="Standard"/>
        <text:p text:style-name="P19"><text:span text:style-name="cue-strong"><text:span text:style-name="T13">Polyeleos</text:span></text:span><text:tab/><text:tab/><text:span text:style-name="src-sung"><text:span text:style-name="T1">[Orolog.,p.</text:span></text:span><text:span text:style-name="src-sung"><text:span text:style-name="T17">61</text:span></text:span><text:span text:style-name="src-sung"><text:span text:style-name="T1">]</text:span></text:span><text:tab/><text:tab/><text:span text:style-name="incipit-sung"><text:span text:style-name="T1">“Praise ye the Name of the Lord, all ye”…</text:span></text:span></text:p>
        <text:p text:style-name="P20"><text:span text:style-name="cue-strong"><text:span text:style-name="T13">Megalynarion</text:span></text:span><text:tab/><text:span text:style-name="src-sung"><text:span text:style-name="T1">[</text:span></text:span><text:span text:style-name="src-sung"><text:span text:style-name="T6">Minai.</text:span></text:span><text:span text:style-name="src-sung"><text:span text:style-name="T1">]</text:span></text:span><text:tab/><text:tab/><text:tab/><text:span text:style-name="incipit-sung"><text:span text:style-name="T13">“</text:span></text:span><text:span text:style-name="incipit-sung"><text:span text:style-name="T18">We magnify thee, O holy </text:span></text:span><text:span text:style-name="var-incipit-sung"><text:span text:style-name="T19">hierarch father</text:span></text:span><text:span text:style-name="incipit-sung"><text:span text:style-name="T13">”…</text:span></text:span></text:p>
        <text:p text:style-name="P20"><text:span text:style-name="cue-strong"><text:span text:style-name="T13">Evlogitaria</text:span></text:span><text:tab/><text:tab/><text:span text:style-name="src-sung"><text:span text:style-name="T1">[Orolog.,p.</text:span></text:span><text:span text:style-name="src-sung"><text:span text:style-name="T17">61</text:span></text:span><text:span text:style-name="src-sung"><text:span text:style-name="T1">]</text:span></text:span><text:tab/><text:tab/><text:span text:style-name="incipit-sung"><text:span text:style-name="T13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8">Ypakoi</text:span></text:span> <text:tab/><text:tab/><text:span text:style-name="src-spoken">[Oktoich.,T.</text:span><text:span text:style-name="src-tone-spoken">III</text:span><text:span text:style-name="src-spoken">]</text:span> <text:tab/><text:tab/><text:tab/><text:span text:style-name="incipit-spoken">“Amazing the myrrh-bearing women by the”…</text:span></text:p>
        <text:p text:style-name="P21"><text:span text:style-name="T1">Sess. hymns:</text:span><text:tab/><text:span text:style-name="src-spoken"><text:span text:style-name="T1">[</text:span></text:span><text:span text:style-name="src-spoken"><text:span text:style-name="T6">Minai.</text:span></text:span><text:span text:style-name="src-spoken"><text:span text:style-name="T1">]</text:span></text:span><text:tab/><text:span text:style-name="T1">(omit all Theotokia except </text:span><text:span text:style-name="cue-doxology-spoken"><text:span text:style-name="T13">“Now”…</text:span></text:span><text:span text:style-name="T1">*) :</text:span></text:p>
        <text:p text:style-name="P14"><text:tab/><text:tab/><text:tab/><text:span text:style-name="T1">⮡</text:span><text:span text:style-name="src-spoken"><text:span text:style-name="T1">[1</text:span></text:span><text:span text:style-name="src-spoken"><text:span text:style-name="T20">st</text:span></text:span><text:span text:style-name="src-spoken"><text:span text:style-name="T21"> </text:span></text:span><text:span text:style-name="src-spoken"><text:span text:style-name="T1">chant/Psalt.,T.</text:span></text:span><text:span text:style-name="var-src-tone-spoken"><text:span text:style-name="T2">IV</text:span></text:span><text:span text:style-name="src-spoken"><text:span text:style-name="T1">]</text:span></text:span><text:tab/><text:span text:style-name="var-incipit-spoken"><text:span text:style-name="T10">“Thou didst adorn the Church of Christ with thy”…</text:span></text:span></text:p>
        <text:p text:style-name="P14"><text:tab/><text:tab/><text:tab/><text:span text:style-name="T1">⮡</text:span><text:span text:style-name="src-spoken"><text:span text:style-name="T1">[2</text:span></text:span><text:span text:style-name="T20">nd</text:span><text:span text:style-name="T21"> </text:span><text:span text:style-name="src-spoken"><text:span text:style-name="T1">chant/Psalt.,T.</text:span></text:span><text:span text:style-name="var-src-tone-spoken"><text:span text:style-name="T2">III</text:span></text:span><text:span text:style-name="src-spoken"><text:span text:style-name="T1">]</text:span></text:span><text:tab/><text:span text:style-name="var-incipit-spoken"><text:span text:style-name="T10">“Because thou didst prefer humility of mind, O”…</text:span></text:span></text:p>
        <text:p text:style-name="P22"><text:span text:style-name="cue-doxology-spoken"><text:span text:style-name="T13">“Glory”…“Now”…</text:span></text:span><text:span text:style-name="T1">*⮡</text:span><text:span text:style-name="src-spoken"><text:span text:style-name="T1">[aft.Polyelei,T.</text:span></text:span><text:span text:style-name="var-src-tone-spoken"><text:span text:style-name="T2">I</text:span></text:span><text:span text:style-name="src-spoken"><text:span text:style-name="T1">]</text:span></text:span><text:tab/><text:span text:style-name="var-incipit-spoken"><text:span text:style-name="T10">“By thy divine birthgiving, O pure one, thou hast”…</text:span></text:span></text:p>
        <text:p text:style-name="Standard"/>
        <text:p text:style-name="P23"><text:span text:style-name="src-sung"><text:span text:style-name="T1">Hymns/Ascents:1</text:span></text:span><text:span text:style-name="src-sung"><text:span text:style-name="T22">st</text:span></text:span><text:span text:style-name="src-sung"><text:span text:style-name="T23"> </text:span></text:span><text:span text:style-name="src-sung"><text:span text:style-name="T1">antif.</text:span></text:span><text:span text:style-name="cue-strong"> </text:span><text:span text:style-name="src-sung">[Oktoich.,T.</text:span><text:span text:style-name="src-tone-sung"><text:span text:style-name="T6">III</text:span></text:span><text:span text:style-name="src-sung">]</text:span><text:tab/><text:span text:style-name="incipit-sung">“Thou didst move the captivity of Sion away”…</text:span></text:p>
        <text:p text:style-name="Standard"><text:span text:style-name="cue-strong">Prokeimen.</text:span> <text:tab/><text:tab/><text:tab/><text:tab/>⮡ <text:tab/><text:tab/><text:span text:style-name="incipit-sung">“Say among the nations that the Lord is Kin</text:span><text:span text:style-name="incipit-sung"><text:span text:style-name="T9">g</text:span></text:span><text:span text:style-name="incipit-sung">”…</text:span></text:p>
        <text:p text:style-name="P24"><text:span text:style-name="T1">⮡</text:span><text:tab/><text:tab/><text:span text:style-name="incipit-sung"><text:span text:style-name="T1">“Let every breath praise the Lord”</text:span></text:span></text:p>
        <text:p text:style-name="P25"><text:span text:style-name="cue-strong"><text:span text:style-name="T8">Matins Gospel </text:span></text:span><text:span text:style-name="var-src-tone-spoken"><text:span text:style-name="T2">IV</text:span></text:span><text:tab/> <text:span text:style-name="src-spoken">[</text:span><text:span text:style-name="src-spoken"><text:span text:style-name="T3">Lk 24:1-12 (§112)</text:span></text:span><text:span text:style-name="src-spoken">]</text:span> <text:tab/><text:span text:style-name="var-incipit-spoken">“At that time, upon the first day of the week,”…</text:span></text:p>
        <text:p text:style-name="Standard"/>
        <text:p text:style-name="Standard"><text:span text:style-name="src-sung"><text:span text:style-name="T24">Resurr. hymn</text:span></text:span><text:tab/><text:span text:style-name="src-sung"><text:span text:style-name="T24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6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6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6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P19"><text:span text:style-name="cue-strong"><text:span text:style-name="T1"/></text:span></text:p>
        <text:p text:style-name="P19"><text:span text:style-name="cue-strong"><text:span text:style-name="T1">Kanon</text:span></text:span></text:p>
        <text:p text:style-name="P19"><text:span text:style-name="cue-strong">Resurr. irmoi:</text:span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He, Who of old gathered the waters into on</text:span><text:span text:style-name="incipit-sung"><text:span text:style-name="T9">e</text:span></text:span><text:span text:style-name="incipit-sung">”…</text:span></text:p>
        <text:p text:style-name="P27"><text:soft-page-break/>6 total</text:p>
        <text:p text:style-name="P18"><text:span text:style-name="T10">1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T10">1</text:span><text:span text:style-name="T1"> </text:span><text:tab/><text:span text:style-name="T1">Cross/Resurr.</text:span><text:tab/><text:span text:style-name="T1">⮡</text:span><text:tab/><text:tab/><text:span text:style-name="incipit-spoken"><text:span text:style-name="T13">“Glory to Thy precious Cross&amp; Resurrection, O Lord”</text:span></text:span></text:p>
        <text:p text:style-name="P18"><text:span text:style-name="T10">1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8">3<text:tab/><text:span text:style-name="T25">Hierarch</text:span> <text:tab/><text:span text:style-name="src-spoken">[Minai.]</text:span> <text:tab/><text:tab/><text:span text:style-name="incipit-spoken"><text:span text:style-name="T1">“</text:span></text:span><text:span text:style-name="var-incipit-spoken">H</text:span><text:span text:style-name="var-incipit-spoken"><text:span text:style-name="T25">oly H</text:span></text:span><text:span text:style-name="var-incipit-spoken">ierarch </text:span><text:span text:style-name="var-incipit-spoken"><text:span text:style-name="T25">father Jonah</text:span></text:span><text:span text:style-name="incipit-spoken"><text:span text:style-name="T1">, pray to God for us”</text:span></text:span></text:p>
        <text:p text:style-name="Standard"/>
        <text:p text:style-name="P29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<text:span text:style-name="incipit-spoken"><text:span text:style-name="T1">both now and ever and unto the ages of ages”…</text:span></text:span></text:p>
        <text:p text:style-name="P30"><text:span text:style-name="cue-strong"><text:span text:style-name="T13">Katavasia</text:span></text:span><text:span text:style-name="cue-strong"><text:span text:style-name="T26">e</text:span></text:span><text:span text:style-name="cue-strong"><text:span text:style-name="T13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2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7">Minai</text:span></text:span><text:span text:style-name="src-sung">.,</text:span><text:span text:style-name="src-sung"><text:span text:style-name="T28">aft. Ode </text:span></text:span><text:span text:style-name="src-tone-sung"><text:span text:style-name="T6">VI</text:span></text:span><text:span text:style-name="src-sung">,T.</text:span><text:span text:style-name="var-src-tone">VIII</text:span><text:span text:style-name="src-sung">]</text:span><text:tab/><text:span text:style-name="var-incipit-sung">“From childhood thou didst enslave thyself”…</text:span></text:p>
        <text:p text:style-name="P31"><text:span text:style-name="src-spoken">+ Ichos</text:span> <text:tab/><text:tab/><text:tab/><text:span text:style-name="var-incipit-spoken">“Though a man by nature, O father, thou didst”…</text:span></text:p>
        <text:p text:style-name="P7"><text:span text:style-name="cue-strong"><text:span text:style-name="T8">Sess. hymn</text:span></text:span><text:span text:style-name="cue-strong"> </text:span><text:tab/>⮡<text:span text:style-name="src-spoken"><text:span text:style-name="T1">[</text:span></text:span><text:span text:style-name="src-spoken"><text:span text:style-name="T29">aft. Ode </text:span></text:span><text:span text:style-name="src-tone-spoken">III</text:span><text:span text:style-name="src-spoken"><text:span text:style-name="T1">,T.</text:span></text:span><text:span text:style-name="var-src-tone-spoken"><text:span text:style-name="T2">IV</text:span></text:span><text:span text:style-name="src-spoken"><text:span text:style-name="T1">]</text:span></text:span><text:tab/><text:span text:style-name="var-incipit-spoken">“Thy life hath been shown to all as brilliant, and”…</text:span></text:p>
        <text:p text:style-name="P9"><text:span text:style-name="cue-doxology-spoken">“Glory”…“Now”…</text:span><text:tab/>⮡ <text:tab/><text:tab/><text:tab/><text:tab/><text:span text:style-name="var-incipit-spoken">“We hymn thee, O Bride divine, Mother of Christ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Thou didst rise today from the tomb, O”…</text:span></text:p>
        <text:p text:style-name="P32"><text:span text:style-name="src-spoken">+ Ichos</text:span> <text:tab/><text:tab/><text:tab/><text:span text:style-name="incipit-spoken">“Let heaven and earth join chorus today and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P4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8">Exaposteilaria:</text:span></text:span><text:span text:style-name="T1"> Matins Gospel </text:span><text:span text:style-name="T30">IV</text:span></text:p>
        <text:p text:style-name="P32"><text:span text:style-name="src-spoken">[Oktoich.]</text:span> <text:tab/><text:tab/><text:tab/><text:span text:style-name="var-incipit-spoken"><text:span text:style-name="T10">“Having been illumined by the virtues, let us”…</text:span></text:span></text:p>
        <text:p text:style-name="P33"><text:span text:style-name="cue-doxology-spoken">“Glory”…</text:span> <text:tab/><text:span text:style-name="src-spoken">[Minai.]</text:span> <text:tab/><text:tab/><text:tab/><text:span text:style-name="var-incipit-spoken">“As a namesake of chastity from the years of thy”…</text:span></text:p>
        <text:p text:style-name="P26"><text:span text:style-name="cue-doxology-spoken">“Now”…</text:span> <text:tab/><text:span text:style-name="src-spoken">[Oktoich.]</text:span> <text:tab/><text:tab/><text:tab/><text:span text:style-name="var-incipit-spoken"><text:span text:style-name="T10">“O Lord Who hast commanded us to rejoice,”…</text:span></text:span></text:p>
        <text:p text:style-name="Standard"/>
        <text:p text:style-name="P34"><text:span text:style-name="cue-strong">Lauds / Praises</text:span> <text:tab/><text:span text:style-name="src-sung">[Orolog.,p.75]</text:span> <text:tab/><text:tab/><text:span text:style-name="T31">8+2 total</text:span></text:p>
        <text:p text:style-name="P35"><text:span text:style-name="var-field">4</text:span> <text:tab/>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poken">“Come, all ye nations, and understand the p</text:span><text:span text:style-name="incipit-spoken"><text:span text:style-name="T9">ower</text:span></text:span><text:span text:style-name="incipit-spoken">”…</text:span></text:p>
        <text:p text:style-name="P7"><text:span text:style-name="var-field">3</text:span> <text:tab/><text:tab/><text:tab/><text:span text:style-name="src-sung">[</text:span><text:span text:style-name="src-sung"><text:span text:style-name="T27">Minai</text:span></text:span><text:span text:style-name="src-sung">.,T.</text:span><text:span text:style-name="var-src-tone">VIII</text:span><text:span text:style-name="src-sung">]</text:span> <text:tab/><text:tab/><text:span text:style-name="var-incipit-spoken">“Having exercised thyself in temperance from thy”…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6"><text:span text:style-name="_5f_myBold"><text:span text:style-name="T1">Stichoi for 7&amp;8:</text:span></text:span></text:p>
            </table:table-cell>
            <table:table-cell table:style-name="Table1.B1" office:value-type="string">
              <text:p text:style-name="P37"><text:span text:style-name="var-incipit-sung">“My mouth shall speak wisdom and the meditation of my heart shall be of understanding”</text:span></text:p>
              <text:p text:style-name="P37"><text:span text:style-name="var-incipit-sung">“Hear this, all ye nations; give ear, all ye that inhabit the earth”</text:span></text:p>
            </table:table-cell>
          </table:table-row>
        </table:table>
        <text:p text:style-name="P38"><text:span text:style-name="var-field"><text:span text:style-name="T32">1</text:span></text:span><text:tab/><text:tab/><text:tab/><text:span text:style-name="T13">⮡</text:span><text:span text:style-name="src-spoken">Doxastik.</text:span><text:tab/><text:tab/><text:span text:style-name="var-incipit-spoken"><text:span text:style-name="T10">“Thou wast a most excellent servant, O holy”…</text:span></text:span></text:p>
        <text:p text:style-name="P39"><text:span text:style-name="cue-doxology-sung">“Glory”…</text:span> <text:tab/><text:span text:style-name="src-sung">[Evang. Stichiron </text:span><text:span text:style-name="var-src-tone"><text:span text:style-name="T28">IV</text:span></text:span><text:span text:style-name="src-sung">]<text:tab/></text:span><text:span text:style-name="var-incipit-sung"><text:span text:style-name="T10">“It was very early in the morning, and the”…</text:span></text:span></text:p>
        <text:p text:style-name="P40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3">7</text:span></text:span><text:span text:style-name="src-sung"><text:span text:style-name="T34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41"><text:span text:style-name="cue-strong">Resurr. tropar.</text:span><text:tab/>⮡<text:span text:style-name="src-sung">[Week of T.</text:span><text:span text:style-name="src-tone-sung"><text:span text:style-name="T6">III</text:span></text:span><text:span text:style-name="src-sung">]</text:span><text:tab/><text:span text:style-name="incipit-sung">“Today is Salvation come to the world. Let us”…</text:span></text:p>
        <text:p text:style-name="P41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5" text:outline-level="2">HOURS</text:h>
        <text:p text:style-name="Standard"><text:span text:style-name="cue-strong"><text:span text:style-name="T1">1</text:span></text:span><text:span text:style-name="cue-strong"><text:span text:style-name="T35">st</text:span></text:span><text:span text:style-name="cue-strong"><text:span text:style-name="T1"> / 6</text:span></text:span><text:span text:style-name="cue-strong"><text:span text:style-name="T35">th</text:span></text:span></text:p>
        <text:p text:style-name="P18"><text:span text:style-name="cue-strong"><text:span text:style-name="T8">Troparia:</text:span></text:span><text:tab/><text:span text:style-name="src-spoken">[Oktoich.]</text:span> <text:tab/><text:tab/><text:tab/><text:span text:style-name="incipit-spoken">“Let the heavens be glad, let earthly thing</text:span><text:span text:style-name="incipit-spoken"><text:span text:style-name="T9">s</text:span></text:span><text:span text:style-name="incipit-spoken">”…</text:span></text:p>
        <text:p text:style-name="P32"><text:span text:style-name="src-spoken"><text:span text:style-name="T1">[Minai.]</text:span></text:span><text:tab/><text:tab/><text:tab/><text:span text:style-name="var-incipit-spoken"><text:span text:style-name="T10">“Having dedicated thyself wholly to the Lord”…</text:span></text:span></text:p>
        <text:p text:style-name="P18"><text:span text:style-name="cue-strong"><text:span text:style-name="T8">Kontak. </text:span></text:span><text:tab/><text:tab/><text:span text:style-name="src-spoken">[Oktoich.]</text:span> <text:tab/><text:tab/><text:tab/><text:span text:style-name="incipit-spoken">“Thou didst rise today from the tomb, O mer”…</text:span></text:p>
        <text:p text:style-name="Standard"/>
        <text:p text:style-name="P42"><text:span text:style-name="cue-strong"><text:span text:style-name="T1">3</text:span></text:span><text:span text:style-name="cue-strong"><text:span text:style-name="T35">rd</text:span></text:span></text:p>
        <text:p text:style-name="P43"><text:span text:style-name="cue-strong"><text:span text:style-name="T8">Troparia:</text:span></text:span><text:tab/><text:span text:style-name="src-spoken">[Oktoich.]</text:span> <text:tab/><text:tab/><text:tab/><text:span text:style-name="incipit-spoken">“Let the heavens be glad, let earthly thing</text:span><text:span text:style-name="incipit-spoken"><text:span text:style-name="T9">s</text:span></text:span><text:span text:style-name="incipit-spoken">”…</text:span></text:p>
        <text:p text:style-name="P44"><text:span text:style-name="src-spoken"><text:span text:style-name="T1">[Minai.]</text:span></text:span><text:tab/><text:tab/><text:tab/><text:span text:style-name="var-incipit-spoken"><text:span text:style-name="T10">“Having dedicated thyself wholly to the Lord”…</text:span></text:span></text:p>
        <text:p text:style-name="P45"><text:span text:style-name="cue-strong"><text:span text:style-name="T8">Kontak.</text:span></text:span> <text:tab/><text:tab/>⮡ <text:tab/><text:tab/><text:tab/><text:tab/><text:span text:style-name="var-incipit-spoken">“From childhood thou didst enslave thyself unto”…</text:span></text:p>
        <text:h text:style-name="P46" text:outline-level="2">LITURGY OF ST JOHN CHRYSOS-TOMOS</text:h>
        <text:p text:style-name="P34"><text:span text:style-name="cue-strong">Beatitudes: </text:span><text:tab/><text:tab/><text:span text:style-name="src-sung">[Orolog.,p.136]</text:span><text:tab/><text:tab/><text:span text:style-name="T31">10 total</text:span></text:p>
        <text:p text:style-name="P47"><text:span text:style-name="var-field">6</text:span> <text:tab/>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poken">“From paradise didst Thou drive our forefat</text:span><text:span text:style-name="incipit-spoken"><text:span text:style-name="T9">her</text:span></text:span><text:span text:style-name="incipit-spoken">”…</text:span></text:p>
        <text:p text:style-name="P48"><text:span text:style-name="var-field"><text:span text:style-name="T36">4</text:span></text:span><text:tab/><text:tab/><text:tab/><text:span text:style-name="src-sung">[</text:span><text:span text:style-name="src-sung"><text:span text:style-name="T27">Minai</text:span></text:span><text:span text:style-name="src-sung">.,</text:span><text:span text:style-name="src-sung"><text:span text:style-name="T37">Ode </text:span></text:span><text:span text:style-name="var-src-tone">III</text:span><text:span text:style-name="src-sung">]<text:tab/></text:span><text:tab/><text:span text:style-name="var-incipit-spoken"><text:span text:style-name="T10">“Thou didst ascend to the summit of the virtues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Let the heavens be glad, let earthly thing</text:span><text:span text:style-name="incipit-sung"><text:span text:style-name="T9">s</text:span></text:span><text:span text:style-name="incipit-sung">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3">“From thy youth didst thou love Christ, O”…</text:span></text:span></text:p>
        <text:p text:style-name="P50"><text:span text:style-name="src-sung">[</text:span><text:span text:style-name="src-sung"><text:span text:style-name="T27">Minai</text:span></text:span><text:span text:style-name="src-sung">.,T.</text:span><text:span text:style-name="var-src-tone">IV</text:span><text:span text:style-name="src-sung">]</text:span><text:tab/><text:tab/><text:span text:style-name="var-incipit-sung"><text:span text:style-name="T10">“Having dedicated thyself wholly to the Lord”…</text:span></text:span></text:p>
        <text:p text:style-name="P34"><text:span text:style-name="cue-strong">Kontakia: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Thou didst rise today from the tomb, O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3">“Having forsaken the beauty of the world and”…</text:span></text:span></text:p>
        <text:p text:style-name="P7"><text:span text:style-name="cue-doxology-sung"><text:span text:style-name="T13">“Glory”…</text:span></text:span><text:tab/><text:tab/><text:span text:style-name="src-sung">[</text:span><text:span text:style-name="src-sung"><text:span text:style-name="T27">Minai</text:span></text:span><text:span text:style-name="src-sung">.,T.</text:span><text:span text:style-name="var-src-tone">VIII</text:span><text:span text:style-name="src-sung">]</text:span><text:tab/><text:tab/><text:span text:style-name="var-incipit-sung"><text:span text:style-name="T10">“From childhood thou didst enslave thyself”…</text:span></text:span></text:p>
        <text:p text:style-name="P18"><text:span text:style-name="cue-doxology-sung"><text:span text:style-name="T13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4"><text:span text:style-name="cue-strong">Prokeimena:</text:span> 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O chant unto our God, chant ye; chant unto”…</text:span></text:p>
        <text:p text:style-name="P32"><text:span text:style-name="src-spoken">+ Stichos</text:span> <text:tab/><text:tab/><text:tab/><text:span text:style-name="incipit-spoken">“Clap your hands, all ye nations; shout unt</text:span><text:span text:style-name="incipit-spoken"><text:span text:style-name="T9">o God</text:span></text:span><text:span text:style-name="incipit-spoken">”…</text:span></text:p>
        <text:p text:style-name="P37"><text:span text:style-name="cue-strong"><text:span text:style-name="T13">2</text:span></text:span><text:span text:style-name="cue-strong"><text:span text:style-name="T38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VII</text:span></text:span><text:span text:style-name="src-spoken"><text:span text:style-name="T1">]</text:span></text:span><text:tab/><text:tab/><text:span text:style-name="var-incipit-spoken"><text:span text:style-name="T10">“Precious in the sight of the Lord is the death”…</text:span></text:span></text:p>
        <text:p text:style-name="Standard"><text:span text:style-name="cue-strong">Alleluiaria:</text:span> <text:tab/><text:tab/><text:span text:style-name="src-spoken">[Oktoich.,T.</text:span><text:span text:style-name="src-tone-spoken">III</text:span><text:span text:style-name="src-spoken">]</text:span> <text:tab/><text:tab/><text:span text:style-name="incipit-spoken">“Of Thy mercies, O Lord, will I sing foreve</text:span><text:span text:style-name="incipit-spoken"><text:span text:style-name="T9">r, unto</text:span></text:span><text:span text:style-name="incipit-spoken">”…</text:span></text:p>
        <text:p text:style-name="P32"><text:span text:style-name="src-spoken">+ Stichos</text:span> <text:tab/><text:tab/><text:tab/><text:span text:style-name="incipit-spoken">“For Thou hast said: Mercy shall be built u</text:span><text:span text:style-name="incipit-spoken"><text:span text:style-name="T9">p for</text:span></text:span><text:span text:style-name="incipit-spoken">”…</text:span></text:p>
        <text:p text:style-name="P37"><text:span text:style-name="cue-strong"><text:span text:style-name="T39">2</text:span></text:span><text:span text:style-name="cue-strong"><text:span text:style-name="T38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II</text:span></text:span><text:span text:style-name="src-spoken"><text:span text:style-name="T1">]</text:span></text:span><text:tab/><text:tab/><text:span text:style-name="var-incipit-spoken"><text:span text:style-name="T10">“Thy priests shall be clothed with righteousness”…</text:span></text:span></text:p>
        <text:p text:style-name="Standard"/>
        <text:p text:style-name="Standard"><text:span text:style-name="cue-strong"><text:span text:style-name="T13">Communion stichoi:</text:span></text:span><text:span text:style-name="T1"> </text:span><text:tab/><text:tab/><text:tab/><text:tab/><text:span text:style-name="incipit-sung"><text:span text:style-name="T13">“Praise the Lord from the heavens, praise </text:span></text:span><text:span text:style-name="incipit-sung"><text:span text:style-name="T40">Him</text:span></text:span><text:span text:style-name="incipit-sung"><text:span text:style-name="T13">”…</text:span></text:span></text:p>
        <text:p text:style-name="P51"><text:span text:style-name="var-incipit-sung"><text:span text:style-name="T10">“In everlasting remembrance shall the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17T20:27:31.403935116</dc:date>
    <meta:editing-duration>PT11H43M56S</meta:editing-duration>
    <meta:editing-cycles>13</meta:editing-cycles>
    <meta:generator>LibreOfficeDev/26.2.4.0.0$Linux_X86_64 LibreOffice_project/d9a14b9b3eb39e1636bf69b77bc9945234bcbc5d</meta:generator>
    <meta:document-statistic meta:table-count="2" meta:image-count="0" meta:object-count="0" meta:page-count="2" meta:paragraph-count="126" meta:word-count="1125" meta:character-count="7329" meta:non-whitespace-character-count="6057"/>
  </office:meta>
</office:document-meta>
</file>