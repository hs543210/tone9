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SemiBold" svg:font-family="'Noto Sans SemiBold'" style:font-adornments="Italic" style:font-family-generic="swiss" style:font-pitch="variable"/>
    <style:font-face style:name="Noto Sans SemiBold1" svg:font-family="'Noto Sans SemiBold'" style:font-adornments="Regular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adornments="Italic" style:font-family-generic="swiss" style:font-pitch="variable"/>
    <style:font-face style:name="Noto Serif" svg:font-family="'Noto Serif'" style:font-family-generic="roman" style:font-pitch="variable"/>
    <style:font-face style:name="Noto Serif SemiBold" svg:font-family="'Noto Serif SemiBold'" style:font-adornments="Regular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4" style:family="table" style:master-page-name="Standard">
      <style:table-properties style:width="4.75in" style:page-number="auto" table:align="left"/>
    </style:style>
    <style:style style:name="Table4.A" style:family="table-column">
      <style:table-column-properties style:column-width="1.2493in"/>
    </style:style>
    <style:style style:name="Table4.B" style:family="table-column">
      <style:table-column-properties style:column-width="2.25in"/>
    </style:style>
    <style:style style:name="Table4.C" style:family="table-column">
      <style:table-column-properties style:column-width="1.2507in"/>
    </style:style>
    <style:style style:name="Table4.A2" style:family="table-cell">
      <style:table-cell-properties style:vertical-align="middle" style:border-line-width-bottom="0.0083in 0.0083in 0.0167in" fo:padding-left="0in" fo:padding-right="0in" fo:padding-top="0in" fo:padding-bottom="0.1201in" fo:border-left="none" fo:border-right="none" fo:border-top="none" fo:border-bottom="2.4pt double #11111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86dd0"/>
    </style:style>
    <style:style style:name="P3" style:family="paragraph" style:parent-style-name="Standard">
      <style:paragraph-properties fo:text-align="right" style:justify-single-word="false"/>
    </style:style>
    <style:style style:name="P4" style:family="paragraph" style:parent-style-name="Standard">
      <style:text-properties fo:background-color="transparent"/>
    </style:style>
    <style:style style:name="P5" style:family="paragraph" style:parent-style-name="Heading_20_2">
      <style:text-properties fo:background-color="transparent"/>
    </style:style>
    <style:style style:name="P6" style:family="paragraph" style:parent-style-name="Standard">
      <style:paragraph-properties fo:margin-left="0.25in" fo:text-indent="0in" style:auto-text-indent="false"/>
      <style:text-properties officeooo:paragraph-rsid="0004b623"/>
    </style:style>
    <style:style style:name="P7" style:family="paragraph" style:parent-style-name="Standard">
      <style:paragraph-properties fo:margin-left="0.25in" fo:text-indent="0in" style:auto-text-indent="false"/>
      <style:text-properties officeooo:paragraph-rsid="001081f5"/>
    </style:style>
    <style:style style:name="P8" style:family="paragraph" style:parent-style-name="Standard">
      <style:paragraph-properties fo:margin-left="0.25in" fo:text-indent="0in" style:auto-text-indent="false"/>
      <style:text-properties officeooo:paragraph-rsid="000e76b0"/>
    </style:style>
    <style:style style:name="P9" style:family="paragraph" style:parent-style-name="Standard">
      <style:paragraph-properties fo:margin-left="0in" fo:text-indent="0in" style:auto-text-indent="false"/>
    </style:style>
    <style:style style:name="P10" style:family="paragraph" style:parent-style-name="Standard">
      <style:paragraph-properties fo:margin-left="0.25in" fo:text-indent="0in" style:auto-text-indent="false"/>
      <style:text-properties officeooo:paragraph-rsid="000ef31a"/>
    </style:style>
    <style:style style:name="P11" style:family="paragraph" style:parent-style-name="Standard">
      <style:text-properties officeooo:paragraph-rsid="00176dab"/>
    </style:style>
    <style:style style:name="P12" style:family="paragraph" style:parent-style-name="Standard">
      <style:paragraph-properties fo:margin-left="1.25in" fo:text-indent="0in" style:auto-text-indent="false"/>
    </style:style>
    <style:style style:name="P13" style:family="paragraph" style:parent-style-name="Standard">
      <style:paragraph-properties fo:margin-left="0in" fo:text-indent="0in" style:auto-text-indent="false"/>
      <style:text-properties officeooo:paragraph-rsid="001081f5"/>
    </style:style>
    <style:style style:name="P14" style:family="paragraph" style:parent-style-name="Standard">
      <style:paragraph-properties fo:margin-left="0in" fo:text-indent="0in" style:auto-text-indent="false"/>
      <style:text-properties officeooo:paragraph-rsid="000ef31a"/>
    </style:style>
    <style:style style:name="P15" style:family="paragraph" style:parent-style-name="Standard">
      <style:paragraph-properties fo:margin-left="1.75in" fo:text-indent="0in" style:auto-text-indent="false" fo:break-before="column"/>
    </style:style>
    <style:style style:name="P16" style:family="paragraph" style:parent-style-name="Standard">
      <style:paragraph-properties fo:margin-left="0.25in" fo:text-indent="0in" style:auto-text-indent="false"/>
      <style:text-properties fo:background-color="transparent"/>
    </style:style>
    <style:style style:name="P17" style:family="paragraph" style:parent-style-name="Standard">
      <style:paragraph-properties fo:margin-left="0.25in" fo:text-indent="0in" style:auto-text-indent="false"/>
    </style:style>
    <style:style style:name="P18" style:family="paragraph" style:parent-style-name="Standard">
      <style:paragraph-properties fo:margin-left="1.75in" fo:text-indent="0in" style:auto-text-indent="false"/>
    </style:style>
    <style:style style:name="P19" style:family="paragraph" style:parent-style-name="Standard">
      <style:text-properties officeooo:paragraph-rsid="0017e1c4"/>
    </style:style>
    <style:style style:name="P20" style:family="paragraph" style:parent-style-name="Standard">
      <style:text-properties officeooo:paragraph-rsid="000b0363"/>
    </style:style>
    <style:style style:name="P21" style:family="paragraph" style:parent-style-name="Standard">
      <style:paragraph-properties fo:margin-left="1.5in" fo:text-indent="0in" style:auto-text-indent="false"/>
    </style:style>
    <style:style style:name="P22" style:family="paragraph" style:parent-style-name="Standard">
      <style:text-properties officeooo:paragraph-rsid="00086dd0"/>
    </style:style>
    <style:style style:name="P23" style:family="paragraph" style:parent-style-name="Standard">
      <style:paragraph-properties fo:margin-left="0.5in" fo:text-indent="0in" style:auto-text-indent="false"/>
    </style:style>
    <style:style style:name="P24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25" style:family="paragraph" style:parent-style-name="Standard">
      <style:paragraph-properties fo:margin-left="0.25in" fo:text-indent="0in" style:auto-text-indent="false"/>
      <style:text-properties officeooo:paragraph-rsid="00086dd0"/>
    </style:style>
    <style:style style:name="P26" style:family="paragraph" style:parent-style-name="Standard">
      <style:paragraph-properties fo:margin-left="0.75in" fo:text-indent="0in" style:auto-text-indent="false"/>
    </style:style>
    <style:style style:name="P27" style:family="paragraph" style:parent-style-name="Standard">
      <style:text-properties officeooo:paragraph-rsid="001324cb"/>
    </style:style>
    <style:style style:name="P28" style:family="paragraph" style:parent-style-name="Standard">
      <style:paragraph-properties fo:margin-left="1in" fo:text-indent="0in" style:auto-text-indent="false"/>
      <style:text-properties officeooo:paragraph-rsid="000f8816"/>
    </style:style>
    <style:style style:name="P29" style:family="paragraph" style:parent-style-name="Standard">
      <style:paragraph-properties fo:margin-left="1in" fo:text-indent="0in" style:auto-text-indent="false"/>
    </style:style>
    <style:style style:name="P30" style:family="paragraph" style:parent-style-name="Standard">
      <style:paragraph-properties fo:margin-left="0.5in" fo:text-indent="0in" style:auto-text-indent="false"/>
      <style:text-properties officeooo:paragraph-rsid="001324cb"/>
    </style:style>
    <style:style style:name="P31" style:family="paragraph" style:parent-style-name="Standard">
      <style:text-properties officeooo:paragraph-rsid="00195f46"/>
    </style:style>
    <style:style style:name="P32" style:family="paragraph" style:parent-style-name="Standard">
      <style:paragraph-properties fo:margin-left="0.25in" fo:text-indent="0in" style:auto-text-indent="false"/>
      <style:text-properties officeooo:paragraph-rsid="00195f46"/>
    </style:style>
    <style:style style:name="P33" style:family="paragraph" style:parent-style-name="Standard">
      <style:paragraph-properties fo:margin-left="0.25in" fo:text-indent="0in" style:auto-text-indent="false"/>
      <style:text-properties officeooo:paragraph-rsid="001c19ba"/>
    </style:style>
    <style:style style:name="P34" style:family="paragraph" style:parent-style-name="Standard">
      <style:paragraph-properties fo:margin-left="0.25in" fo:text-indent="0in" style:auto-text-indent="false"/>
      <style:text-properties officeooo:paragraph-rsid="00118913"/>
    </style:style>
    <style:style style:name="P35" style:family="paragraph" style:parent-style-name="Standard">
      <style:paragraph-properties fo:margin-left="0.25in" fo:text-indent="0in" style:auto-text-indent="false"/>
      <style:text-properties officeooo:paragraph-rsid="00113855"/>
    </style:style>
    <style:style style:name="P36" style:family="paragraph" style:parent-style-name="Standard">
      <style:paragraph-properties fo:text-align="start" style:justify-single-word="false"/>
      <style:text-properties officeooo:paragraph-rsid="0007bf68"/>
    </style:style>
    <style:style style:name="P37" style:family="paragraph" style:parent-style-name="Heading_20_2">
      <style:paragraph-properties fo:break-before="column"/>
    </style:style>
    <style:style style:name="P38" style:family="paragraph" style:parent-style-name="Heading_20_2_20_Long_20_Box">
      <style:text-properties fo:background-color="transparent"/>
    </style:style>
    <style:style style:name="P39" style:family="paragraph" style:parent-style-name="Standard">
      <style:paragraph-properties fo:margin-left="0.25in" fo:text-indent="0in" style:auto-text-indent="false"/>
      <style:text-properties officeooo:paragraph-rsid="000e90cb"/>
    </style:style>
    <style:style style:name="P40" style:family="paragraph" style:parent-style-name="Standard">
      <style:paragraph-properties fo:margin-left="0.25in" fo:text-indent="0in" style:auto-text-indent="false"/>
      <style:text-properties officeooo:paragraph-rsid="0009d3a4"/>
    </style:style>
    <style:style style:name="P41" style:family="paragraph" style:parent-style-name="Standard">
      <style:paragraph-properties fo:margin-left="1in" fo:text-indent="0in" style:auto-text-indent="false"/>
      <style:text-properties officeooo:paragraph-rsid="001324cb"/>
    </style:style>
    <style:style style:name="P42" style:family="paragraph" style:parent-style-name="Standard">
      <style:paragraph-properties fo:margin-left="1in" fo:text-indent="0in" style:auto-text-indent="false"/>
      <style:text-properties officeooo:paragraph-rsid="001081f5"/>
    </style:style>
    <style:style style:name="P43" style:family="paragraph" style:parent-style-name="Standard">
      <style:paragraph-properties fo:margin-left="0.5in" fo:text-indent="0in" style:auto-text-indent="false"/>
      <style:text-properties officeooo:paragraph-rsid="001081f5"/>
    </style:style>
    <style:style style:name="P44" style:family="paragraph" style:parent-style-name="Standard">
      <style:paragraph-properties fo:margin-left="2in" fo:text-indent="0in" style:auto-text-indent="false"/>
      <style:text-properties officeooo:paragraph-rsid="00086dd0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0c400"/>
    </style:style>
    <style:style style:name="T3" style:family="text">
      <style:text-properties officeooo:rsid="000ce31b"/>
    </style:style>
    <style:style style:name="T4" style:family="text">
      <style:text-properties fo:font-style="italic" fo:background-color="transparent" loext:char-shading-value="0" style:font-style-asian="italic" style:font-style-complex="italic"/>
    </style:style>
    <style:style style:name="T5" style:family="text">
      <style:text-properties fo:color="#666666" loext:opacity="100%" style:font-name="Noto Sans" fo:font-size="8.60000038146973pt" style:text-underline-style="solid" style:text-underline-width="auto" style:text-underline-color="font-color" fo:background-color="transparent" loext:char-shading-value="0"/>
    </style:style>
    <style:style style:name="T6" style:family="text">
      <style:text-properties officeooo:rsid="001324cb" fo:background-color="transparent" loext:char-shading-value="0"/>
    </style:style>
    <style:style style:name="T7" style:family="text">
      <style:text-properties officeooo:rsid="0019ca7c" fo:background-color="transparent" loext:char-shading-value="0"/>
    </style:style>
    <style:style style:name="T8" style:family="text">
      <style:text-properties officeooo:rsid="0009d3a4"/>
    </style:style>
    <style:style style:name="T9" style:family="text">
      <style:text-properties fo:font-size="8.60000038146973pt"/>
    </style:style>
    <style:style style:name="T10" style:family="text">
      <style:text-properties officeooo:rsid="0016e83a"/>
    </style:style>
    <style:style style:name="T11" style:family="text">
      <style:text-properties officeooo:rsid="00176dab" fo:background-color="transparent" loext:char-shading-value="0"/>
    </style:style>
    <style:style style:name="T12" style:family="text">
      <style:text-properties fo:font-size="8.60000038146973pt" fo:background-color="transparent" loext:char-shading-value="0"/>
    </style:style>
    <style:style style:name="T13" style:family="text">
      <style:text-properties officeooo:rsid="001081f5" fo:background-color="transparent" loext:char-shading-value="0"/>
    </style:style>
    <style:style style:name="T14" style:family="text">
      <style:text-properties officeooo:rsid="0017e1c4"/>
    </style:style>
    <style:style style:name="T15" style:family="text">
      <style:text-properties fo:color="#666666" loext:opacity="100%" style:font-name="Noto Sans" fo:font-size="8.60000038146973pt" fo:background-color="transparent" loext:char-shading-value="0"/>
    </style:style>
    <style:style style:name="T16" style:family="text">
      <style:text-properties fo:color="#666666" loext:opacity="100%" style:text-position="super 58%" style:font-name="Noto Sans" fo:font-size="8.60000038146973pt" officeooo:rsid="000ef31a" fo:background-color="transparent" loext:char-shading-value="0"/>
    </style:style>
    <style:style style:name="T17" style:family="text">
      <style:text-properties officeooo:rsid="001c2bf2" fo:background-color="transparent" loext:char-shading-value="0"/>
    </style:style>
    <style:style style:name="T18" style:family="text">
      <style:text-properties style:text-position="super 58%" officeooo:rsid="000e90cb" fo:background-color="transparent" loext:char-shading-value="0"/>
    </style:style>
    <style:style style:name="T19" style:family="text">
      <style:text-properties officeooo:rsid="000e90cb" fo:background-color="transparent" loext:char-shading-value="0"/>
    </style:style>
    <style:style style:name="T20" style:family="text">
      <style:text-properties fo:font-size="7.90000009536743pt" fo:background-color="transparent" loext:char-shading-value="0"/>
    </style:style>
    <style:style style:name="T21" style:family="text">
      <style:text-properties officeooo:rsid="000b0363"/>
    </style:style>
    <style:style style:name="T22" style:family="text">
      <style:text-properties fo:font-size="8.60000038146973pt" officeooo:rsid="001af3bc" fo:background-color="transparent" loext:char-shading-value="0"/>
    </style:style>
    <style:style style:name="T23" style:family="text">
      <style:text-properties officeooo:rsid="000ef31a"/>
    </style:style>
    <style:style style:name="T24" style:family="text">
      <style:text-properties officeooo:rsid="001081f5"/>
    </style:style>
    <style:style style:name="T25" style:family="text">
      <style:text-properties officeooo:rsid="000b360e"/>
    </style:style>
    <style:style style:name="T26" style:family="text">
      <style:text-properties officeooo:rsid="000ef31a" fo:background-color="transparent" loext:char-shading-value="0"/>
    </style:style>
    <style:style style:name="T27" style:family="text">
      <style:text-properties officeooo:rsid="000ce31b" fo:background-color="transparent" loext:char-shading-value="0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fo:font-size="8.60000038146973pt" officeooo:rsid="001c19ba" fo:background-color="transparent" loext:char-shading-value="0"/>
    </style:style>
    <style:style style:name="T30" style:family="text">
      <style:text-properties officeooo:rsid="00195f46" fo:background-color="transparent" loext:char-shading-value="0"/>
    </style:style>
    <style:style style:name="T31" style:family="text">
      <style:text-properties officeooo:rsid="00113855" fo:background-color="transparent" loext:char-shading-value="0"/>
    </style:style>
    <style:style style:name="T32" style:family="text">
      <style:text-properties style:text-position="super 58%" officeooo:rsid="000b0363" fo:background-color="transparent" loext:char-shading-value="0"/>
    </style:style>
    <style:style style:name="T33" style:family="text">
      <style:text-properties fo:font-size="8.60000038146973pt" officeooo:rsid="00195f46" fo:background-color="transparent" loext:char-shading-value="0"/>
    </style:style>
    <style:style style:name="T34" style:family="text">
      <style:text-properties officeooo:rsid="0008dabd"/>
    </style:style>
    <style:style style:name="T35" style:family="text">
      <style:text-properties fo:font-size="8.60000038146973pt" officeooo:rsid="000b360e"/>
    </style:style>
    <style:style style:name="T36" style:family="text">
      <style:text-properties style:text-position="super 58%" fo:font-size="8.60000038146973pt" officeooo:rsid="0019ca7c" fo:background-color="transparent" loext:char-shading-value="0"/>
    </style:style>
    <style:style style:name="T37" style:family="text">
      <style:text-properties fo:font-size="8.60000038146973pt" officeooo:rsid="0019ca7c" fo:background-color="transparent" loext:char-shading-value="0"/>
    </style:style>
    <style:style style:name="T38" style:family="text">
      <style:text-properties fo:font-size="8.60000038146973pt" officeooo:rsid="0009d3a4" fo:background-color="transparent" loext:char-shading-value="0"/>
    </style:style>
    <style:style style:name="Sect1" style:family="section">
      <style:section-properties text:dont-balance-text-columns="true"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Weekly_Outline">
        <text:section text:style-name="Sect2" text:name="Weekly_Outline_Continued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>
              <table:table-cell table:number-columns-spanned="3" office:value-type="string">
                <text:p text:style-name="P1"><text:span text:style-name="var-field">GM Theodórou Stratilátis</text:span></text:p>
              </table:table-cell>
              <table:covered-table-cell/>
              <table:covered-table-cell/>
            </table:table-row>
            <table:table-row>
              <table:table-cell table:style-name="Table4.A2" office:value-type="string">
                <text:p text:style-name="Standard"><text:span text:style-name="src-spoken"><text:span text:style-name="T1">Sun. / T.</text:span></text:span><text:span text:style-name="src-tone-spoken">II</text:span></text:p>
              </table:table-cell>
              <table:table-cell table:style-name="Table4.A2" office:value-type="string">
                <text:p text:style-name="P2">Matins Gospel <text:span text:style-name="var-src-tone-spoken"><text:span text:style-name="T2">III</text:span></text:span>: <text:span text:style-name="T3">Mk 16:9-20 (§71)</text:span></text:p>
              </table:table-cell>
              <table:table-cell table:style-name="Table4.A2" office:value-type="string">
                <text:p text:style-name="P3"><text:span text:style-name="src-spoken"><text:span text:style-name="T1">[ §1c – 6-stichira svc ]</text:span></text:span></text:p>
              </table:table-cell>
            </table:table-row>
          </table:table>
          <text:p text:style-name="P4"/>
        </text:section>
        <text:h text:style-name="P5" text:outline-level="2">GREAT VESPERS</text:h>
        <text:p text:style-name="Standard"><text:span text:style-name="cue-strong"><text:span text:style-name="T1">Psalm 103</text:span></text:span><text:tab/><text:tab/><text:span text:style-name="src-sung"><text:span text:style-name="T1">[Orologion,p.187]</text:span></text:span><text:tab/><text:span text:style-name="incipit-sung"><text:span text:style-name="T1">“Bless the Lord, O my soul”…</text:span></text:span><text:span text:style-name="T1">;</text:span><text:tab/><text:span text:style-name="T1">Great Ektenia</text:span></text:p>
        <text:p text:style-name="Standard"><text:span text:style-name="cue-strong"><text:span text:style-name="T1">Psalm 1</text:span></text:span><text:tab/><text:tab/><text:tab/><text:tab/><text:span text:style-name="T1">⮡</text:span><text:tab/><text:tab/><text:tab/><text:span text:style-name="incipit-sung"><text:span text:style-name="T1">“Blessed is the Man”…</text:span></text:span><text:span text:style-name="T1">;</text:span><text:tab/><text:tab/><text:tab/><text:span text:style-name="T1">Little Ektenia</text:span></text:p>
        <text:p text:style-name="Standard"/>
        <text:p text:style-name="Standard"><text:span text:style-name="src-sung"><text:span text:style-name="T4">“Lord, I Have Cried”…</text:span></text:span><text:tab/><text:tab/><text:span text:style-name="T1">⮡</text:span><text:tab/><text:tab/><text:tab/><text:span text:style-name="var-field"><text:span text:style-name="T5">10+2 total</text:span></text:span></text:p>
        <text:p text:style-name="P6"><text:span text:style-name="var-field">6</text:span> <text:span text:style-name="src-sung"><text:span text:style-name="T1">stichira:</text:span></text:span><text:tab/><text:tab/><text:span text:style-name="src-sung">[Oktoichos,T.</text:span><text:span text:style-name="src-tone-sung"><text:span text:style-name="T6">II</text:span></text:span><text:span text:style-name="src-sung">]</text:span><text:tab/><text:tab/><text:span text:style-name="incipit-sung">“Come ye, let us worship God the Word, Who”…</text:span></text:p>
        <text:p text:style-name="P7"><text:span text:style-name="var-field">4</text:span>” <text:tab/><text:tab/><text:tab/><text:span text:style-name="src-spoken"><text:span text:style-name="T1">[</text:span></text:span><text:span text:style-name="src-spoken"><text:span text:style-name="T7">Minai.</text:span></text:span><text:span text:style-name="src-spoken"><text:span text:style-name="T1">,T.</text:span></text:span><text:span text:style-name="var-src-tone-spoken"><text:span text:style-name="T2">II</text:span></text:span><text:span text:style-name="src-spoken"><text:span text:style-name="T1">]</text:span></text:span> <text:tab/><text:tab/><text:span text:style-name="var-incipit-spoken">“Wholly didst thou bring thyself to Him Who”…</text:span></text:p>
        <text:p text:style-name="P7"><text:span text:style-name="cue-doxology-sung">“Glory”…</text:span> <text:tab/><text:tab/>⮡<text:span text:style-name="src-spoken"><text:span text:style-name="T1">[T.</text:span></text:span><text:span text:style-name="var-src-tone-spoken"><text:span text:style-name="T2">V</text:span></text:span><text:span text:style-name="src-spoken"><text:span text:style-name="T1">]</text:span></text:span> <text:tab/><text:tab/><text:span text:style-name="var-incipit-spoken">“Today hath the honored memory of Christ’s”…</text:span></text:p>
        <text:p text:style-name="P8"><text:span text:style-name="cue-doxology-sung">“Now”…</text:span><text:tab/><text:tab/><text:span text:style-name="src-sung">[Oktoich.,T.</text:span><text:span text:style-name="src-tone-sung"><text:span text:style-name="T6">II</text:span></text:span><text:span text:style-name="src-sung">]</text:span> <text:tab/><text:tab/><text:span text:style-name="incipit-sung">“The shadow of the law passed away when”…</text:span></text:p>
        <text:p text:style-name="Standard"/>
        <text:p text:style-name="P9"><text:span text:style-name="cue-strong"><text:span text:style-name="T1">Vesper Hymn</text:span></text:span><text:tab/><text:span text:style-name="src-sung"><text:span text:style-name="T1">[Orolog.,p.192]</text:span></text:span><text:tab/><text:tab/><text:span text:style-name="incipit-sung"><text:span text:style-name="T1">“O Gentle Light of the holy glory of the”…</text:span></text:span></text:p>
        <text:p text:style-name="Standard"><text:span text:style-name="cue-strong"><text:span text:style-name="T1">Prokeimen.</text:span></text:span><text:tab/><text:tab/><text:span text:style-name="src-sung"><text:span text:style-name="T1">[Okto./Sat.,T.</text:span></text:span><text:span text:style-name="src-tone-sung"><text:span text:style-name="T6">VI</text:span></text:span><text:span text:style-name="src-sung"><text:span text:style-name="T1">]</text:span></text:span><text:tab/><text:span text:style-name="incipit-sung"><text:span text:style-name="T1">“The Lord is King, He is clothed with majesty”</text:span></text:span></text:p>
        <text:p text:style-name="Standard"><text:span text:style-name="T1">Ektenia of FS;</text:span><text:tab/><text:tab/><text:span text:style-name="src-spoken"><text:span text:style-name="T1">[Vigil book p.25]</text:span></text:span><text:tab/><text:tab/><text:span text:style-name="incipit-spoken"><text:span text:style-name="T1">“Vouchsafe, O Lord, to keep us this evening”…</text:span></text:span></text:p>
        <text:p text:style-name="Standard"/>
        <text:p text:style-name="Standard"><text:span text:style-name="cue-strong">Aposticha:</text:span> <text:tab/><text:tab/><text:span text:style-name="src-sung">[Oktoich.,T.</text:span><text:span text:style-name="src-tone-sung"><text:span text:style-name="T6">II</text:span></text:span><text:span text:style-name="src-sung">]</text:span> <text:tab/><text:tab/><text:span text:style-name="incipit-sung">“Thy Resurrection, O Christ our Savior, hat</text:span><text:span text:style-name="incipit-sung"><text:span text:style-name="T8">h</text:span></text:span><text:span text:style-name="incipit-sung">”…</text:span></text:p>
        <text:p text:style-name="P7"><text:span text:style-name="cue-doxology-sung"><text:span text:style-name="T9">“Glory”…</text:span></text:span> <text:tab/><text:span text:style-name="src-spoken"><text:span text:style-name="T1">[</text:span></text:span><text:span text:style-name="src-spoken"><text:span text:style-name="T7">Minai.</text:span></text:span><text:span text:style-name="src-spoken"><text:span text:style-name="T1">,T.</text:span></text:span><text:span text:style-name="var-src-tone-spoken"><text:span text:style-name="T2">VIII</text:span></text:span><text:span text:style-name="src-spoken"><text:span text:style-name="T1">]</text:span></text:span> <text:tab/><text:tab/><text:span text:style-name="var-incipit-spoken">“O all ye faithful, as is meet let us bless”…</text:span></text:p>
        <text:p text:style-name="P10"><text:span text:style-name="cue-doxology-sung">“Now”…</text:span> <text:tab/><text:tab/><text:span text:style-name="src-sung">[Oktoich.,T.</text:span><text:span text:style-name="var-src-tone"><text:span text:style-name="T10">VIII</text:span></text:span><text:span text:style-name="src-sung">]</text:span> <text:tab/><text:span text:style-name="var-incipit-sung">“O unwedded Virgin who ineffably conceived”…</text:span></text:p>
        <text:p text:style-name="Standard"/>
        <text:p text:style-name="P9"><text:span text:style-name="src-sung"><text:span text:style-name="T1">Prayer/St Symeon</text:span></text:span><text:tab/><text:span text:style-name="src-sung"><text:span text:style-name="T1">[Orolog.,p.200]</text:span></text:span><text:tab/><text:tab/><text:span text:style-name="incipit-sung"><text:span text:style-name="T1">“Now lettest Thou Thy servant depart in peace”…</text:span></text:span></text:p>
        <text:p text:style-name="Standard"><text:span text:style-name="T1">Tris-Agion</text:span><text:tab/><text:tab/><text:span text:style-name="src-spoken"><text:span text:style-name="T1">[Vigil bk <text:s/>p.36]</text:span></text:span><text:tab/><text:tab/><text:span text:style-name="incipit-spoken"><text:span text:style-name="T1">“Holy God, Holy Mighty, Holy Immortal, have”…</text:span></text:span></text:p>
        <text:p text:style-name="P11"><text:span text:style-name="cue-strong"><text:span text:style-name="T1">Troparia: </text:span></text:span><text:tab/><text:tab/><text:span text:style-name="src-sung"><text:span text:style-name="T1">[Orolog.,p.20</text:span></text:span><text:span text:style-name="src-sung"><text:span text:style-name="T11">2</text:span></text:span><text:span text:style-name="src-sung"><text:span text:style-name="T1">]</text:span></text:span><text:span text:style-name="T1"> <text:s text:c="3"/></text:span><text:span text:style-name="var-field"><text:span text:style-name="T1">3x</text:span></text:span><text:tab/><text:span text:style-name="incipit-sung"><text:span text:style-name="T12">“O Theotokos and Virgin, rejoice, O Mary full of”…</text:span></text:span></text:p>
        <text:p text:style-name="P12"><text:span text:style-name="T1">⮡</text:span><text:tab/><text:tab/><text:span text:style-name="T1"> <text:s/></text:span><text:span text:style-name="counter-strong"><text:span text:style-name="T1">3x</text:span></text:span><text:tab/><text:span text:style-name="incipit-sung"><text:span text:style-name="T1">“Blessed be the name of the Lord from”…</text:span></text:span></text:p>
        <text:p text:style-name="Standard"><text:span text:style-name="cue-strong"><text:span text:style-name="T1">Ps 33:1-10</text:span></text:span><text:tab/><text:tab/><text:tab/><text:span text:style-name="T1">⮡</text:span><text:tab/><text:tab/><text:tab/><text:span text:style-name="incipit-sung"><text:span text:style-name="T1">“I will bless the Lord at all times, His praise”…</text:span></text:span></text:p>
        <text:p text:style-name="Standard"/>
        <text:h text:style-name="P5" text:outline-level="2">MATINS</text:h>
        <text:p text:style-name="Standard"><text:span text:style-name="T1">6 Psalms @nave</text:span><text:tab/><text:span text:style-name="src-spoken"><text:span text:style-name="T1">[Vigil bk <text:s/>p.40]</text:span></text:span><text:tab/><text:tab/><text:span text:style-name="incipit-spoken"><text:span text:style-name="T1">“Glory to God in the highest, and on earth peace,”…</text:span></text:span></text:p>
        <text:p text:style-name="P4">Great Ektenia</text:p>
        <text:p text:style-name="Standard"/>
        <text:p text:style-name="Standard"><text:span text:style-name="src-sung"><text:span text:style-name="T4">“God is the Lord”…</text:span></text:span><text:tab/><text:span text:style-name="src-sung"><text:span text:style-name="T1">[Orolog.,p.55]</text:span></text:span></text:p>
        <text:p text:style-name="Standard"><text:span text:style-name="cue-strong">Troparia:</text:span> <text:tab/><text:tab/><text:span text:style-name="src-sung">[Oktoich.,T.</text:span><text:span text:style-name="src-tone-sung"><text:span text:style-name="T6">II</text:span></text:span><text:span text:style-name="src-sung">]</text:span><text:tab/> <text:span text:style-name="counter-strong"><text:span text:style-name="T12">2x</text:span></text:span><text:tab/><text:span text:style-name="incipit-sung">“When Thou didst descend unto death, O Life”…</text:span></text:p>
        <text:p text:style-name="P13"><text:span text:style-name="cue-doxology-sung"><text:s text:c="4"/>“Glory”…</text:span> <text:tab/><text:tab/><text:span text:style-name="src-sung"><text:span text:style-name="T1">[</text:span></text:span><text:span text:style-name="src-sung"><text:span text:style-name="T13">Minai</text:span></text:span><text:span text:style-name="src-sung"><text:span text:style-name="T1">.,T.</text:span></text:span><text:span text:style-name="var-src-tone">IV</text:span><text:span text:style-name="src-sung"><text:span text:style-name="T1">]</text:span></text:span><text:tab/> <text:span text:style-name="counter-strong"><text:span text:style-name="T12">1x</text:span></text:span> <text:tab/><text:span text:style-name="var-incipit-sung">“Through true recruitment didst thou become”…</text:span></text:p>
        <text:p text:style-name="P14"><text:span text:style-name="cue-doxology-sung"><text:s text:c="4"/>“Now”…</text:span><text:span text:style-name="src-sung"><text:span text:style-name="T1">Theotok.</text:span></text:span><text:tab/><text:span text:style-name="src-sung">[Oktoich.,T.</text:span><text:span text:style-name="var-src-tone"><text:span text:style-name="T14">IV</text:span></text:span><text:span text:style-name="src-sung">]</text:span> <text:tab/><text:tab/><text:span text:style-name="var-incipit-sung">“The mystery hidden from before the ages”…</text:span></text:p>
        <text:p text:style-name="Standard"/>
        <text:p text:style-name="P15"><text:span text:style-name="T1"><text:s text:c="2"/></text:span><text:span text:style-name="counter-strong"><text:span text:style-name="T1">3x</text:span></text:span><text:tab/><text:span text:style-name="incipit-sung"><text:span text:style-name="T1">“Lord have mercy”</text:span></text:span><text:span text:style-name="T1">;</text:span><text:tab/><text:span text:style-name="cue-doxology-sung"><text:span text:style-name="T1">“Glory”…</text:span></text:span><text:span text:style-name="cue-doxology-spoken"><text:span text:style-name="T1">“Now”…</text:span></text:span></text:p>
        <text:p text:style-name="Standard"><text:span text:style-name="cue-strong"><text:span text:style-name="T15">1</text:span></text:span><text:span text:style-name="cue-strong"><text:span text:style-name="T16">st</text:span></text:span><text:span text:style-name="cue-strong"><text:span text:style-name="T15"> chant/Psaltiri</text:span></text:span><text:tab/><text:span text:style-name="src-spoken">[Vigil bk p.60]</text:span> <text:tab/><text:tab/><text:span text:style-name="incipit-spoken">“In the Lord have I hoped; how will ye say </text:span><text:span text:style-name="incipit-spoken"><text:span text:style-name="T8">to my</text:span></text:span><text:span text:style-name="incipit-spoken">”…</text:span></text:p>
        <text:p text:style-name="P16">Little Ektenia</text:p>
        <text:p text:style-name="P17"><text:span text:style-name="cue-strong"><text:span text:style-name="T15">Sess. hymns:</text:span></text:span><text:tab/><text:span text:style-name="src-spoken">[Oktoich.,T.</text:span><text:span text:style-name="src-tone-spoken">II</text:span><text:span text:style-name="src-spoken">]</text:span> <text:tab/><text:tab/><text:span text:style-name="incipit-spoken">“The noble Joseph, taking Thine all-pure bo</text:span><text:span text:style-name="incipit-spoken"><text:span text:style-name="T8">dy</text:span></text:span><text:span text:style-name="incipit-spoken">”…</text:span></text:p>
        <text:p text:style-name="Standard"/>
        <text:p text:style-name="P18"><text:span text:style-name="T1"><text:s text:c="2"/></text:span><text:span text:style-name="counter-strong"><text:span text:style-name="T1">3x</text:span></text:span><text:tab/><text:span text:style-name="incipit-sung"><text:span text:style-name="T1">“Lord have mercy”</text:span></text:span><text:span text:style-name="T1">;</text:span><text:tab/><text:span text:style-name="cue-doxology-sung"><text:span text:style-name="T1">“Glory”…</text:span></text:span><text:span text:style-name="cue-doxology-spoken"><text:span text:style-name="T1">“Now”…</text:span></text:span></text:p>
        <text:p text:style-name="Standard"><text:span text:style-name="cue-strong"><text:span text:style-name="T15">2</text:span></text:span><text:span text:style-name="cue-strong"><text:span text:style-name="T16">nd</text:span></text:span><text:span text:style-name="cue-strong"><text:span text:style-name="T15"> chant/Psaltiri</text:span></text:span><text:tab/><text:span text:style-name="src-spoken">[Vigil bk p.71]</text:span> <text:tab/><text:tab/><text:span text:style-name="incipit-spoken">“For who is god, save the Lord? And who is </text:span><text:span text:style-name="incipit-spoken"><text:span text:style-name="T8">God,</text:span></text:span><text:span text:style-name="incipit-spoken">”…</text:span></text:p>
        <text:p text:style-name="P16">Little Ektenia</text:p>
        <text:p text:style-name="P17"><text:span text:style-name="cue-strong"><text:span text:style-name="T15">Sess. hymns:</text:span></text:span><text:tab/><text:span text:style-name="src-spoken">[Oktoich.,T.</text:span><text:span text:style-name="src-tone-spoken">II</text:span><text:span text:style-name="src-spoken">]</text:span> <text:tab/><text:tab/><text:span text:style-name="incipit-spoken">“Without hindering the Jews from sealing th</text:span><text:span text:style-name="incipit-spoken"><text:span text:style-name="T8">e</text:span></text:span><text:span text:style-name="incipit-spoken">”…</text:span></text:p>
        <text:p text:style-name="Standard"/>
        <text:p text:style-name="P19"><text:span text:style-name="cue-strong"><text:span text:style-name="T12">Psalm 118</text:span></text:span><text:tab/><text:tab/><text:span text:style-name="src-sung"><text:span text:style-name="T1">[Orolog.,p.</text:span></text:span><text:span text:style-name="src-sung"><text:span text:style-name="T17">61</text:span></text:span><text:span text:style-name="src-sung"><text:span text:style-name="T1">]</text:span></text:span><text:tab/><text:tab/><text:span text:style-name="incipit-sung"><text:span text:style-name="T1">“Blessed are the blameless in the way who”…</text:span></text:span></text:p>
        <text:p text:style-name="P20"><text:span text:style-name="cue-strong"><text:span text:style-name="T12">Evlogitaria</text:span></text:span><text:tab/><text:tab/><text:tab/><text:tab/>⮡<text:tab/><text:tab/><text:span text:style-name="incipit-sung"><text:span text:style-name="T12">“Blessed art Thou O Lord, teach me Thy”…</text:span></text:span></text:p>
        <text:p text:style-name="Standard"/>
        <text:p text:style-name="P4">Little Ektenia</text:p>
        <text:p text:style-name="Standard"><text:span text:style-name="cue-strong"><text:span text:style-name="T15">Ypakoi</text:span></text:span> <text:tab/><text:tab/><text:tab/><text:span text:style-name="src-spoken">[Oktoich.,T.</text:span><text:span text:style-name="src-tone-spoken">II</text:span><text:span text:style-name="src-spoken">]</text:span> <text:tab/><text:tab/><text:span text:style-name="incipit-spoken">“The women who after Thy passion went to Th</text:span><text:span text:style-name="incipit-spoken"><text:span text:style-name="T8">y</text:span></text:span><text:span text:style-name="incipit-spoken">”…</text:span></text:p>
        <text:p text:style-name="P20"><text:span text:style-name="src-sung"><text:span text:style-name="T1">Hymns/Ascents:1</text:span></text:span><text:span text:style-name="src-sung"><text:span text:style-name="T18">st</text:span></text:span><text:span text:style-name="src-sung"><text:span text:style-name="T19"> </text:span></text:span><text:span text:style-name="src-sung"><text:span text:style-name="T1">antif.</text:span></text:span><text:span text:style-name="cue-strong"> </text:span><text:tab/><text:tab/>⮡<text:tab/><text:tab/><text:span text:style-name="incipit-sung">“I cast the eyes of my heart toward Thee”…</text:span></text:p>
        <text:p text:style-name="Standard"><text:span text:style-name="cue-strong">Prokeimen.</text:span> <text:tab/><text:tab/><text:tab/><text:tab/>⮡ <text:tab/><text:tab/><text:span text:style-name="incipit-sung">“Arouse Thyself O Lord my God in the”…</text:span></text:p>
        <text:p text:style-name="P21"><text:span text:style-name="T1">⮡</text:span><text:tab/><text:tab/><text:span text:style-name="incipit-sung"><text:span text:style-name="T1">“Let every breath praise the Lord”</text:span></text:span></text:p>
        <text:p text:style-name="P22"><text:span text:style-name="cue-strong"><text:span text:style-name="T15">Matins Gospel </text:span></text:span><text:span text:style-name="var-src-tone-spoken"><text:span text:style-name="T2">III</text:span></text:span><text:tab/> <text:span text:style-name="src-spoken">[</text:span><text:span text:style-name="src-spoken"><text:span text:style-name="T3">Mk 16:9-20 (§71)</text:span></text:span><text:span text:style-name="src-spoken">]</text:span> <text:tab/><text:span text:style-name="var-incipit-spoken">“At that time, when Jesus was risen early the”…</text:span></text:p>
        <text:p text:style-name="Standard"/>
        <text:p text:style-name="Standard"><text:span text:style-name="src-sung"><text:span text:style-name="T20">Resurr. hymn</text:span></text:span><text:tab/><text:span text:style-name="src-sung"><text:span text:style-name="T20"> <text:s/></text:span></text:span><text:span text:style-name="src-sung"><text:span text:style-name="T1">[Orolog.,p.64,T.</text:span></text:span><text:span text:style-name="src-tone-sung"><text:span text:style-name="T1">VI</text:span></text:span><text:span text:style-name="src-sung"><text:span text:style-name="T1">]</text:span></text:span><text:tab/><text:tab/><text:span text:style-name="incipit-sung"><text:span text:style-name="T1">“Having beheld the resurrection of Christ, let”…</text:span></text:span></text:p>
        <text:p text:style-name="Standard"><text:span text:style-name="T1">Psalm 50</text:span><text:tab/><text:tab/><text:span text:style-name="src-spoken"><text:span text:style-name="T1">[Vigil bk p.108]</text:span></text:span><text:tab/><text:tab/><text:span text:style-name="incipit-spoken"><text:span text:style-name="T1">“Have mercy on me O God, according to Thy”…</text:span></text:span></text:p>
        <text:p text:style-name="P23"><text:span text:style-name="cue-doxology-sung"><text:span text:style-name="T1">“Glory”…</text:span></text:span><text:tab/><text:span text:style-name="src-sung"><text:span text:style-name="T1">[Orolog.,p.65]</text:span></text:span><text:tab/><text:tab/><text:span text:style-name="incipit-sung"><text:span text:style-name="T1">“Through the prayers of the apostles, O”…</text:span></text:span></text:p>
        <text:p text:style-name="P23"><text:span text:style-name="cue-doxology-sung"><text:span text:style-name="T1">“Now”…</text:span></text:span><text:tab/><text:tab/><text:tab/><text:span text:style-name="T1">⮡</text:span><text:tab/><text:tab/><text:span text:style-name="incipit-sung"><text:span text:style-name="T1">“Through the prayers of the Theotokos, O”…</text:span></text:span></text:p>
        <text:p text:style-name="P23"><text:span text:style-name="incipit-sung"><text:span text:style-name="T1">“Have mercy on me”…</text:span></text:span><text:span text:style-name="T1">;</text:span><text:tab/><text:tab/><text:span text:style-name="incipit-sung"><text:span text:style-name="T1">“Jesus having risen from the grave as He”…</text:span></text:span></text:p>
        <text:p text:style-name="Standard"><text:span text:style-name="incipit-spoken"><text:span text:style-name="T1">“Save, O God, Thy people”…</text:span></text:span><text:span text:style-name="incipit-sung"><text:span text:style-name="T1">;</text:span></text:span><text:tab/><text:tab/><text:span text:style-name="counter-strong"><text:span text:style-name="T1">12x</text:span></text:span><text:tab/><text:span text:style-name="incipit-sung"><text:span text:style-name="T1">“Lord have mercy”</text:span></text:span></text:p>
        <text:p text:style-name="Standard"/>
        <text:p text:style-name="Standard"><text:span text:style-name="cue-strong"><text:span text:style-name="T1">Kanon</text:span></text:span></text:p>
        <text:p text:style-name="Standard"><text:span text:style-name="cue-strong">Resurr. irmoi:</text:span><text:tab/><text:span text:style-name="src-sung">[Oktoich.,T.</text:span><text:span text:style-name="src-tone-sung"><text:span text:style-name="T6">II</text:span></text:span><text:span text:style-name="src-sung">]</text:span> <text:tab/><text:tab/><text:span text:style-name="incipit-sung">“In the deep of old, the infinite power”…</text:span></text:p>
        <text:p text:style-name="P24">6 total</text:p>
        <text:p text:style-name="P17"><text:span text:style-name="T9">1</text:span><text:tab/><text:span text:style-name="T1">Resurrection</text:span><text:tab/><text:span text:style-name="src-spoken"><text:span text:style-name="T1">[Oktoich.]</text:span></text:span><text:tab/><text:tab/><text:span text:style-name="incipit-spoken"><text:span text:style-name="T1">“Glory to Thy Holy Resurrection, O Lord”</text:span></text:span></text:p>
        <text:p text:style-name="P17"><text:span text:style-name="T9">1</text:span><text:span text:style-name="T1"> </text:span><text:tab/><text:span text:style-name="T1">Cross/Resurr.</text:span><text:tab/><text:span text:style-name="T1">⮡</text:span><text:tab/><text:tab/><text:span text:style-name="incipit-spoken"><text:span text:style-name="T12">“Glory to Thy precious Cross&amp; Resurrection, O Lord”</text:span></text:span></text:p>
        <text:p text:style-name="P17"><text:span text:style-name="T9">1</text:span><text:tab/><text:span text:style-name="T1">Theotokos</text:span><text:tab/><text:tab/><text:span text:style-name="T1">⮡</text:span><text:tab/><text:tab/><text:span text:style-name="incipit-spoken"><text:span text:style-name="T1">“Most Holy Theotokos, save us”</text:span></text:span></text:p>
        <text:p text:style-name="P25">3<text:tab/><text:span text:style-name="T21">Greatmartyr</text:span> <text:tab/><text:span text:style-name="src-spoken">[Minai.]</text:span> <text:tab/><text:tab/><text:span text:style-name="incipit-spoken"><text:span text:style-name="T1">“</text:span></text:span><text:span text:style-name="var-incipit-spoken">Holy great martyr Theodore</text:span><text:span text:style-name="incipit-spoken"><text:span text:style-name="T1">, pray to God for us”</text:span></text:span></text:p>
        <text:p text:style-name="Standard"/>
        <text:p text:style-name="P26"><text:soft-page-break/><text:span text:style-name="T1">Before last tropar.:</text:span><text:tab/><text:span text:style-name="cue-doxology-spoken"><text:span text:style-name="T1">“Glory”…“Now”…</text:span></text:span></text:p>
        <text:p text:style-name="P17"><text:span text:style-name="T1">on Ode </text:span><text:span text:style-name="src-tone-spoken"><text:span text:style-name="T1">VIII</text:span></text:span><text:span text:style-name="T1">:</text:span><text:tab/><text:span text:style-name="T1">Bef./last tropar.:</text:span><text:tab/><text:span text:style-name="incipit-spoken"><text:span text:style-name="T1">“Let us bless Father, Son, and Holy Spirit, the Lord,</text:span></text:span><text:tab/><text:tab/><text:tab/><text:tab/><text:tab/><text:tab/><text:tab/><text:span text:style-name="incipit-spoken"><text:span text:style-name="T1">both now and ever and unto the ages of ages”…</text:span></text:span></text:p>
        <text:p text:style-name="P27"><text:span text:style-name="cue-strong"><text:span text:style-name="T12">Katavasia</text:span></text:span><text:span text:style-name="cue-strong"><text:span text:style-name="T22">e</text:span></text:span><text:span text:style-name="cue-strong"><text:span text:style-name="T12">:</text:span></text:span><text:tab/><text:tab/><text:span text:style-name="src-sung"><text:span text:style-name="T1">[MΘ,T.</text:span></text:span><text:span text:style-name="src-tone-sung"><text:span text:style-name="T6">IV</text:span></text:span><text:span text:style-name="src-sung"><text:span text:style-name="T11">]</text:span></text:span><text:tab/><text:tab/><text:tab/><text:span text:style-name="incipit-sung"><text:span text:style-name="T1">“I shall open my mouth and it will be filled”…</text:span></text:span></text:p>
        <text:p text:style-name="Standard"/>
        <text:p text:style-name="Standard"><text:span text:style-name="T1">aft. Ode </text:span><text:span text:style-name="src-tone-spoken"><text:span text:style-name="T1">III</text:span></text:span><text:span text:style-name="T1">:</text:span></text:p>
        <text:p text:style-name="P16">Little Ektenia</text:p>
        <text:p text:style-name="P7"><text:span text:style-name="cue-strong">Kontak.</text:span><text:tab/><text:span text:style-name="src-sung">[</text:span><text:span text:style-name="src-sung"><text:span text:style-name="T23">Minai</text:span></text:span><text:span text:style-name="src-sung">.,</text:span><text:span text:style-name="src-sung"><text:span text:style-name="T24">aft. Ode </text:span></text:span><text:span text:style-name="src-tone-sung"><text:span text:style-name="T6">VI</text:span></text:span><text:span text:style-name="src-sung">,T.</text:span><text:span text:style-name="var-src-tone">II</text:span><text:span text:style-name="src-sung">]</text:span><text:tab/><text:span text:style-name="var-incipit-sung">“Arrayed in faith with manliness of soul, </text:span><text:span text:style-name="var-incipit-sung"><text:span text:style-name="T25">and</text:span></text:span><text:span text:style-name="var-incipit-sung">”…</text:span></text:p>
        <text:p text:style-name="P28"><text:span text:style-name="src-spoken">+ Ichos</text:span> <text:tab/><text:tab/><text:tab/><text:span text:style-name="var-incipit-spoken">“Come, all ye faithful, and with wreaths of”…</text:span></text:p>
        <text:p text:style-name="P7"><text:span text:style-name="cue-strong"><text:span text:style-name="T15">Sess. hymn</text:span></text:span><text:span text:style-name="cue-strong"> </text:span><text:tab/>⮡<text:span text:style-name="src-spoken"><text:span text:style-name="T1">[</text:span></text:span><text:span text:style-name="src-spoken"><text:span text:style-name="T26">aft. Ode </text:span></text:span><text:span text:style-name="src-tone-spoken">III</text:span><text:span text:style-name="src-spoken"><text:span text:style-name="T1">,T.</text:span></text:span><text:span text:style-name="var-src-tone-spoken"><text:span text:style-name="T2">VIII</text:span></text:span><text:span text:style-name="src-spoken"><text:span text:style-name="T1">]</text:span></text:span><text:tab/><text:span text:style-name="var-incipit-spoken">“Having put on the armor of God and destroyed”…</text:span></text:p>
        <text:p text:style-name="P9"><text:span text:style-name="cue-doxology-spoken"><text:s text:c="4"/>“Glory”…“Now”…</text:span><text:tab/>⮡ <text:tab/><text:tab/><text:tab/><text:tab/><text:span text:style-name="var-incipit-spoken">“Having fallen into the subtle temptations of”…</text:span></text:p>
        <text:p text:style-name="Standard"/>
        <text:p text:style-name="Standard"><text:span text:style-name="T1">aft. Ode </text:span><text:span text:style-name="src-tone-spoken"><text:span text:style-name="T1">VI</text:span></text:span><text:span text:style-name="T1">:</text:span></text:p>
        <text:p text:style-name="P16">Little Ektenia</text:p>
        <text:p text:style-name="P17"><text:span text:style-name="cue-strong">Kontak.</text:span> <text:tab/><text:tab/><text:span text:style-name="src-sung">[Oktoich.,T.</text:span><text:span text:style-name="src-tone-sung"><text:span text:style-name="T6">II</text:span></text:span><text:span text:style-name="src-sung">]</text:span> <text:tab/><text:tab/><text:span text:style-name="incipit-sung">“Thou didst arise from the tomb, O all-”…</text:span></text:p>
        <text:p text:style-name="P29"><text:span text:style-name="src-spoken">+ Ichos</text:span> <text:tab/><text:tab/><text:tab/><text:span text:style-name="incipit-spoken">“Thou art the light of those in darkness; T</text:span><text:span text:style-name="incipit-spoken"><text:span text:style-name="T8">hou art</text:span></text:span><text:span text:style-name="incipit-spoken">”…</text:span></text:p>
        <text:p text:style-name="P9"><text:span text:style-name="T1">aft. Ode </text:span><text:span text:style-name="src-tone-spoken"><text:span text:style-name="T1">VIII</text:span></text:span><text:span text:style-name="T1">:</text:span></text:p>
        <text:p text:style-name="P17"><text:span text:style-name="cue-strong"><text:span text:style-name="T1">Magnifikat</text:span></text:span><text:tab/><text:span text:style-name="src-sung"><text:span text:style-name="T1">[Orolog.,p.68]</text:span></text:span><text:tab/><text:tab/><text:span text:style-name="incipit-sung"><text:span text:style-name="T1">“My soul doth magnify the Lord, and my spirit”…</text:span></text:span></text:p>
        <text:p text:style-name="Standard"/>
        <text:p text:style-name="Standard"><text:span text:style-name="T1">aft. Ode </text:span><text:span text:style-name="src-tone-spoken"><text:span text:style-name="T1">IX</text:span></text:span><text:span text:style-name="T1">:</text:span></text:p>
        <text:p text:style-name="P17"><text:span text:style-name="T1">Little Ektenia; </text:span><text:tab/><text:tab/><text:tab/><text:span text:style-name="T1"> <text:s/></text:span><text:span text:style-name="counter-strong"><text:span text:style-name="T1">3x</text:span></text:span><text:tab/><text:span text:style-name="incipit-sung"><text:span text:style-name="T1">“Holy is the Lord, our God”</text:span></text:span></text:p>
        <text:p text:style-name="P17"><text:span text:style-name="cue-strong"><text:span text:style-name="T15">Exaposteilaria:</text:span></text:span><text:span text:style-name="T1"> Matins Gospel </text:span><text:span text:style-name="T27">III</text:span></text:p>
        <text:p text:style-name="P29"><text:span text:style-name="src-spoken">[Oktoich.]</text:span> <text:tab/><text:tab/><text:tab/><text:span text:style-name="var-incipit-spoken"><text:span text:style-name="T9">“Let no one fail to believe that Christ is risen, for”…</text:span></text:span></text:p>
        <text:p text:style-name="P30"><text:span text:style-name="cue-doxology-spoken">“Glory”…</text:span> <text:tab/><text:span text:style-name="src-spoken">[Minai.]</text:span> <text:tab/><text:tab/><text:tab/><text:span text:style-name="var-incipit-spoken">“Adorned with comeliness, a right mighty”…</text:span></text:p>
        <text:p text:style-name="P23"><text:span text:style-name="cue-doxology-spoken">“Now”…</text:span> <text:tab/><text:span text:style-name="src-spoken">[Oktoich.]</text:span> <text:tab/><text:tab/><text:tab/><text:span text:style-name="var-incipit-spoken"><text:span text:style-name="T9">“O Sun Who hast shone forth today from the”…</text:span></text:span></text:p>
        <text:p text:style-name="Standard"/>
        <text:p text:style-name="P31"><text:span text:style-name="cue-strong">Lauds / Praises</text:span> <text:tab/><text:span text:style-name="src-sung">[Orolog.,p.75]</text:span> <text:tab/><text:tab/><text:span text:style-name="T28">8+2 total</text:span></text:p>
        <text:p text:style-name="P32"><text:span text:style-name="var-field">7</text:span> <text:tab/><text:tab/><text:tab/><text:span text:style-name="src-sung">[Oktoich.,T.</text:span><text:span text:style-name="src-tone-sung"><text:span text:style-name="T6">II</text:span></text:span><text:span text:style-name="src-sung">]</text:span> <text:tab/><text:tab/><text:span text:style-name="incipit-spoken">“Every breath, all creation, glorifieth The</text:span><text:span text:style-name="incipit-spoken"><text:span text:style-name="T8">e, O</text:span></text:span><text:span text:style-name="incipit-spoken">”…</text:span></text:p>
        <text:p text:style-name="P33"><text:span text:style-name="var-field"><text:span text:style-name="T29">1</text:span></text:span><text:tab/><text:tab/><text:tab/><text:span text:style-name="T12">⮡</text:span><text:span text:style-name="src-spoken">Doxastik.</text:span><text:tab/><text:tab/><text:span text:style-name="var-incipit-spoken"><text:span text:style-name="T9">“O ye truly iniquitous ones who sealed the stone,”…</text:span></text:span></text:p>
        <text:p text:style-name="P34"><text:span text:style-name="cue-doxology-sung">“Glory”…</text:span> <text:tab/><text:span text:style-name="src-sung">[Evang. Stichiron </text:span><text:span text:style-name="var-src-tone"><text:span text:style-name="T24">III</text:span></text:span><text:span text:style-name="src-sung">]</text:span><text:tab/><text:span text:style-name="var-incipit-sung"><text:span text:style-name="T9">“When Mary Magdalene announced the”…</text:span></text:span></text:p>
        <text:p text:style-name="P35"><text:span text:style-name="cue-doxology-sung"><text:span text:style-name="T1">“Now”…</text:span></text:span><text:tab/><text:tab/><text:span text:style-name="src-sung"><text:span text:style-name="T1">[Orolog.,p.</text:span></text:span><text:span text:style-name="src-sung"><text:span text:style-name="T30">7</text:span></text:span><text:span text:style-name="src-sung"><text:span text:style-name="T31">7</text:span></text:span><text:span text:style-name="src-sung"><text:span text:style-name="T1">] </text:span></text:span><text:tab/><text:tab/><text:span text:style-name="incipit-sung"><text:span text:style-name="T1">“Most blessed art thou, O Virgin Theotokos, for”…</text:span></text:span></text:p>
        <text:p text:style-name="Standard"><text:span text:style-name="src-sung"><text:span text:style-name="T1">Great Doxologia</text:span></text:span><text:tab/><text:span text:style-name="T1">⮡</text:span><text:tab/><text:tab/><text:tab/><text:tab/><text:span text:style-name="incipit-sung"><text:span text:style-name="T1">“Glory to God in the highest, and on earth”…</text:span></text:span></text:p>
        <text:p text:style-name="P36"><text:span text:style-name="cue-strong">Resurr. tropar.</text:span><text:tab/>⮡<text:span text:style-name="src-sung">[Week of T.</text:span><text:span text:style-name="src-tone-sung"><text:span text:style-name="T6">II</text:span></text:span><text:span text:style-name="src-sung">]</text:span><text:tab/><text:span text:style-name="incipit-sung">“Having risen from the tomb and having burst”…</text:span></text:p>
        <text:p text:style-name="P36"><text:span text:style-name="T1">Two ektenia;</text:span><text:tab/><text:tab/><text:span text:style-name="T1">dismissal;</text:span><text:tab/><text:tab/><text:span text:style-name="incipit-sung"><text:span text:style-name="T1">“Our great lord and father, his Holiness”…</text:span></text:span></text:p>
        <text:h text:style-name="P37" text:outline-level="2"><text:span text:style-name="T1">HOURS</text:span></text:h>
        <text:p text:style-name="Standard"><text:span text:style-name="cue-strong"><text:span text:style-name="T1">1</text:span></text:span><text:span text:style-name="cue-strong"><text:span text:style-name="T32">st</text:span></text:span><text:span text:style-name="cue-strong"><text:span text:style-name="T1"> / 3</text:span></text:span><text:span text:style-name="cue-strong"><text:span text:style-name="T32">rd</text:span></text:span><text:span text:style-name="cue-strong"><text:span text:style-name="T1"> / 6</text:span></text:span><text:span text:style-name="cue-strong"><text:span text:style-name="T32">th</text:span></text:span></text:p>
        <text:p text:style-name="P17"><text:span text:style-name="cue-strong"><text:span text:style-name="T15">Troparia:</text:span></text:span><text:tab/><text:span text:style-name="src-spoken">[Oktoich.]</text:span> <text:tab/><text:tab/><text:tab/><text:span text:style-name="incipit-spoken">“When Thou didst descend unto death, O Life”…</text:span></text:p>
        <text:p text:style-name="P29"><text:span text:style-name="src-spoken"><text:span text:style-name="T1">[Minai.]</text:span></text:span><text:tab/><text:tab/><text:tab/><text:span text:style-name="var-incipit-spoken"><text:span text:style-name="T9">“Through true recruitment didst thou become a”…</text:span></text:span></text:p>
        <text:p text:style-name="P17"><text:span text:style-name="cue-strong"><text:span text:style-name="T15">Kontak. </text:span></text:span><text:tab/><text:tab/><text:span text:style-name="src-spoken">[Oktoich.]</text:span> <text:tab/><text:tab/><text:tab/><text:span text:style-name="incipit-spoken">“Thou didst rise from the tomb, O Omnipoten</text:span><text:span text:style-name="incipit-spoken"><text:span text:style-name="T8">t</text:span></text:span><text:span text:style-name="incipit-spoken">”…</text:span></text:p>
        <text:p text:style-name="Standard"/>
        <text:h text:style-name="P38" text:outline-level="2">LITURGY OF ST JOHN CHRYSOS-TOMOS</text:h>
        <text:p text:style-name="P31"><text:span text:style-name="cue-strong">Beatitudes: </text:span><text:tab/><text:tab/><text:span text:style-name="src-sung">[Orolog.,p.136]</text:span><text:tab/><text:tab/><text:span text:style-name="T28">10 total</text:span></text:p>
        <text:p text:style-name="P39"><text:span text:style-name="var-field">6</text:span> <text:tab/><text:tab/><text:tab/><text:span text:style-name="src-sung">[Oktoich.,T.</text:span><text:span text:style-name="src-tone-sung"><text:span text:style-name="T6">II</text:span></text:span><text:span text:style-name="src-sung">]</text:span> <text:tab/><text:tab/><text:span text:style-name="incipit-spoken">“We offer Thee the cry of the thief, and </text:span><text:span text:style-name="incipit-spoken"><text:span text:style-name="T21">we pray:</text:span></text:span><text:span text:style-name="incipit-spoken">”…</text:span></text:p>
        <text:p text:style-name="P40"><text:span text:style-name="var-field"><text:span text:style-name="T33">4</text:span></text:span><text:tab/><text:tab/><text:tab/><text:span text:style-name="src-sung">[</text:span><text:span text:style-name="src-sung"><text:span text:style-name="T23">Minai</text:span></text:span><text:span text:style-name="src-sung">.,</text:span><text:span text:style-name="src-sung"><text:span text:style-name="T34">Ode </text:span></text:span><text:span text:style-name="var-src-tone">III</text:span><text:span text:style-name="src-sung">]<text:tab/></text:span><text:tab/><text:span text:style-name="var-incipit-spoken"><text:span text:style-name="T9">“Like a mighty commander thou didst vanquish”…</text:span></text:span></text:p>
        <text:p text:style-name="Standard"/>
        <text:p text:style-name="Standard"><text:span text:style-name="cue-strong">Troparia:</text:span> <text:tab/><text:tab/><text:span text:style-name="src-sung">[Oktoich.,T.</text:span><text:span text:style-name="src-tone-sung"><text:span text:style-name="T6">II</text:span></text:span><text:span text:style-name="src-sung">]</text:span> <text:tab/><text:tab/><text:span text:style-name="incipit-sung">“When Thou didst descend unto death, O Life”…</text:span></text:p>
        <text:p text:style-name="P41"><text:span text:style-name="src-sung"><text:span text:style-name="T1">[</text:span></text:span><text:span text:style-name="src-sung"><text:span text:style-name="T6">Temple</text:span></text:span><text:span text:style-name="src-sung"><text:span text:style-name="T1">,T.</text:span></text:span><text:span text:style-name="src-tone-sung"><text:span text:style-name="T1">I</text:span></text:span><text:span text:style-name="src-tone-sung"><text:span text:style-name="T6">V</text:span></text:span><text:span text:style-name="src-sung"><text:span text:style-name="T1">]</text:span></text:span><text:tab/><text:tab/><text:span text:style-name="incipit-sung"><text:span text:style-name="T12">“From thy youth didst thou love Christ, O”…</text:span></text:span></text:p>
        <text:p text:style-name="P42"><text:span text:style-name="src-sung">[</text:span><text:span text:style-name="src-sung"><text:span text:style-name="T23">Minai</text:span></text:span><text:span text:style-name="src-sung">.,T.</text:span><text:span text:style-name="var-src-tone">IV</text:span><text:span text:style-name="src-sung">]</text:span><text:tab/><text:tab/><text:span text:style-name="var-incipit-sung"><text:span text:style-name="T9">“Through true recruitment didst thou become”…</text:span></text:span></text:p>
        <text:p text:style-name="P31"><text:span text:style-name="cue-strong">Kontakia:</text:span> <text:tab/><text:tab/><text:span text:style-name="src-sung">[Oktoich.,T.</text:span><text:span text:style-name="src-tone-sung"><text:span text:style-name="T6">II</text:span></text:span><text:span text:style-name="src-sung">]</text:span> <text:tab/><text:tab/><text:span text:style-name="incipit-sung">“Thou didst rise from the tomb, O omnipoten</text:span><text:span text:style-name="incipit-sung"><text:span text:style-name="T8">t</text:span></text:span><text:span text:style-name="incipit-sung">”…</text:span></text:p>
        <text:p text:style-name="P41"><text:span text:style-name="src-sung"><text:span text:style-name="T1">[</text:span></text:span><text:span text:style-name="src-sung"><text:span text:style-name="T6">Temple</text:span></text:span><text:span text:style-name="src-sung"><text:span text:style-name="T1">,T.</text:span></text:span><text:span text:style-name="src-tone-sung"><text:span text:style-name="T6">II</text:span></text:span><text:span text:style-name="src-sung"><text:span text:style-name="T1">]</text:span></text:span><text:tab/><text:tab/><text:span text:style-name="incipit-sung"><text:span text:style-name="T12">“Having forsaken the beauty of the world and”…</text:span></text:span></text:p>
        <text:p text:style-name="P7"><text:span text:style-name="cue-doxology-sung"><text:span text:style-name="T12">“Glory”…</text:span></text:span><text:tab/><text:tab/><text:span text:style-name="src-sung">[</text:span><text:span text:style-name="src-sung"><text:span text:style-name="T23">Minai</text:span></text:span><text:span text:style-name="src-sung">.,T.</text:span><text:span text:style-name="var-src-tone">II</text:span><text:span text:style-name="src-sung">]</text:span><text:tab/><text:tab/><text:span text:style-name="var-incipit-sung"><text:span text:style-name="T9">“Arrayed in faith with manliness of soul, </text:span></text:span><text:span text:style-name="var-incipit-sung"><text:span text:style-name="T35">and</text:span></text:span><text:span text:style-name="var-incipit-sung"><text:span text:style-name="T9">”…</text:span></text:span></text:p>
        <text:p text:style-name="P17"><text:span text:style-name="cue-doxology-sung"><text:span text:style-name="T12">“Now”…</text:span></text:span><text:tab/><text:tab/><text:span text:style-name="src-sung"><text:span text:style-name="T1">[T.</text:span></text:span><text:span text:style-name="src-tone-sung"><text:span text:style-name="T1">VI</text:span></text:span><text:span text:style-name="src-sung"><text:span text:style-name="T1">]</text:span></text:span><text:tab/><text:tab/><text:tab/><text:span text:style-name="incipit-sung"><text:span text:style-name="T1">“O protection of Christians that cannot be put”…</text:span></text:span></text:p>
        <text:p text:style-name="Standard"/>
        <text:p text:style-name="P31"><text:span text:style-name="cue-strong">Prokeimena:</text:span> <text:tab/><text:span text:style-name="src-sung">[Oktoich.,T.</text:span><text:span text:style-name="src-tone-sung"><text:span text:style-name="T6">II</text:span></text:span><text:span text:style-name="src-sung">]</text:span> <text:tab/><text:tab/><text:span text:style-name="incipit-sung">“The Lord is my strength and my song, and He”…</text:span></text:p>
        <text:p text:style-name="P29"><text:span text:style-name="src-spoken">+ Stichos</text:span> <text:tab/><text:tab/><text:tab/><text:span text:style-name="incipit-spoken">“With chastisement hath the Lord chastened me,”…</text:span></text:p>
        <text:p text:style-name="P43"><text:span text:style-name="cue-strong"><text:span text:style-name="T12">2</text:span></text:span><text:span text:style-name="cue-strong"><text:span text:style-name="T36">nd</text:span></text:span><text:tab/><text:tab/><text:span text:style-name="src-spoken"><text:span text:style-name="T1">[</text:span></text:span><text:span text:style-name="src-spoken"><text:span text:style-name="T7">Minai.</text:span></text:span><text:span text:style-name="src-spoken"><text:span text:style-name="T1">,T.</text:span></text:span><text:span text:style-name="var-src-tone-spoken"><text:span text:style-name="T2">VII</text:span></text:span><text:span text:style-name="src-spoken"><text:span text:style-name="T1">]</text:span></text:span><text:tab/><text:tab/><text:span text:style-name="var-incipit-spoken"><text:span text:style-name="T9">“The righteous man shall rejoice in the Lord and”…</text:span></text:span></text:p>
        <text:p text:style-name="Standard"><text:span text:style-name="cue-strong">Alleluiaria:</text:span> <text:tab/><text:tab/><text:span text:style-name="src-spoken">[Oktoich.,T.</text:span><text:span text:style-name="src-tone-spoken">II</text:span><text:span text:style-name="src-spoken">]</text:span> <text:tab/><text:tab/><text:span text:style-name="incipit-spoken">“The Lord hear thee in the day of affliction; the”…</text:span></text:p>
        <text:p text:style-name="P29"><text:span text:style-name="src-spoken">+ Stichos</text:span> <text:tab/><text:tab/><text:tab/><text:span text:style-name="incipit-spoken">“O Lord, save the king, and hearken unto us”…</text:span></text:p>
        <text:p text:style-name="P43"><text:span text:style-name="cue-strong"><text:span text:style-name="T37">2</text:span></text:span><text:span text:style-name="cue-strong"><text:span text:style-name="T36">nd</text:span></text:span><text:tab/><text:tab/><text:span text:style-name="src-spoken"><text:span text:style-name="T1">[</text:span></text:span><text:span text:style-name="src-spoken"><text:span text:style-name="T7">Minai.</text:span></text:span><text:span text:style-name="src-spoken"><text:span text:style-name="T1">,T.</text:span></text:span><text:span text:style-name="var-src-tone-spoken"><text:span text:style-name="T2">IV</text:span></text:span><text:span text:style-name="src-spoken"><text:span text:style-name="T1">]</text:span></text:span><text:tab/><text:tab/><text:span text:style-name="var-incipit-spoken"><text:span text:style-name="T9">“The righteous man shall flourish like a palm”…</text:span></text:span></text:p>
        <text:p text:style-name="Standard"/>
        <text:p text:style-name="Standard"><text:span text:style-name="cue-strong"><text:span text:style-name="T12">Communion stichoi:</text:span></text:span><text:span text:style-name="T1"> </text:span><text:tab/><text:tab/><text:tab/><text:tab/><text:span text:style-name="incipit-sung"><text:span text:style-name="T12">“Praise the Lord from the heavens, praise </text:span></text:span><text:span text:style-name="incipit-sung"><text:span text:style-name="T38">Him</text:span></text:span><text:span text:style-name="incipit-sung"><text:span text:style-name="T12">”…</text:span></text:span></text:p>
        <text:p text:style-name="P44"><text:span text:style-name="var-incipit-sung"><text:span text:style-name="T9">“In everlasting remembrance shall the”…</text:span>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SemiBold" svg:font-family="'Noto Sans SemiBold'" style:font-adornments="Italic" style:font-family-generic="swiss" style:font-pitch="variable"/>
    <style:font-face style:name="Noto Sans SemiBold1" svg:font-family="'Noto Sans SemiBold'" style:font-adornments="Regular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adornments="Italic" style:font-family-generic="swiss" style:font-pitch="variable"/>
    <style:font-face style:name="Noto Serif" svg:font-family="'Noto Serif'" style:font-family-generic="roman" style:font-pitch="variable"/>
    <style:font-face style:name="Noto Serif SemiBold" svg:font-family="'Noto Serif SemiBold'" style:font-adornments="Regular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Noto Sans" fo:font-size="8.60000038146973pt" fo:language="en" fo:country="US" style:font-name-asian="Tahoma" style:font-size-asian="8.60000038146973pt" style:language-asian="zh" style:country-asian="CN" style:font-name-complex="Tahoma" style:font-size-complex="8.60000038146973pt" style:language-complex="hi" style:country-complex="IN"/>
    </style:default-style>
    <style:default-style style:family="paragraph">
      <style:paragraph-properties fo:orphans="0" fo:widows="0" fo:hyphenation-ladder-count="no-limit" fo:hyphenation-keep="auto" loext:hyphenation-keep-type="column" loext:hyphenation-keep-line="false" style:text-autospace="ideograph-alpha" style:punctuation-wrap="hanging" style:line-break="strict" style:tab-stop-distance="0.25in" style:writing-mode="lr-tb"/>
      <style:text-properties fo:color="#000000" loext:opacity="100%" style:font-name="Noto Sans" fo:font-size="8.60000038146973pt" fo:language="en" fo:country="US" style:font-name-asian="Tahoma" style:font-size-asian="8.60000038146973pt" style:language-asian="zh" style:country-asian="CN" style:font-name-complex="Tahoma" style:font-size-complex="8.60000038146973pt" style:language-complex="hi" style:country-complex="IN" fo:hyphenate="fals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252in" style:contextual-spacing="false" fo:text-align="start" style:justify-single-word="false"/>
      <style:text-properties fo:color="#666666" loext:opacity="100%" style:font-name="Noto Sans" fo:font-family="'Noto Sans'" style:font-family-generic="swiss" style:font-pitch="variable" fo:font-size="8.60000038146973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2" style:display-name="Heading 2" style:family="paragraph" style:parent-style-name="Standard" style:class="chapter">
      <style:paragraph-properties fo:margin-left="0in" fo:margin-right="3.5201in" fo:margin-top="0.0453in" fo:margin-bottom="0.0654in" style:contextual-spacing="false" fo:text-align="center" style:justify-single-word="false" style:border-line-width="0.0083in 0.0083in 0.0165in" fo:padding="0.0098in" fo:border="2.41pt double #111111" fo:keep-with-next="always"/>
      <style:text-properties fo:color="#111111" loext:opacity="100%" style:font-name="Noto Sans SemiBold1" fo:font-family="'Noto Sans SemiBold'" style:font-style-name="Regular" style:font-family-generic="swiss" style:font-pitch="variable"/>
    </style:style>
    <style:style style:name="Heading_20_2_20_Long_20_Box" style:display-name="Heading 2 Long Box" style:family="paragraph" style:parent-style-name="Heading_20_2">
      <style:paragraph-properties fo:margin-left="0in" fo:margin-right="0.75in" fo:margin-top="0.0453in" fo:margin-bottom="0.0654in" style:contextual-spacing="false" fo:text-align="center" style:justify-single-word="false" fo:hyphenation-ladder-count="no-limit" fo:hyphenation-keep="auto" loext:hyphenation-keep-type="column" loext:hyphenation-keep-line="false" style:border-line-width="0.0083in 0.0083in 0.0165in" fo:padding="0.0098in" fo:border="2.41pt double #111111" fo:keep-with-next="always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ue-strong" style:family="text">
      <style:text-properties fo:color="#111111" loext:opacity="100%" style:font-name="Noto Sans SemiBold1" fo:font-family="'Noto Sans SemiBold'" style:font-style-name="Regular" style:font-family-generic="swiss" style:font-pitch="variable"/>
    </style:style>
    <style:style style:name="counter-strong" style:family="text">
      <style:text-properties fo:color="#111111" loext:opacity="100%" style:font-name="Noto Sans SemiBold1" fo:font-family="'Noto Sans SemiBold'" style:font-style-name="Regular" style:font-family-generic="swiss" style:font-pitch="variable" fo:font-style="normal"/>
    </style:style>
    <style:style style:name="cue-doxology-spoken" style:family="text">
      <style:text-properties fo:color="#666666" loext:opacity="100%" style:font-name="Noto Sans2" fo:font-family="'Noto Sans'" style:font-style-name="Italic" style:font-family-generic="swiss" style:font-pitch="variable" fo:font-style="italic"/>
    </style:style>
    <style:style style:name="cue-doxology-sung" style:family="text">
      <style:text-properties fo:color="#000000" loext:opacity="100%" style:font-name="Noto Sans SemiBold" fo:font-family="'Noto Sans SemiBold'" style:font-style-name="Italic" style:font-family-generic="swiss" style:font-pitch="variable" fo:font-style="italic"/>
    </style:style>
    <style:style style:name="src-sung" style:family="text">
      <style:text-properties fo:color="#000000" loext:opacity="100%" style:font-name="Noto Sans SemiBold1" fo:font-family="'Noto Sans SemiBold'" style:font-style-name="Regular" style:font-family-generic="swiss" style:font-pitch="variable" fo:font-size="7pt" fo:font-weight="600"/>
    </style:style>
    <style:style style:name="src-spoken" style:family="text">
      <style:text-properties fo:color="#666666" loext:opacity="100%" style:font-name="Noto Sans" fo:font-family="'Noto Sans'" style:font-family-generic="swiss" style:font-pitch="variable" fo:font-size="7pt"/>
    </style:style>
    <style:style style:name="src-tone-sung" style:family="text">
      <style:text-properties fo:color="#000000" loext:opacity="100%" style:font-name="Noto Serif SemiBold" fo:font-family="'Noto Serif SemiBold'" style:font-style-name="Regular" style:font-family-generic="roman" style:font-pitch="variable" fo:font-size="7pt" fo:font-weight="600"/>
    </style:style>
    <style:style style:name="src-tone-spoken" style:family="text">
      <style:text-properties fo:color="#666666" loext:opacity="100%" style:font-name="Noto Serif" fo:font-family="'Noto Serif'" style:font-family-generic="roman" style:font-pitch="variable" fo:font-size="7pt"/>
    </style:style>
    <style:style style:name="incipit-sung" style:family="text">
      <style:text-properties fo:color="#000000" loext:opacity="100%" style:font-name="Noto Sans SemiBold" fo:font-family="'Noto Sans SemiBold'" style:font-style-name="Italic" style:font-family-generic="swiss" style:font-pitch="variable" fo:font-style="italic"/>
    </style:style>
    <style:style style:name="incipit-spoken" style:family="text">
      <style:text-properties fo:color="#666666" loext:opacity="100%" style:font-name="Noto Sans2" fo:font-family="'Noto Sans'" style:font-style-name="Italic" style:font-family-generic="swiss" style:font-pitch="variable" fo:font-style="italic"/>
    </style:style>
    <style:style style:name="bullet-symbol" style:family="text"/>
    <style:style style:name="var-field" style:family="text">
      <style:text-properties fo:color="#111111" loext:opacity="100%" style:font-name="Noto Sans SemiBold1" fo:font-family="'Noto Sans SemiBold'" style:font-style-name="Regular" style:font-family-generic="swiss" style:font-pitch="variable" fo:background-color="#fff2cc"/>
    </style:style>
    <style:style style:name="var-src" style:family="text">
      <style:text-properties fo:color="#000000" loext:opacity="100%" style:font-name="Noto Sans SemiBold1" fo:font-family="'Noto Sans SemiBold'" style:font-style-name="Regular" style:font-family-generic="swiss" style:font-pitch="variable" fo:font-size="7pt" fo:font-weight="600" fo:background-color="#fff2cc"/>
    </style:style>
    <style:style style:name="var-src-tone" style:family="text">
      <style:text-properties fo:color="#000000" loext:opacity="100%" style:font-name="Noto Serif SemiBold" fo:font-family="'Noto Serif SemiBold'" style:font-style-name="Regular" style:font-family-generic="roman" style:font-pitch="variable" fo:font-size="7pt" fo:font-weight="600" fo:background-color="#fff2cc"/>
    </style:style>
    <style:style style:name="var-incipit" style:family="text">
      <style:text-properties fo:color="#666666" loext:opacity="100%" style:font-name="Noto Sans2" fo:font-family="'Noto Sans'" style:font-style-name="Italic" style:font-family-generic="swiss" style:font-pitch="variable" fo:font-style="italic" fo:background-color="#fff2cc"/>
    </style:style>
    <style:style style:name="_5f_myBold" style:display-name="_myBold" style:family="text">
      <style:text-properties fo:color="#000000" loext:opacity="100%" style:font-name="Noto Sans SemiBold1" fo:font-family="'Noto Sans SemiBold'" style:font-style-name="Regular" style:font-family-generic="swiss" style:font-pitch="variable" fo:font-size="8.60000038146973pt"/>
    </style:style>
    <style:style style:name="Bullet_5f_5f_5f_20_5f_5f_5f_Symbols" style:display-name="Bullet_5f_20_5f_Symbols" style:family="text"/>
    <style:style style:name="_5f_myQuotationItalic" style:display-name="_myQuotationItalic" style:family="text">
      <style:text-properties style:font-name="Noto Sans2" fo:font-family="'Noto Sans'" style:font-style-name="Italic" style:font-family-generic="swiss" style:font-pitch="variable" fo:font-size="8.60000038146973pt" fo:font-style="italic"/>
    </style:style>
    <style:style style:name="_5f_myQuotationBold" style:display-name="_myQuotationBold" style:family="text" style:parent-style-name="_5f_myQuotationItalic">
      <style:text-properties fo:color="#000000" loext:opacity="100%" style:font-name="Noto Sans SemiBold" fo:font-family="'Noto Sans SemiBold'" style:font-style-name="Italic" style:font-family-generic="swiss" style:font-pitch="variable" fo:font-weight="600"/>
    </style:style>
    <style:style style:name="var-incipit-sung" style:family="text">
      <style:text-properties fo:color="#000000" loext:opacity="100%" style:font-name="Noto Sans SemiBold" fo:font-family="'Noto Sans SemiBold'" style:font-style-name="Italic" style:font-family-generic="swiss" style:font-pitch="variable" fo:font-style="italic" fo:background-color="#fff2cc"/>
    </style:style>
    <style:style style:name="var-incipit-spoken" style:family="text">
      <style:text-properties fo:color="#666666" loext:opacity="100%" style:font-name="Noto Sans2" fo:font-family="'Noto Sans'" style:font-style-name="Italic" style:font-family-generic="swiss" style:font-pitch="variable" fo:font-style="italic" fo:background-color="#fff2cc"/>
    </style:style>
    <style:style style:name="var-src-sung" style:family="text">
      <style:text-properties fo:color="#000000" loext:opacity="100%" style:font-name="Noto Sans SemiBold1" fo:font-family="'Noto Sans SemiBold'" style:font-style-name="Regular" style:font-family-generic="swiss" style:font-pitch="variable" fo:font-size="7pt" fo:font-weight="600" fo:background-color="#fff2cc"/>
    </style:style>
    <style:style style:name="var-src-spoken" style:family="text">
      <style:text-properties fo:color="#666666" loext:opacity="100%" style:font-name="Noto Sans" fo:font-family="'Noto Sans'" style:font-family-generic="swiss" style:font-pitch="variable" fo:font-size="7pt" fo:background-color="#fff2cc"/>
    </style:style>
    <style:style style:name="var-src-tone-sung" style:family="text">
      <style:text-properties fo:color="#000000" loext:opacity="100%" style:font-name="Noto Serif SemiBold" fo:font-family="'Noto Serif SemiBold'" style:font-style-name="Regular" style:font-family-generic="roman" style:font-pitch="variable" fo:font-size="7pt" fo:font-weight="600" fo:background-color="#fff2cc"/>
    </style:style>
    <style:style style:name="var-src-tone-spoken" style:family="text">
      <style:text-properties fo:color="#666666" loext:opacity="100%" style:font-name="Noto Serif" fo:font-family="'Noto Serif'" style:font-family-generic="roman" style:font-pitch="variable" fo:font-size="7pt" fo:background-color="#fff2c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title>Weekly Outline 2026-06-28 Tone III St Jonah print style candidate</meta:title>
    <dc:date>2026-06-17T21:05:15.772390877</dc:date>
    <meta:editing-duration>PT9H26M21S</meta:editing-duration>
    <meta:editing-cycles>12</meta:editing-cycles>
    <meta:generator>LibreOfficeDev/26.2.4.0.0$Linux_X86_64 LibreOffice_project/d9a14b9b3eb39e1636bf69b77bc9945234bcbc5d</meta:generator>
    <meta:document-statistic meta:table-count="1" meta:image-count="0" meta:object-count="0" meta:page-count="2" meta:paragraph-count="112" meta:word-count="996" meta:character-count="6411" meta:non-whitespace-character-count="5273"/>
  </office:meta>
</office:document-meta>
</file>