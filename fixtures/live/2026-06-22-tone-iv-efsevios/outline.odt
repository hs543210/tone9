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 SemiBold" svg:font-family="'Noto Sans SemiBold'" style:font-adornments="Italic" style:font-family-generic="swiss" style:font-pitch="variable"/>
    <style:font-face style:name="Noto Sans SemiBold1" svg:font-family="'Noto Sans SemiBold'" style:font-adornments="Regular" style:font-family-generic="swiss" style:font-pitch="variable"/>
    <style:font-face style:name="Noto Sans1" svg:font-family="'Noto Sans'" style:font-family-generic="system" style:font-pitch="variable"/>
    <style:font-face style:name="Noto Sans2" svg:font-family="'Noto Sans'" style:font-adornments="Italic" style:font-family-generic="swiss" style:font-pitch="variable"/>
    <style:font-face style:name="Noto Serif" svg:font-family="'Noto Serif'" style:font-family-generic="roman" style:font-pitch="variable"/>
    <style:font-face style:name="Noto Serif SemiBold" svg:font-family="'Noto Serif SemiBold'" style:font-adornments="Regular" style:font-family-generic="roman" style:font-pitch="variable"/>
    <style:font-face style:name="OpenSymbol" svg:font-family="OpenSymbol" style:font-charset="x-symbol"/>
    <style:font-face style:name="Tahoma" svg:font-family="Tahoma" style:font-family-generic="system" style:font-pitch="variable"/>
  </office:font-face-decls>
  <office:automatic-styles>
    <style:style style:name="Table4" style:family="table" style:master-page-name="Standard">
      <style:table-properties style:width="4.75in" style:page-number="auto" table:align="left"/>
    </style:style>
    <style:style style:name="Table4.A" style:family="table-column">
      <style:table-column-properties style:column-width="1.2493in"/>
    </style:style>
    <style:style style:name="Table4.B" style:family="table-column">
      <style:table-column-properties style:column-width="2.25in"/>
    </style:style>
    <style:style style:name="Table4.C" style:family="table-column">
      <style:table-column-properties style:column-width="1.2507in"/>
    </style:style>
    <style:style style:name="Table4.A2" style:family="table-cell">
      <style:table-cell-properties style:vertical-align="middle" style:border-line-width-bottom="0.0083in 0.0083in 0.0167in" fo:padding-left="0in" fo:padding-right="0in" fo:padding-top="0in" fo:padding-bottom="0.1201in" fo:border-left="none" fo:border-right="none" fo:border-top="none" fo:border-bottom="2.4pt double #111111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paragraph-rsid="00086dd0"/>
    </style:style>
    <style:style style:name="P3" style:family="paragraph" style:parent-style-name="Standard">
      <style:paragraph-properties fo:text-align="right" style:justify-single-word="false"/>
    </style:style>
    <style:style style:name="P4" style:family="paragraph" style:parent-style-name="Standard">
      <style:text-properties fo:background-color="transparent"/>
    </style:style>
    <style:style style:name="P5" style:family="paragraph" style:parent-style-name="Heading_20_2">
      <style:text-properties fo:background-color="transparent"/>
    </style:style>
    <style:style style:name="P6" style:family="paragraph" style:parent-style-name="Standard">
      <style:paragraph-properties fo:margin-left="0.25in" fo:text-indent="0in" style:auto-text-indent="false"/>
      <style:text-properties officeooo:paragraph-rsid="0004b623"/>
    </style:style>
    <style:style style:name="P7" style:family="paragraph" style:parent-style-name="Standard">
      <style:paragraph-properties fo:margin-left="0.25in" fo:text-indent="0in" style:auto-text-indent="false"/>
      <style:text-properties officeooo:paragraph-rsid="001081f5"/>
    </style:style>
    <style:style style:name="P8" style:family="paragraph" style:parent-style-name="Standard">
      <style:paragraph-properties fo:margin-left="0in" fo:text-indent="0in" style:auto-text-indent="false"/>
      <style:text-properties officeooo:paragraph-rsid="001763c0"/>
    </style:style>
    <style:style style:name="P9" style:family="paragraph" style:parent-style-name="Standard">
      <style:paragraph-properties fo:margin-left="0in" fo:text-indent="0in" style:auto-text-indent="false"/>
    </style:style>
    <style:style style:name="P10" style:family="paragraph" style:parent-style-name="Standard">
      <style:text-properties officeooo:paragraph-rsid="00176dab"/>
    </style:style>
    <style:style style:name="P11" style:family="paragraph" style:parent-style-name="Standard">
      <style:paragraph-properties fo:margin-left="1.25in" fo:text-indent="0in" style:auto-text-indent="false"/>
    </style:style>
    <style:style style:name="P12" style:family="paragraph" style:parent-style-name="Standard">
      <style:paragraph-properties fo:margin-left="0in" fo:text-indent="0in" style:auto-text-indent="false"/>
      <style:text-properties officeooo:paragraph-rsid="001081f5"/>
    </style:style>
    <style:style style:name="P13" style:family="paragraph" style:parent-style-name="Standard">
      <style:paragraph-properties fo:margin-left="0in" fo:text-indent="0in" style:auto-text-indent="false"/>
      <style:text-properties officeooo:paragraph-rsid="000ef31a"/>
    </style:style>
    <style:style style:name="P14" style:family="paragraph" style:parent-style-name="Standard">
      <style:paragraph-properties fo:margin-left="1.75in" fo:text-indent="0in" style:auto-text-indent="false"/>
    </style:style>
    <style:style style:name="P15" style:family="paragraph" style:parent-style-name="Standard">
      <style:paragraph-properties fo:margin-left="0.25in" fo:text-indent="0in" style:auto-text-indent="false"/>
      <style:text-properties fo:background-color="transparent"/>
    </style:style>
    <style:style style:name="P16" style:family="paragraph" style:parent-style-name="Standard">
      <style:paragraph-properties fo:margin-left="0.25in" fo:text-indent="0in" style:auto-text-indent="false"/>
    </style:style>
    <style:style style:name="P17" style:family="paragraph" style:parent-style-name="Standard">
      <style:text-properties officeooo:paragraph-rsid="0017e1c4"/>
    </style:style>
    <style:style style:name="P18" style:family="paragraph" style:parent-style-name="Standard">
      <style:text-properties officeooo:paragraph-rsid="001763c0"/>
    </style:style>
    <style:style style:name="P19" style:family="paragraph" style:parent-style-name="Standard">
      <style:paragraph-properties fo:margin-left="1.5in" fo:text-indent="0in" style:auto-text-indent="false"/>
    </style:style>
    <style:style style:name="P20" style:family="paragraph" style:parent-style-name="Standard">
      <style:text-properties officeooo:paragraph-rsid="00086dd0"/>
    </style:style>
    <style:style style:name="P21" style:family="paragraph" style:parent-style-name="Standard">
      <style:paragraph-properties fo:margin-left="0.5in" fo:text-indent="0in" style:auto-text-indent="false"/>
    </style:style>
    <style:style style:name="P22" style:family="paragraph" style:parent-style-name="Standard">
      <style:paragraph-properties fo:margin-left="0.25in" fo:text-indent="0in" style:auto-text-indent="false"/>
      <style:text-properties officeooo:paragraph-rsid="001763c0"/>
    </style:style>
    <style:style style:name="P23" style:family="paragraph" style:parent-style-name="Standard">
      <style:paragraph-properties fo:margin-left="0.75in" fo:text-indent="0in" style:auto-text-indent="false"/>
    </style:style>
    <style:style style:name="P24" style:family="paragraph" style:parent-style-name="Standard">
      <style:text-properties officeooo:paragraph-rsid="001324cb"/>
    </style:style>
    <style:style style:name="P25" style:family="paragraph" style:parent-style-name="Standard">
      <style:paragraph-properties fo:margin-left="1in" fo:text-indent="0in" style:auto-text-indent="false"/>
    </style:style>
    <style:style style:name="P26" style:family="paragraph" style:parent-style-name="Standard">
      <style:paragraph-properties fo:margin-left="0in" fo:text-indent="0in" style:auto-text-indent="false"/>
      <style:text-properties officeooo:paragraph-rsid="00187f1a"/>
    </style:style>
    <style:style style:name="P27" style:family="paragraph" style:parent-style-name="Standard">
      <style:text-properties officeooo:paragraph-rsid="00195f46"/>
    </style:style>
    <style:style style:name="P28" style:family="paragraph" style:parent-style-name="Standard">
      <style:paragraph-properties fo:margin-left="0.25in" fo:text-indent="0in" style:auto-text-indent="false"/>
      <style:text-properties officeooo:paragraph-rsid="00195f46"/>
    </style:style>
    <style:style style:name="P29" style:family="paragraph" style:parent-style-name="Standard">
      <style:paragraph-properties fo:margin-left="0.25in" fo:text-indent="0in" style:auto-text-indent="false"/>
      <style:text-properties officeooo:paragraph-rsid="001c19ba"/>
    </style:style>
    <style:style style:name="P30" style:family="paragraph" style:parent-style-name="Standard">
      <style:paragraph-properties fo:margin-left="0.25in" fo:text-indent="0in" style:auto-text-indent="false"/>
      <style:text-properties officeooo:paragraph-rsid="00118913"/>
    </style:style>
    <style:style style:name="P31" style:family="paragraph" style:parent-style-name="Standard">
      <style:paragraph-properties fo:margin-left="0.25in" fo:text-indent="0in" style:auto-text-indent="false"/>
      <style:text-properties officeooo:paragraph-rsid="00113855"/>
    </style:style>
    <style:style style:name="P32" style:family="paragraph" style:parent-style-name="Standard">
      <style:paragraph-properties fo:text-align="start" style:justify-single-word="false"/>
      <style:text-properties officeooo:paragraph-rsid="0007bf68"/>
    </style:style>
    <style:style style:name="P33" style:family="paragraph" style:parent-style-name="Heading_20_2">
      <style:paragraph-properties fo:break-before="column"/>
      <style:text-properties fo:background-color="transparent"/>
    </style:style>
    <style:style style:name="P34" style:family="paragraph" style:parent-style-name="Heading_20_2_20_Long_20_Box">
      <style:text-properties fo:background-color="transparent"/>
    </style:style>
    <style:style style:name="P35" style:family="paragraph" style:parent-style-name="Standard">
      <style:paragraph-properties fo:margin-left="0.25in" fo:text-indent="0in" style:auto-text-indent="false"/>
      <style:text-properties officeooo:paragraph-rsid="000e90cb"/>
    </style:style>
    <style:style style:name="P36" style:family="paragraph" style:parent-style-name="Standard">
      <style:paragraph-properties fo:margin-left="1in" fo:text-indent="0in" style:auto-text-indent="false"/>
      <style:text-properties officeooo:paragraph-rsid="001324cb"/>
    </style:style>
    <style:style style:name="P37" style:family="paragraph" style:parent-style-name="Standard">
      <style:paragraph-properties fo:margin-left="1in" fo:text-indent="0in" style:auto-text-indent="false"/>
      <style:text-properties officeooo:paragraph-rsid="001081f5"/>
    </style:style>
    <style:style style:name="T1" style:family="text">
      <style:text-properties fo:background-color="transparent" loext:char-shading-value="0"/>
    </style:style>
    <style:style style:name="T2" style:family="text">
      <style:text-properties officeooo:rsid="0000c400"/>
    </style:style>
    <style:style style:name="T3" style:family="text">
      <style:text-properties officeooo:rsid="000ce31b"/>
    </style:style>
    <style:style style:name="T4" style:family="text">
      <style:text-properties officeooo:rsid="001b1bee" fo:background-color="transparent" loext:char-shading-value="0"/>
    </style:style>
    <style:style style:name="T5" style:family="text">
      <style:text-properties fo:font-style="italic" fo:background-color="transparent" loext:char-shading-value="0" style:font-style-asian="italic" style:font-style-complex="italic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officeooo:rsid="001324cb" fo:background-color="transparent" loext:char-shading-value="0"/>
    </style:style>
    <style:style style:name="T8" style:family="text">
      <style:text-properties officeooo:rsid="0019ca7c" fo:background-color="transparent" loext:char-shading-value="0"/>
    </style:style>
    <style:style style:name="T9" style:family="text">
      <style:text-properties officeooo:rsid="001763c0" fo:background-color="transparent" loext:char-shading-value="0"/>
    </style:style>
    <style:style style:name="T10" style:family="text">
      <style:text-properties officeooo:rsid="001763c0"/>
    </style:style>
    <style:style style:name="T11" style:family="text">
      <style:text-properties fo:font-size="8.60000038146973pt"/>
    </style:style>
    <style:style style:name="T12" style:family="text">
      <style:text-properties officeooo:rsid="00176dab" fo:background-color="transparent" loext:char-shading-value="0"/>
    </style:style>
    <style:style style:name="T13" style:family="text">
      <style:text-properties fo:font-size="8.60000038146973pt" fo:background-color="transparent" loext:char-shading-value="0"/>
    </style:style>
    <style:style style:name="T14" style:family="text">
      <style:text-properties officeooo:rsid="001682d6"/>
    </style:style>
    <style:style style:name="T15" style:family="text">
      <style:text-properties officeooo:rsid="001081f5" fo:background-color="transparent" loext:char-shading-value="0"/>
    </style:style>
    <style:style style:name="T16" style:family="text">
      <style:text-properties officeooo:rsid="0017e1c4"/>
    </style:style>
    <style:style style:name="T17" style:family="text">
      <style:text-properties fo:color="#666666" loext:opacity="100%" style:font-name="Noto Sans" fo:font-size="8.60000038146973pt" fo:background-color="transparent" loext:char-shading-value="0"/>
    </style:style>
    <style:style style:name="T18" style:family="text">
      <style:text-properties fo:color="#666666" loext:opacity="100%" style:text-position="super 58%" style:font-name="Noto Sans" fo:font-size="8.60000038146973pt" officeooo:rsid="000ef31a" fo:background-color="transparent" loext:char-shading-value="0"/>
    </style:style>
    <style:style style:name="T19" style:family="text">
      <style:text-properties officeooo:rsid="001c2bf2" fo:background-color="transparent" loext:char-shading-value="0"/>
    </style:style>
    <style:style style:name="T20" style:family="text">
      <style:text-properties style:text-position="super 58%" officeooo:rsid="000e90cb" fo:background-color="transparent" loext:char-shading-value="0"/>
    </style:style>
    <style:style style:name="T21" style:family="text">
      <style:text-properties officeooo:rsid="000e90cb" fo:background-color="transparent" loext:char-shading-value="0"/>
    </style:style>
    <style:style style:name="T22" style:family="text">
      <style:text-properties fo:font-size="7.90000009536743pt" fo:background-color="transparent" loext:char-shading-value="0"/>
    </style:style>
    <style:style style:name="T23" style:family="text">
      <style:text-properties fo:font-size="8.60000038146973pt" officeooo:rsid="001af3bc" fo:background-color="transparent" loext:char-shading-value="0"/>
    </style:style>
    <style:style style:name="T24" style:family="text">
      <style:text-properties officeooo:rsid="000ef31a"/>
    </style:style>
    <style:style style:name="T25" style:family="text">
      <style:text-properties officeooo:rsid="001081f5"/>
    </style:style>
    <style:style style:name="T26" style:family="text">
      <style:text-properties officeooo:rsid="000ef31a" fo:background-color="transparent" loext:char-shading-value="0"/>
    </style:style>
    <style:style style:name="T27" style:family="text">
      <style:text-properties officeooo:rsid="000ce31b" fo:background-color="transparent" loext:char-shading-value="0"/>
    </style:style>
    <style:style style:name="T28" style:family="text">
      <style:text-properties style:text-underline-style="solid" style:text-underline-width="auto" style:text-underline-color="font-color" officeooo:rsid="001b1bee"/>
    </style:style>
    <style:style style:name="T29" style:family="text">
      <style:text-properties officeooo:rsid="00187f1a"/>
    </style:style>
    <style:style style:name="T30" style:family="text">
      <style:text-properties fo:font-size="8.60000038146973pt" officeooo:rsid="00187f1a"/>
    </style:style>
    <style:style style:name="T31" style:family="text">
      <style:text-properties officeooo:rsid="00195f46" fo:background-color="transparent" loext:char-shading-value="0"/>
    </style:style>
    <style:style style:name="T32" style:family="text">
      <style:text-properties officeooo:rsid="00113855" fo:background-color="transparent" loext:char-shading-value="0"/>
    </style:style>
    <style:style style:name="T33" style:family="text">
      <style:text-properties style:text-position="super 58%" fo:background-color="transparent" loext:char-shading-value="0"/>
    </style:style>
    <style:style style:name="T34" style:family="text">
      <style:text-properties officeooo:rsid="00187f1a" fo:background-color="transparent" loext:char-shading-value="0"/>
    </style:style>
    <style:style style:name="T35" style:family="text">
      <style:text-properties style:text-position="super 58%" officeooo:rsid="00187f1a" fo:background-color="transparent" loext:char-shading-value="0"/>
    </style:style>
    <style:style style:name="T36" style:family="text">
      <style:text-properties fo:font-size="8.60000038146973pt" officeooo:rsid="00187f1a" fo:background-color="transparent" loext:char-shading-value="0"/>
    </style:style>
    <style:style style:name="T37" style:family="text">
      <style:text-properties fo:font-size="8.60000038146973pt" officeooo:rsid="001682d6" fo:background-color="transparent" loext:char-shading-value="0"/>
    </style:style>
    <style:style style:name="Sect1" style:family="section">
      <style:section-properties text:dont-balance-text-columns="true" style:editable="false">
        <style:columns fo:column-count="2" fo:column-gap="0.5in">
          <style:column style:rel-width="32767*" fo:start-indent="0in" fo:end-indent="0.25in"/>
          <style:column style:rel-width="32768*" fo:start-indent="0.25in" fo:end-indent="0in"/>
        </style:columns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Weekly_Outline">
        <text:section text:style-name="Sect2" text:name="Weekly_Outline_Continued">
          <table:table table:name="Table4" table:style-name="Table4">
            <table:table-column table:style-name="Table4.A"/>
            <table:table-column table:style-name="Table4.B"/>
            <table:table-column table:style-name="Table4.C"/>
            <table:table-row>
              <table:table-cell table:number-columns-spanned="3" office:value-type="string">
                <text:p text:style-name="P1"><text:span text:style-name="var-field">HM Efsévios of Samosata</text:span></text:p>
              </table:table-cell>
              <table:covered-table-cell/>
              <table:covered-table-cell/>
            </table:table-row>
            <table:table-row>
              <table:table-cell table:style-name="Table4.A2" office:value-type="string">
                <text:p text:style-name="Standard"><text:span text:style-name="src-spoken"><text:span text:style-name="T1">Sun. / T.</text:span></text:span><text:span text:style-name="src-tone-spoken">IV</text:span></text:p>
              </table:table-cell>
              <table:table-cell table:style-name="Table4.A2" office:value-type="string">
                <text:p text:style-name="P2">Matins Gospel <text:span text:style-name="var-src-tone-spoken"><text:span text:style-name="T2">V</text:span></text:span>: <text:span text:style-name="T3">Lk 24:12-35 (§113)</text:span></text:p>
              </table:table-cell>
              <table:table-cell table:style-name="Table4.A2" office:value-type="string">
                <text:p text:style-name="P3"><text:span text:style-name="src-spoken"><text:span text:style-name="T1">[ §1</text:span></text:span><text:span text:style-name="src-spoken"><text:span text:style-name="T4">a</text:span></text:span><text:span text:style-name="src-spoken"><text:span text:style-name="T1"> – Simple svc ]</text:span></text:span></text:p>
              </table:table-cell>
            </table:table-row>
          </table:table>
          <text:p text:style-name="P4"/>
        </text:section>
        <text:h text:style-name="P5" text:outline-level="2">GREAT VESPERS</text:h>
        <text:p text:style-name="Standard"><text:span text:style-name="cue-strong"><text:span text:style-name="T1">Psalm 103</text:span></text:span><text:tab/><text:tab/><text:span text:style-name="src-sung"><text:span text:style-name="T1">[Orologion,p.187]</text:span></text:span><text:tab/><text:span text:style-name="incipit-sung"><text:span text:style-name="T1">“Bless the Lord, O my soul”…</text:span></text:span><text:span text:style-name="T1">;</text:span><text:tab/><text:span text:style-name="T1">Great Ektenia</text:span></text:p>
        <text:p text:style-name="Standard"><text:span text:style-name="cue-strong"><text:span text:style-name="T1">Psalm 1</text:span></text:span><text:tab/><text:tab/><text:tab/><text:tab/><text:span text:style-name="T1">⮡</text:span><text:tab/><text:tab/><text:tab/><text:span text:style-name="incipit-sung"><text:span text:style-name="T1">“Blessed is the Man”…</text:span></text:span><text:span text:style-name="T1">;</text:span><text:tab/><text:tab/><text:tab/><text:span text:style-name="T1">Little Ektenia</text:span></text:p>
        <text:p text:style-name="Standard"/>
        <text:p text:style-name="Standard"><text:span text:style-name="src-sung"><text:span text:style-name="T5">“Lord, I Have Cried”…</text:span></text:span><text:tab/><text:tab/><text:span text:style-name="T1">⮡</text:span><text:tab/><text:tab/><text:tab/><text:span text:style-name="T6">10+1 total</text:span></text:p>
        <text:p text:style-name="P6"><text:span text:style-name="var-field">7</text:span> <text:span text:style-name="src-sung"><text:span text:style-name="T1">stichira:</text:span></text:span><text:tab/><text:tab/><text:span text:style-name="src-sung">[Oktoichos,T.</text:span><text:span text:style-name="src-tone-sung"><text:span text:style-name="T7">IV</text:span></text:span><text:span text:style-name="src-sung">]</text:span><text:tab/><text:span text:style-name="incipit-sung">“Bowing down unceasingly before Thy life-”…</text:span></text:p>
        <text:p text:style-name="P7"><text:span text:style-name="var-field">3</text:span>” <text:tab/><text:tab/><text:tab/><text:span text:style-name="src-spoken"><text:span text:style-name="T1">[</text:span></text:span><text:span text:style-name="src-spoken"><text:span text:style-name="T8">Minai</text:span></text:span><text:span text:style-name="src-spoken"><text:span text:style-name="T9">on</text:span></text:span><text:span text:style-name="src-spoken"><text:span text:style-name="T1">,T.</text:span></text:span><text:span text:style-name="var-src-tone-spoken">VIII</text:span><text:span text:style-name="src-spoken"><text:span text:style-name="T1">]</text:span></text:span> <text:tab/><text:tab/><text:span text:style-name="var-incipit-spoken">“What shall we call thee, O glorious one? </text:span><text:span text:style-name="var-incipit-spoken"><text:span text:style-name="T10">True</text:span></text:span><text:span text:style-name="var-incipit-spoken">”…</text:span></text:p>
        <text:p text:style-name="P8"><text:span text:style-name="cue-doxology-sung">“Glory”…“Now”…</text:span><text:tab/><text:span text:style-name="src-sung">[Oktoich.,T.</text:span><text:span text:style-name="src-tone-sung"><text:span text:style-name="T7">IV</text:span></text:span><text:span text:style-name="src-sung">]</text:span> <text:tab/><text:tab/><text:span text:style-name="incipit-sung">“The prophet David, who through thee is the”…</text:span></text:p>
        <text:p text:style-name="Standard"/>
        <text:p text:style-name="P9"><text:span text:style-name="cue-strong"><text:span text:style-name="T1">Vesper Hymn</text:span></text:span><text:tab/><text:span text:style-name="src-sung"><text:span text:style-name="T1">[Orolog.,p.192]</text:span></text:span><text:tab/><text:tab/><text:span text:style-name="incipit-sung"><text:span text:style-name="T1">“O Gentle Light of the holy glory of the”…</text:span></text:span></text:p>
        <text:p text:style-name="Standard"><text:span text:style-name="cue-strong"><text:span text:style-name="T1">Prokeimen.</text:span></text:span><text:tab/><text:tab/><text:span text:style-name="src-sung"><text:span text:style-name="T1">[Okto./Sat.,T.</text:span></text:span><text:span text:style-name="src-tone-sung"><text:span text:style-name="T7">VI</text:span></text:span><text:span text:style-name="src-sung"><text:span text:style-name="T1">]</text:span></text:span><text:tab/><text:span text:style-name="incipit-sung"><text:span text:style-name="T1">“The Lord is King, He is clothed with majesty”</text:span></text:span></text:p>
        <text:p text:style-name="Standard"><text:span text:style-name="incipit-spoken"><text:span text:style-name="T1"/></text:span></text:p>
        <text:p text:style-name="Standard"><text:span text:style-name="T1">Ektenia of FS;</text:span><text:tab/><text:tab/><text:span text:style-name="src-spoken"><text:span text:style-name="T1">[Vigil book p.25]</text:span></text:span><text:tab/><text:tab/><text:span text:style-name="incipit-spoken"><text:span text:style-name="T1">“Vouchsafe, O Lord, to keep us this evening”…</text:span></text:span></text:p>
        <text:p text:style-name="Standard"/>
        <text:p text:style-name="Standard"><text:span text:style-name="cue-strong">Aposticha:</text:span> <text:tab/><text:tab/><text:span text:style-name="src-sung">[Oktoich.,T.</text:span><text:span text:style-name="src-tone-sung"><text:span text:style-name="T7">IV</text:span></text:span><text:span text:style-name="src-sung">]</text:span> <text:tab/><text:tab/><text:span text:style-name="incipit-sung">“Having ascended the Cross, O Lord, Thou”…</text:span></text:p>
        <text:p text:style-name="P8"><text:span text:style-name="cue-doxology-sung"><text:span text:style-name="T11">“Glory”…</text:span></text:span><text:span text:style-name="cue-doxology-sung">“Now”…</text:span> <text:tab/><text:tab/><text:span text:style-name="T1">⮡<text:tab/></text:span><text:tab/><text:tab/><text:span text:style-name="var-incipit-sung">“Mercifully regard the supplications of thy”…</text:span></text:p>
        <text:p text:style-name="Standard"/>
        <text:p text:style-name="P9"><text:span text:style-name="src-sung"><text:span text:style-name="T1">Prayer/St Symeon</text:span></text:span><text:tab/><text:span text:style-name="src-sung"><text:span text:style-name="T1">[Orolog.,p.200]</text:span></text:span><text:tab/><text:tab/><text:span text:style-name="incipit-sung"><text:span text:style-name="T1">“Now lettest Thou Thy servant depart in peace”…</text:span></text:span></text:p>
        <text:p text:style-name="Standard"><text:span text:style-name="T1">Tris-Agion</text:span><text:tab/><text:tab/><text:span text:style-name="src-spoken"><text:span text:style-name="T1">[Vigil bk <text:s/>p.36]</text:span></text:span><text:tab/><text:tab/><text:span text:style-name="incipit-spoken"><text:span text:style-name="T1">“Holy God, Holy Mighty, Holy Immortal, have”…</text:span></text:span></text:p>
        <text:p text:style-name="P10"><text:span text:style-name="cue-strong"><text:span text:style-name="T1">Troparia: </text:span></text:span><text:tab/><text:tab/><text:span text:style-name="src-sung"><text:span text:style-name="T1">[Orolog.,p.20</text:span></text:span><text:span text:style-name="src-sung"><text:span text:style-name="T12">2</text:span></text:span><text:span text:style-name="src-sung"><text:span text:style-name="T1">]</text:span></text:span><text:span text:style-name="T1"> <text:s text:c="3"/></text:span><text:span text:style-name="var-field"><text:span text:style-name="T1">3x</text:span></text:span><text:tab/><text:span text:style-name="incipit-sung"><text:span text:style-name="T13">“O Theotokos and Virgin, rejoice, O Mary full of”…</text:span></text:span></text:p>
        <text:p text:style-name="P11"><text:span text:style-name="T1">⮡</text:span><text:tab/><text:tab/><text:span text:style-name="T1"> <text:s/></text:span><text:span text:style-name="counter-strong"><text:span text:style-name="T1">3x</text:span></text:span><text:tab/><text:span text:style-name="incipit-sung"><text:span text:style-name="T1">“Blessed be the name of the Lord from”…</text:span></text:span></text:p>
        <text:p text:style-name="Standard"><text:span text:style-name="cue-strong"><text:span text:style-name="T1">Ps 33:1-10</text:span></text:span><text:tab/><text:tab/><text:tab/><text:span text:style-name="T1">⮡</text:span><text:tab/><text:tab/><text:tab/><text:span text:style-name="incipit-sung"><text:span text:style-name="T1">“I will bless the Lord at all times, His praise”…</text:span></text:span></text:p>
        <text:p text:style-name="Standard"/>
        <text:h text:style-name="P5" text:outline-level="2">MATINS</text:h>
        <text:p text:style-name="Standard"><text:span text:style-name="T1">6 Psalms @nave</text:span><text:tab/><text:span text:style-name="src-spoken"><text:span text:style-name="T1">[Vigil bk <text:s/>p.40]</text:span></text:span><text:tab/><text:tab/><text:span text:style-name="incipit-spoken"><text:span text:style-name="T1">“Glory to God in the highest, and on earth peace,”…</text:span></text:span></text:p>
        <text:p text:style-name="P4">Great Ektenia</text:p>
        <text:p text:style-name="Standard"/>
        <text:p text:style-name="Standard"><text:span text:style-name="src-sung"><text:span text:style-name="T5">“God is the Lord”…</text:span></text:span><text:tab/><text:span text:style-name="src-sung"><text:span text:style-name="T1">[Orolog.,p.55]</text:span></text:span></text:p>
        <text:p text:style-name="Standard"><text:span text:style-name="cue-strong">Troparia:</text:span> <text:tab/><text:tab/><text:span text:style-name="src-sung">[Oktoich.,T.</text:span><text:span text:style-name="src-tone-sung"><text:span text:style-name="T7">IV</text:span></text:span><text:span text:style-name="src-sung">]</text:span><text:tab/> <text:span text:style-name="counter-strong"><text:span text:style-name="T13">2x</text:span></text:span><text:tab/><text:span text:style-name="incipit-sung">“Having learned the joyful proclamation </text:span><text:span text:style-name="incipit-sung"><text:span text:style-name="T14">of the</text:span></text:span><text:span text:style-name="incipit-sung">”…</text:span></text:p>
        <text:p text:style-name="P12"><text:span text:style-name="cue-doxology-sung"><text:s text:c="4"/>“Glory”…</text:span> <text:tab/><text:tab/><text:span text:style-name="src-sung"><text:span text:style-name="T1">[</text:span></text:span><text:span text:style-name="src-sung"><text:span text:style-name="T15">Minai</text:span></text:span><text:span text:style-name="src-sung"><text:span text:style-name="T1">.,T.</text:span></text:span><text:span text:style-name="var-src-tone">IV</text:span><text:span text:style-name="src-sung"><text:span text:style-name="T1">]</text:span></text:span><text:tab/> <text:span text:style-name="counter-strong"><text:span text:style-name="T13">1x</text:span></text:span> <text:tab/><text:span text:style-name="var-incipit-sung">“As thou didst share in the ways of the”…</text:span></text:p>
        <text:p text:style-name="P13"><text:span text:style-name="cue-doxology-sung"><text:s text:c="4"/>“Now”…</text:span><text:span text:style-name="src-sung"><text:span text:style-name="T1">Theotok.</text:span></text:span><text:tab/><text:span text:style-name="src-sung">[Oktoich.,T.</text:span><text:span text:style-name="var-src-tone"><text:span text:style-name="T16">IV</text:span></text:span><text:span text:style-name="src-sung">]</text:span> <text:tab/><text:tab/><text:span text:style-name="var-incipit-sung">“The mystery hidden from before the ages an</text:span><text:span text:style-name="var-incipit-sung"><text:span text:style-name="T14">d</text:span></text:span><text:span text:style-name="var-incipit-sung">”…</text:span></text:p>
        <text:p text:style-name="Standard"/>
        <text:p text:style-name="P14"><text:span text:style-name="T1"><text:s text:c="2"/></text:span><text:span text:style-name="counter-strong"><text:span text:style-name="T1">3x</text:span></text:span><text:tab/><text:span text:style-name="incipit-sung"><text:span text:style-name="T1">“Lord have mercy”</text:span></text:span><text:span text:style-name="T1">;</text:span><text:tab/><text:span text:style-name="cue-doxology-sung"><text:span text:style-name="T1">“Glory”…</text:span></text:span><text:span text:style-name="cue-doxology-spoken"><text:span text:style-name="T1">“Now”…</text:span></text:span></text:p>
        <text:p text:style-name="Standard"><text:span text:style-name="cue-strong"><text:span text:style-name="T17">1</text:span></text:span><text:span text:style-name="cue-strong"><text:span text:style-name="T18">st</text:span></text:span><text:span text:style-name="cue-strong"><text:span text:style-name="T17"> chant/Psaltiri</text:span></text:span><text:tab/><text:span text:style-name="src-spoken">[Vigil bk p.62]</text:span> <text:tab/><text:tab/><text:span text:style-name="incipit-spoken">“How long, O Lord, wilt Thou utterly forget </text:span><text:span text:style-name="incipit-spoken"><text:span text:style-name="T14">me?</text:span></text:span><text:span text:style-name="incipit-spoken">”…</text:span></text:p>
        <text:p text:style-name="P15">Little Ektenia</text:p>
        <text:p text:style-name="P16"><text:span text:style-name="cue-strong"><text:span text:style-name="T17">Sess. hymns:</text:span></text:span><text:tab/><text:span text:style-name="src-spoken">[Oktoich.,T.</text:span><text:span text:style-name="src-tone-spoken">IV</text:span><text:span text:style-name="src-spoken">]</text:span> <text:tab/><text:tab/><text:span text:style-name="incipit-spoken">“Gazing upon the entrance to the tomb, and”…</text:span></text:p>
        <text:p text:style-name="Standard"/>
        <text:p text:style-name="P14"><text:span text:style-name="T1"><text:s text:c="2"/></text:span><text:span text:style-name="counter-strong"><text:span text:style-name="T1">3x</text:span></text:span><text:tab/><text:span text:style-name="incipit-sung"><text:span text:style-name="T1">“Lord have mercy”</text:span></text:span><text:span text:style-name="T1">;</text:span><text:tab/><text:span text:style-name="cue-doxology-sung"><text:span text:style-name="T1">“Glory”…</text:span></text:span><text:span text:style-name="cue-doxology-spoken"><text:span text:style-name="T1">“Now”…</text:span></text:span></text:p>
        <text:p text:style-name="Standard"><text:span text:style-name="cue-strong"><text:span text:style-name="T17">2</text:span></text:span><text:span text:style-name="cue-strong"><text:span text:style-name="T18">nd</text:span></text:span><text:span text:style-name="cue-strong"><text:span text:style-name="T17"> chant/Psaltiri</text:span></text:span><text:tab/><text:span text:style-name="src-spoken">[Vigil bk p.75]</text:span> <text:tab/><text:tab/><text:span text:style-name="incipit-spoken">“The Lord hear thee in the day of afflictio</text:span><text:span text:style-name="incipit-spoken"><text:span text:style-name="T14">n; the</text:span></text:span><text:span text:style-name="incipit-spoken">”…</text:span></text:p>
        <text:p text:style-name="P15">Little Ektenia</text:p>
        <text:p text:style-name="P16"><text:span text:style-name="cue-strong"><text:span text:style-name="T17">Sess. hymns:</text:span></text:span><text:tab/><text:span text:style-name="src-spoken">[Oktoich.,T.</text:span><text:span text:style-name="src-tone-spoken">IV</text:span><text:span text:style-name="src-spoken">]</text:span> <text:tab/><text:tab/><text:span text:style-name="incipit-spoken">“Thou didst arise from the tomb as One”…</text:span></text:p>
        <text:p text:style-name="Standard"/>
        <text:p text:style-name="P17"><text:span text:style-name="cue-strong"><text:span text:style-name="T13">Psalm 118</text:span></text:span><text:tab/><text:tab/><text:span text:style-name="src-sung"><text:span text:style-name="T1">[Orolog.,p.</text:span></text:span><text:span text:style-name="src-sung"><text:span text:style-name="T19">61</text:span></text:span><text:span text:style-name="src-sung"><text:span text:style-name="T1">]</text:span></text:span><text:tab/><text:tab/><text:span text:style-name="incipit-sung"><text:span text:style-name="T1">“Blessed are the blameless in the way who”…</text:span></text:span></text:p>
        <text:p text:style-name="P18"><text:span text:style-name="cue-strong"><text:span text:style-name="T13">Evlogitaria</text:span></text:span><text:tab/><text:tab/><text:tab/><text:tab/><text:span text:style-name="T1">⮡</text:span><text:span text:style-name="src-sung"><text:span text:style-name="T1"><text:tab/><text:tab/></text:span></text:span><text:span text:style-name="incipit-sung"><text:span text:style-name="T13">“Blessed art Thou O Lord, teach me Thy”…</text:span></text:span></text:p>
        <text:p text:style-name="Standard"/>
        <text:p text:style-name="P4">Little Ektenia</text:p>
        <text:p text:style-name="Standard"><text:span text:style-name="cue-strong"><text:span text:style-name="T17">Ypakoi</text:span></text:span> <text:tab/><text:tab/><text:tab/><text:span text:style-name="src-spoken">[Oktoich.,T.</text:span><text:span text:style-name="src-tone-spoken">IV</text:span><text:span text:style-name="src-spoken">]</text:span> <text:tab/><text:tab/><text:span text:style-name="incipit-spoken">“Running on before, the myrrh-bearing </text:span><text:span text:style-name="incipit-spoken"><text:span text:style-name="T14">women</text:span></text:span><text:span text:style-name="incipit-spoken">”…</text:span></text:p>
        <text:p text:style-name="P18"><text:span text:style-name="src-sung"><text:span text:style-name="T1">Hymns/Ascents:1</text:span></text:span><text:span text:style-name="src-sung"><text:span text:style-name="T20">st</text:span></text:span><text:span text:style-name="src-sung"><text:span text:style-name="T21"> </text:span></text:span><text:span text:style-name="src-sung"><text:span text:style-name="T1">antif.</text:span></text:span> <text:tab/><text:tab/><text:span text:style-name="T1">⮡<text:tab/></text:span><text:tab/><text:span text:style-name="incipit-sung">“From my youth have the many passions”…</text:span></text:p>
        <text:p text:style-name="Standard"><text:span text:style-name="cue-strong">Prokeimen.</text:span> <text:tab/><text:tab/><text:tab/><text:tab/>⮡ <text:tab/><text:tab/><text:span text:style-name="incipit-sung">“Arise, O Lord, help us, and redeem us”…</text:span></text:p>
        <text:p text:style-name="P19"><text:span text:style-name="T1">⮡</text:span><text:tab/><text:tab/><text:span text:style-name="incipit-sung"><text:span text:style-name="T1">“Let every breath praise the Lord”</text:span></text:span></text:p>
        <text:p text:style-name="P20"><text:span text:style-name="cue-strong"><text:span text:style-name="T17">Matins Gospel </text:span></text:span><text:span text:style-name="var-src-tone-spoken"><text:span text:style-name="T2">V</text:span></text:span><text:tab/> <text:span text:style-name="src-spoken">[</text:span><text:span text:style-name="src-spoken"><text:span text:style-name="T3">Lk 24:12-35 (§113)</text:span></text:span><text:span text:style-name="src-spoken">]</text:span> <text:tab/><text:span text:style-name="var-incipit-spoken">“At that time, Peter arose and ran unto the”…</text:span></text:p>
        <text:p text:style-name="Standard"/>
        <text:p text:style-name="Standard"><text:span text:style-name="src-sung"><text:span text:style-name="T22">Resurr. hymn</text:span></text:span><text:tab/><text:span text:style-name="src-sung"><text:span text:style-name="T22"> <text:s/></text:span></text:span><text:span text:style-name="src-sung"><text:span text:style-name="T1">[Orolog.,p.64,T.</text:span></text:span><text:span text:style-name="src-tone-sung"><text:span text:style-name="T1">VI</text:span></text:span><text:span text:style-name="src-sung"><text:span text:style-name="T1">]</text:span></text:span><text:tab/><text:tab/><text:span text:style-name="incipit-sung"><text:span text:style-name="T1">“Having beheld the resurrection of Christ, let”…</text:span></text:span></text:p>
        <text:p text:style-name="Standard"><text:span text:style-name="T1">Psalm 50</text:span><text:tab/><text:tab/><text:span text:style-name="src-spoken"><text:span text:style-name="T1">[Vigil bk p.108]</text:span></text:span><text:tab/><text:tab/><text:span text:style-name="incipit-spoken"><text:span text:style-name="T1">“Have mercy on me O God, according to Thy”…</text:span></text:span></text:p>
        <text:p text:style-name="P21"><text:span text:style-name="cue-doxology-sung"><text:span text:style-name="T1">“Glory”…</text:span></text:span><text:tab/><text:span text:style-name="src-sung"><text:span text:style-name="T1">[Orolog.,p.65]</text:span></text:span><text:tab/><text:tab/><text:span text:style-name="incipit-sung"><text:span text:style-name="T1">“Through the prayers of the apostles, O”…</text:span></text:span></text:p>
        <text:p text:style-name="P21"><text:span text:style-name="cue-doxology-sung"><text:span text:style-name="T1">“Now”…</text:span></text:span><text:tab/><text:tab/><text:tab/><text:span text:style-name="T1">⮡</text:span><text:tab/><text:tab/><text:span text:style-name="incipit-sung"><text:span text:style-name="T1">“Through the prayers of the Theotokos, O”…</text:span></text:span></text:p>
        <text:p text:style-name="P21"><text:span text:style-name="incipit-sung"><text:span text:style-name="T1">“Have mercy on me”…</text:span></text:span><text:span text:style-name="T1">;</text:span><text:tab/><text:tab/><text:span text:style-name="incipit-sung"><text:span text:style-name="T1">“Jesus having risen from the grave as He”…</text:span></text:span></text:p>
        <text:p text:style-name="Standard"><text:span text:style-name="incipit-spoken"><text:span text:style-name="T1">“Save, O God, Thy people”…</text:span></text:span><text:span text:style-name="incipit-sung"><text:span text:style-name="T1">;</text:span></text:span><text:tab/><text:tab/><text:span text:style-name="counter-strong"><text:span text:style-name="T1">12x</text:span></text:span><text:tab/><text:span text:style-name="incipit-sung"><text:span text:style-name="T1">“Lord have mercy”</text:span></text:span></text:p>
        <text:p text:style-name="Standard"/>
        <text:p text:style-name="Standard"><text:span text:style-name="cue-strong"><text:span text:style-name="T1">Kanon</text:span></text:span></text:p>
        <text:p text:style-name="Standard"><text:span text:style-name="cue-strong">Resurr. irmoi:</text:span><text:tab/><text:span text:style-name="src-sung">[Oktoich.,T.</text:span><text:span text:style-name="src-tone-sung"><text:span text:style-name="T7">IV</text:span></text:span><text:span text:style-name="src-sung">]</text:span> <text:tab/><text:tab/><text:span text:style-name="incipit-sung">“Israel of old, having traversed the depths </text:span><text:span text:style-name="incipit-sung"><text:span text:style-name="T14">of</text:span></text:span><text:span text:style-name="incipit-sung">”…</text:span></text:p>
        <text:p text:style-name="P4">6 total</text:p>
        <text:p text:style-name="P16"><text:span text:style-name="var-field"><text:span text:style-name="T11">1</text:span></text:span><text:tab/><text:span text:style-name="T1">Resurrection</text:span><text:tab/><text:span text:style-name="src-spoken"><text:span text:style-name="T1">[Oktoich.]</text:span></text:span><text:tab/><text:tab/><text:span text:style-name="incipit-spoken"><text:span text:style-name="T1">“Glory to Thy Holy Resurrection, O Lord”</text:span></text:span></text:p>
        <text:p text:style-name="P16"><text:span text:style-name="var-field"><text:span text:style-name="T11">1</text:span></text:span><text:span text:style-name="T1"> </text:span><text:tab/><text:span text:style-name="T1">Cross/Resurr.</text:span><text:tab/><text:span text:style-name="T1">⮡</text:span><text:tab/><text:tab/><text:span text:style-name="incipit-spoken"><text:span text:style-name="T13">“Glory to Thy precious Cross&amp; Resurrection, O Lord”</text:span></text:span></text:p>
        <text:p text:style-name="P16"><text:span text:style-name="var-field"><text:span text:style-name="T11">1</text:span></text:span><text:tab/><text:span text:style-name="T1">Theotokos</text:span><text:tab/><text:tab/><text:span text:style-name="T1">⮡</text:span><text:tab/><text:tab/><text:span text:style-name="incipit-spoken"><text:span text:style-name="T1">“Most Holy Theotokos, save us”</text:span></text:span></text:p>
        <text:p text:style-name="P22"><text:span text:style-name="var-field"><text:span text:style-name="T10">3</text:span></text:span><text:tab/><text:span text:style-name="var-field"><text:span text:style-name="T17">Hieromartyr</text:span></text:span><text:tab/><text:span text:style-name="src-spoken">[Minai.]</text:span> <text:tab/><text:tab/><text:span text:style-name="incipit-spoken"><text:span text:style-name="T1">“</text:span></text:span><text:span text:style-name="var-incipit-spoken">Holy Hieromartyr Eusebius</text:span><text:span text:style-name="incipit-spoken">, pray to God for us”</text:span></text:p>
        <text:p text:style-name="Standard"/>
        <text:p text:style-name="P23"><text:span text:style-name="T1">Before last tropar.:</text:span><text:tab/><text:span text:style-name="cue-doxology-spoken"><text:span text:style-name="T1">“Glory”…“Now”…</text:span></text:span></text:p>
        <text:p text:style-name="P16"><text:span text:style-name="T1">on Ode </text:span><text:span text:style-name="src-tone-spoken"><text:span text:style-name="T1">VIII</text:span></text:span><text:span text:style-name="T1">:</text:span><text:tab/><text:span text:style-name="T1">Bef./last tropar.:</text:span><text:tab/><text:span text:style-name="incipit-spoken"><text:span text:style-name="T1">“Let us bless Father, Son, and Holy Spirit, the Lord,</text:span></text:span><text:soft-page-break/><text:tab/><text:tab/><text:tab/><text:tab/><text:tab/><text:tab/><text:tab/><text:span text:style-name="incipit-spoken"><text:span text:style-name="T1">both now and ever and unto the ages of ages”…</text:span></text:span></text:p>
        <text:p text:style-name="P24"><text:span text:style-name="cue-strong"><text:span text:style-name="T13">Katavasia</text:span></text:span><text:span text:style-name="cue-strong"><text:span text:style-name="T23">e</text:span></text:span><text:span text:style-name="cue-strong"><text:span text:style-name="T13">:</text:span></text:span><text:tab/><text:tab/><text:span text:style-name="src-sung"><text:span text:style-name="T1">[MΘ,T.</text:span></text:span><text:span text:style-name="src-tone-sung"><text:span text:style-name="T7">IV</text:span></text:span><text:span text:style-name="src-sung"><text:span text:style-name="T12">]</text:span></text:span><text:tab/><text:tab/><text:tab/><text:span text:style-name="incipit-sung"><text:span text:style-name="T1">“I shall open my mouth and it will be filled”…</text:span></text:span></text:p>
        <text:p text:style-name="Standard"/>
        <text:p text:style-name="Standard"><text:span text:style-name="T1">aft. Ode </text:span><text:span text:style-name="src-tone-spoken"><text:span text:style-name="T1">III</text:span></text:span><text:span text:style-name="T1">:</text:span></text:p>
        <text:p text:style-name="P15">Little Ektenia</text:p>
        <text:p text:style-name="P7"><text:span text:style-name="cue-strong">Kontak.</text:span><text:tab/><text:span text:style-name="src-sung">[</text:span><text:span text:style-name="src-sung"><text:span text:style-name="T24">Minai</text:span></text:span><text:span text:style-name="src-sung">.,</text:span><text:span text:style-name="src-sung"><text:span text:style-name="T25">aft. Ode </text:span></text:span><text:span text:style-name="src-tone-sung"><text:span text:style-name="T7">VI</text:span></text:span><text:span text:style-name="src-sung">,T.</text:span><text:span text:style-name="var-src-tone">IV</text:span><text:span text:style-name="src-sung">]</text:span><text:tab/><text:span text:style-name="var-incipit-sung">“Having lived piously in the rank of hierarch”…</text:span></text:p>
        <text:p text:style-name="P7"><text:span text:style-name="cue-strong"><text:span text:style-name="T17">Sess. hymn</text:span></text:span><text:span text:style-name="cue-strong"> </text:span><text:tab/>⮡<text:span text:style-name="src-spoken"><text:span text:style-name="T1">[</text:span></text:span><text:span text:style-name="src-spoken"><text:span text:style-name="T26">aft. Ode </text:span></text:span><text:span text:style-name="src-tone-spoken">III</text:span><text:span text:style-name="src-spoken"><text:span text:style-name="T1">,T.</text:span></text:span><text:span text:style-name="var-src-tone-spoken">IV</text:span><text:span text:style-name="src-spoken"><text:span text:style-name="T1">]</text:span></text:span><text:tab/><text:span text:style-name="var-incipit-spoken">“Having made thy life radiant with the beauties”…</text:span></text:p>
        <text:p text:style-name="P9"><text:span text:style-name="cue-doxology-spoken">“Glory”…“Now”…</text:span><text:tab/>⮡ <text:tab/><text:tab/><text:tab/><text:tab/><text:span text:style-name="var-incipit-spoken">“O pure and all-immaculate one who knewest”…</text:span></text:p>
        <text:p text:style-name="Standard"/>
        <text:p text:style-name="Standard"><text:span text:style-name="T1">aft. Ode </text:span><text:span text:style-name="src-tone-spoken"><text:span text:style-name="T1">VI</text:span></text:span><text:span text:style-name="T1">:</text:span></text:p>
        <text:p text:style-name="P15">Little Ektenia</text:p>
        <text:p text:style-name="P16"><text:span text:style-name="cue-strong">Kontak.</text:span> <text:tab/><text:tab/><text:span text:style-name="src-sung">[Oktoich.,T.</text:span><text:span text:style-name="src-tone-sung"><text:span text:style-name="T7">IV</text:span></text:span><text:span text:style-name="src-sung">]</text:span> <text:tab/><text:tab/><text:span text:style-name="incipit-sung">“My Savior and Redeemer hath, as God, raise</text:span><text:span text:style-name="incipit-sung"><text:span text:style-name="T14">d</text:span></text:span><text:span text:style-name="incipit-sung">”…</text:span></text:p>
        <text:p text:style-name="P25"><text:span text:style-name="src-spoken">+ Ichos</text:span> <text:tab/><text:tab/><text:tab/><text:span text:style-name="incipit-spoken">“O all ye mortals, let us all hymn Christ, </text:span><text:span text:style-name="incipit-spoken"><text:span text:style-name="T14">the</text:span></text:span><text:span text:style-name="incipit-spoken">”…</text:span></text:p>
        <text:p text:style-name="P9"><text:span text:style-name="T1">aft. Ode </text:span><text:span text:style-name="src-tone-spoken"><text:span text:style-name="T1">VIII</text:span></text:span><text:span text:style-name="T1">:</text:span></text:p>
        <text:p text:style-name="P16"><text:span text:style-name="cue-strong"><text:span text:style-name="T1">Magnifikat</text:span></text:span><text:tab/><text:span text:style-name="src-sung"><text:span text:style-name="T1">[Orolog.,p.68]</text:span></text:span><text:tab/><text:tab/><text:span text:style-name="incipit-sung"><text:span text:style-name="T1">“My soul doth magnify the Lord, and my spirit”…</text:span></text:span></text:p>
        <text:p text:style-name="Standard"/>
        <text:p text:style-name="Standard"><text:span text:style-name="T1">aft. Ode </text:span><text:span text:style-name="src-tone-spoken"><text:span text:style-name="T1">IX</text:span></text:span><text:span text:style-name="T1">:</text:span></text:p>
        <text:p text:style-name="P16"><text:span text:style-name="T1">Little Ektenia; </text:span><text:tab/><text:tab/><text:tab/><text:span text:style-name="T1"> <text:s/></text:span><text:span text:style-name="counter-strong"><text:span text:style-name="T1">3x</text:span></text:span><text:tab/><text:span text:style-name="incipit-sung"><text:span text:style-name="T1">“Holy is the Lord, our God”</text:span></text:span></text:p>
        <text:p text:style-name="P16"><text:span text:style-name="cue-strong"><text:span text:style-name="T17">Exaposteilaria:</text:span></text:span><text:span text:style-name="T1"> Matins Gospel </text:span><text:span text:style-name="T27">V</text:span></text:p>
        <text:p text:style-name="P25"><text:span text:style-name="src-spoken">[Oktoich.]</text:span> <text:tab/><text:tab/><text:tab/><text:span text:style-name="var-incipit-spoken"><text:span text:style-name="T11">“Christ, the Life and the Way, arose from the”…</text:span></text:span></text:p>
        <text:p text:style-name="P26"><text:span text:style-name="cue-doxology-spoken"><text:s text:c="3"/>“Glory”…“Now”…</text:span> <text:tab/><text:span text:style-name="T13">⮡</text:span><text:span text:style-name="src-spoken"><text:span text:style-name="T1"><text:tab/></text:span></text:span> <text:tab/><text:tab/><text:tab/><text:span text:style-name="var-incipit-spoken"><text:span text:style-name="T11">“I hymn Thine immeasurable mercy, O my”…</text:span></text:span></text:p>
        <text:p text:style-name="Standard"/>
        <text:p text:style-name="P27"><text:span text:style-name="cue-strong">Lauds / Praises</text:span> <text:tab/><text:span text:style-name="src-sung">[Orolog.,p.75]</text:span> <text:tab/><text:tab/><text:span text:style-name="T6">8</text:span><text:span text:style-name="T28">+2</text:span><text:span text:style-name="T6"> total</text:span></text:p>
        <text:p text:style-name="P28"><text:span text:style-name="var-field"><text:span text:style-name="T29">7</text:span></text:span> <text:tab/><text:tab/><text:tab/><text:span text:style-name="src-sung">[Oktoich.,T.</text:span><text:span text:style-name="src-tone-sung"><text:span text:style-name="T7">IV</text:span></text:span><text:span text:style-name="src-sung">]</text:span> <text:tab/><text:tab/><text:span text:style-name="incipit-spoken">“O Almighty Lord, Who didst endure the Cros</text:span><text:span text:style-name="incipit-spoken"><text:span text:style-name="T14">s</text:span></text:span><text:span text:style-name="incipit-spoken">”…</text:span></text:p>
        <text:p text:style-name="P29"><text:span text:style-name="var-field"><text:span text:style-name="T30">1</text:span></text:span><text:tab/><text:tab/><text:tab/><text:span text:style-name="T13">⮡</text:span><text:span text:style-name="src-spoken">Doxastik.</text:span><text:tab/><text:tab/><text:span text:style-name="var-incipit-spoken"><text:span text:style-name="T11">“Tell us, O Jews, where is Jesus Whom ye thought”…</text:span></text:span></text:p>
        <text:p text:style-name="P30"><text:span text:style-name="cue-doxology-sung">“Glory”…</text:span> <text:tab/><text:span text:style-name="src-sung">[Evang. Stichiron </text:span><text:span text:style-name="var-src-tone">V</text:span><text:span text:style-name="src-sung">]</text:span><text:tab/><text:span text:style-name="var-incipit-sung"><text:span text:style-name="T11">“O, Thine all-wise judgements, O Christ! How”…</text:span></text:span></text:p>
        <text:p text:style-name="P31"><text:span text:style-name="cue-doxology-sung"><text:span text:style-name="T1">“Now”…</text:span></text:span><text:tab/><text:tab/><text:span text:style-name="src-sung"><text:span text:style-name="T1">[Orolog.,p.</text:span></text:span><text:span text:style-name="src-sung"><text:span text:style-name="T31">7</text:span></text:span><text:span text:style-name="src-sung"><text:span text:style-name="T32">7</text:span></text:span><text:span text:style-name="src-sung"><text:span text:style-name="T1">] </text:span></text:span><text:tab/><text:tab/><text:span text:style-name="incipit-sung"><text:span text:style-name="T1">“Most blessed art thou, O Virgin Theotokos, for”…</text:span></text:span></text:p>
        <text:p text:style-name="Standard"><text:span text:style-name="src-sung"><text:span text:style-name="T1">Great Doxologia</text:span></text:span><text:tab/><text:span text:style-name="T1">⮡</text:span><text:tab/><text:tab/><text:tab/><text:tab/><text:span text:style-name="incipit-sung"><text:span text:style-name="T1">“Glory to God in the highest, and on earth”…</text:span></text:span></text:p>
        <text:p text:style-name="P32"><text:span text:style-name="cue-strong">Resurr. tropar.</text:span><text:tab/>⮡<text:span text:style-name="src-sung">[Week of T.</text:span><text:span text:style-name="src-tone-sung"><text:span text:style-name="T7">IV</text:span></text:span><text:span text:style-name="src-sung">]</text:span><text:tab/><text:span text:style-name="incipit-sung">“Having risen from the tomb and having”…</text:span></text:p>
        <text:p text:style-name="P32"><text:span text:style-name="T1">Two ektenia;</text:span><text:tab/><text:tab/><text:span text:style-name="T1">dismissal;</text:span><text:tab/><text:tab/><text:span text:style-name="incipit-sung"><text:span text:style-name="T1">“Our great lord and father, his Holiness”…</text:span></text:span></text:p>
        <text:h text:style-name="P33" text:outline-level="2">HOURS</text:h>
        <text:p text:style-name="Standard"><text:span text:style-name="cue-strong"><text:span text:style-name="T1">1</text:span></text:span><text:span text:style-name="cue-strong"><text:span text:style-name="T33">st</text:span></text:span><text:span text:style-name="cue-strong"><text:span text:style-name="T1"> / </text:span></text:span><text:span text:style-name="cue-strong"><text:span text:style-name="T34">3</text:span></text:span><text:span text:style-name="cue-strong"><text:span text:style-name="T35">rd</text:span></text:span><text:span text:style-name="cue-strong"><text:span text:style-name="T34"> / </text:span></text:span><text:span text:style-name="cue-strong"><text:span text:style-name="T1">6</text:span></text:span><text:span text:style-name="cue-strong"><text:span text:style-name="T33">th</text:span></text:span></text:p>
        <text:p text:style-name="P16"><text:span text:style-name="cue-strong"><text:span text:style-name="T17">Troparia:</text:span></text:span><text:tab/><text:span text:style-name="src-spoken">[Oktoich.]</text:span> <text:tab/><text:tab/><text:tab/><text:span text:style-name="incipit-spoken">“Having learned the joyful proclamation of </text:span><text:span text:style-name="incipit-spoken"><text:span text:style-name="T14">the</text:span></text:span><text:span text:style-name="incipit-spoken">”…</text:span></text:p>
        <text:p text:style-name="P25"><text:span text:style-name="src-spoken"><text:span text:style-name="T1">[Minai.]</text:span></text:span><text:tab/><text:tab/><text:tab/><text:span text:style-name="var-incipit-spoken">“As thou didst share in the ways of the apostles”…</text:span></text:p>
        <text:p text:style-name="P16"><text:span text:style-name="cue-strong"><text:span text:style-name="T17">Kontak. </text:span></text:span><text:tab/><text:tab/><text:span text:style-name="src-spoken">[Oktoich.]</text:span> <text:tab/><text:tab/><text:tab/><text:span text:style-name="incipit-spoken">“My Savior and Redeemer hath, as God, raise</text:span><text:span text:style-name="incipit-spoken"><text:span text:style-name="T14">d</text:span></text:span><text:span text:style-name="incipit-spoken">”…</text:span></text:p>
        <text:p text:style-name="P9"><text:span text:style-name="var-incipit-spoken"/></text:p>
        <text:h text:style-name="P34" text:outline-level="2">LITURGY OF ST JOHN CHRYSOS-TOMOS</text:h>
        <text:p text:style-name="P27"><text:span text:style-name="cue-strong">Beatitudes: </text:span><text:tab/><text:tab/><text:span text:style-name="src-sung">[Orolog.,p.136]</text:span><text:tab/><text:tab/><text:span text:style-name="T6">8 total</text:span></text:p>
        <text:p text:style-name="P35"><text:span text:style-name="var-field">8</text:span> <text:tab/><text:tab/><text:tab/><text:span text:style-name="src-sung">[Oktoich.,T.</text:span><text:span text:style-name="src-tone-sung"><text:span text:style-name="T7">IV</text:span></text:span><text:span text:style-name="src-sung">]</text:span> <text:tab/><text:tab/><text:span text:style-name="incipit-spoken">“By the tree was Adam forced to depart from”…</text:span></text:p>
        <text:p text:style-name="Standard"/>
        <text:p text:style-name="Standard"><text:span text:style-name="cue-strong">Troparia:</text:span> <text:tab/><text:tab/><text:span text:style-name="src-sung">[Oktoich.,T.</text:span><text:span text:style-name="src-tone-sung"><text:span text:style-name="T7">IV</text:span></text:span><text:span text:style-name="src-sung">]</text:span> <text:tab/><text:tab/><text:span text:style-name="incipit-sung">“Having learned the joyful proclamation of </text:span><text:span text:style-name="incipit-sung"><text:span text:style-name="T14">the</text:span></text:span><text:span text:style-name="incipit-sung">”…</text:span></text:p>
        <text:p text:style-name="P36"><text:span text:style-name="src-sung"><text:span text:style-name="T1">[</text:span></text:span><text:span text:style-name="src-sung"><text:span text:style-name="T7">Temple</text:span></text:span><text:span text:style-name="src-sung"><text:span text:style-name="T1">,T.</text:span></text:span><text:span text:style-name="src-tone-sung"><text:span text:style-name="T1">I</text:span></text:span><text:span text:style-name="src-tone-sung"><text:span text:style-name="T7">V</text:span></text:span><text:span text:style-name="src-sung"><text:span text:style-name="T1">]</text:span></text:span><text:tab/><text:tab/><text:span text:style-name="incipit-sung"><text:span text:style-name="T13">“From thy youth didst thou love Christ, O”…</text:span></text:span></text:p>
        <text:p text:style-name="P37"><text:span text:style-name="src-sung">[</text:span><text:span text:style-name="src-sung"><text:span text:style-name="T24">Minai</text:span></text:span><text:span text:style-name="src-sung">.,T.</text:span><text:span text:style-name="var-src-tone">IV</text:span><text:span text:style-name="src-sung">]</text:span><text:tab/><text:tab/><text:span text:style-name="var-incipit-sung">“As thou didst share in the ways of the”…</text:span></text:p>
        <text:p text:style-name="P27"><text:span text:style-name="cue-strong">Kontakia:</text:span> <text:tab/><text:tab/><text:span text:style-name="src-sung">[Oktoich.,T.</text:span><text:span text:style-name="src-tone-sung"><text:span text:style-name="T7">IV</text:span></text:span><text:span text:style-name="src-sung">]</text:span> <text:tab/><text:tab/><text:span text:style-name="incipit-sung">“My Savior and Redeemer hath, as God, raise</text:span><text:span text:style-name="incipit-sung"><text:span text:style-name="T14">d</text:span></text:span><text:span text:style-name="incipit-sung">”…</text:span></text:p>
        <text:p text:style-name="P36"><text:span text:style-name="src-sung"><text:span text:style-name="T1">[</text:span></text:span><text:span text:style-name="src-sung"><text:span text:style-name="T7">Temple</text:span></text:span><text:span text:style-name="src-sung"><text:span text:style-name="T1">,T.</text:span></text:span><text:span text:style-name="src-tone-sung"><text:span text:style-name="T7">II</text:span></text:span><text:span text:style-name="src-sung"><text:span text:style-name="T1">]</text:span></text:span><text:tab/><text:tab/><text:span text:style-name="incipit-sung"><text:span text:style-name="T13">“Having forsaken the beauty of the world and”…</text:span></text:span></text:p>
        <text:p text:style-name="P7"><text:span text:style-name="cue-doxology-sung"><text:span text:style-name="T13">“Glory”…</text:span></text:span><text:tab/><text:tab/><text:span text:style-name="src-sung">[</text:span><text:span text:style-name="src-sung"><text:span text:style-name="T24">Minai</text:span></text:span><text:span text:style-name="src-sung">.,T.</text:span><text:span text:style-name="var-src-tone">IV</text:span><text:span text:style-name="src-sung">]</text:span><text:tab/><text:tab/><text:span text:style-name="var-incipit-sung">“Having lived piously in the rank of hierarch”…</text:span></text:p>
        <text:p text:style-name="P16"><text:span text:style-name="cue-doxology-sung"><text:span text:style-name="T13">“Now”…</text:span></text:span><text:tab/><text:tab/><text:span text:style-name="src-sung"><text:span text:style-name="T1">[T.</text:span></text:span><text:span text:style-name="src-tone-sung"><text:span text:style-name="T1">VI</text:span></text:span><text:span text:style-name="src-sung"><text:span text:style-name="T1">]</text:span></text:span><text:tab/><text:tab/><text:tab/><text:span text:style-name="incipit-sung"><text:span text:style-name="T1">“O protection of Christians that cannot be put”…</text:span></text:span></text:p>
        <text:p text:style-name="Standard"/>
        <text:p text:style-name="P27"><text:span text:style-name="cue-strong">Prokeimen.<text:tab/></text:span> <text:tab/><text:span text:style-name="src-sung">[Oktoich.,T.</text:span><text:span text:style-name="src-tone-sung"><text:span text:style-name="T7">IV</text:span></text:span><text:span text:style-name="src-sung">]</text:span> <text:tab/><text:tab/><text:span text:style-name="incipit-sung">“How magnified are Thy works O Lord! In”…</text:span></text:p>
        <text:p text:style-name="P25"><text:span text:style-name="src-spoken">+ Stichos</text:span> <text:tab/><text:tab/><text:tab/><text:span text:style-name="incipit-spoken">“Bless the Lord, O my soul; O Lord my God, </text:span><text:span text:style-name="incipit-spoken"><text:span text:style-name="T14">Thou</text:span></text:span><text:span text:style-name="incipit-spoken">”…</text:span></text:p>
        <text:p text:style-name="Standard"><text:span text:style-name="cue-strong">Alleluia<text:tab/></text:span> <text:tab/><text:tab/><text:span text:style-name="src-spoken">[Oktoich.,T.</text:span><text:span text:style-name="src-tone-spoken">IV</text:span><text:span text:style-name="src-spoken">]</text:span> <text:tab/><text:tab/><text:span text:style-name="incipit-spoken">“Bend Thy bow, and proceed prosperously, an</text:span><text:span text:style-name="incipit-spoken"><text:span text:style-name="T14">d</text:span></text:span><text:span text:style-name="incipit-spoken">”…</text:span></text:p>
        <text:p text:style-name="P25"><text:span text:style-name="src-spoken">+ Stichos</text:span> <text:tab/><text:tab/><text:tab/><text:span text:style-name="incipit-spoken">“Thou hast loved righteousness and hated”…</text:span></text:p>
        <text:p text:style-name="Standard"/>
        <text:p text:style-name="Standard"><text:span text:style-name="cue-strong"><text:span text:style-name="T13">Communion sticho</text:span></text:span><text:span text:style-name="cue-strong"><text:span text:style-name="T36">s<text:tab/></text:span></text:span><text:tab/><text:tab/><text:tab/><text:span text:style-name="incipit-sung"><text:span text:style-name="T13">“Praise the Lord from the heavens, praise </text:span></text:span><text:span text:style-name="incipit-sung"><text:span text:style-name="T37">Him</text:span></text:span><text:span text:style-name="incipit-sung"><text:span text:style-name="T13">”…</text:span></text:span></text:p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 SemiBold" svg:font-family="'Noto Sans SemiBold'" style:font-adornments="Italic" style:font-family-generic="swiss" style:font-pitch="variable"/>
    <style:font-face style:name="Noto Sans SemiBold1" svg:font-family="'Noto Sans SemiBold'" style:font-adornments="Regular" style:font-family-generic="swiss" style:font-pitch="variable"/>
    <style:font-face style:name="Noto Sans1" svg:font-family="'Noto Sans'" style:font-family-generic="system" style:font-pitch="variable"/>
    <style:font-face style:name="Noto Sans2" svg:font-family="'Noto Sans'" style:font-adornments="Italic" style:font-family-generic="swiss" style:font-pitch="variable"/>
    <style:font-face style:name="Noto Serif" svg:font-family="'Noto Serif'" style:font-family-generic="roman" style:font-pitch="variable"/>
    <style:font-face style:name="Noto Serif SemiBold" svg:font-family="'Noto Serif SemiBold'" style:font-adornments="Regular" style:font-family-generic="roman" style:font-pitch="variable"/>
    <style:font-face style:name="OpenSymbol" svg:font-family="OpenSymbol" style:font-charset="x-symbol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fo:color="#000000" loext:opacity="100%" style:font-name="Noto Sans" fo:font-size="8.60000038146973pt" fo:language="en" fo:country="US" style:font-name-asian="Tahoma" style:font-size-asian="8.60000038146973pt" style:language-asian="zh" style:country-asian="CN" style:font-name-complex="Tahoma" style:font-size-complex="8.60000038146973pt" style:language-complex="hi" style:country-complex="IN"/>
    </style:default-style>
    <style:default-style style:family="paragraph">
      <style:paragraph-properties fo:orphans="0" fo:widows="0" fo:hyphenation-ladder-count="no-limit" fo:hyphenation-keep="auto" loext:hyphenation-keep-type="column" loext:hyphenation-keep-line="false" style:text-autospace="ideograph-alpha" style:punctuation-wrap="hanging" style:line-break="strict" style:tab-stop-distance="0.25in" style:writing-mode="lr-tb"/>
      <style:text-properties fo:color="#000000" loext:opacity="100%" style:font-name="Noto Sans" fo:font-size="8.60000038146973pt" fo:language="en" fo:country="US" style:font-name-asian="Tahoma" style:font-size-asian="8.60000038146973pt" style:language-asian="zh" style:country-asian="CN" style:font-name-complex="Tahoma" style:font-size-complex="8.60000038146973pt" style:language-complex="hi" style:country-complex="IN" fo:hyphenate="fals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0252in" style:contextual-spacing="false" fo:text-align="start" style:justify-single-word="false"/>
      <style:text-properties fo:color="#666666" loext:opacity="100%" style:font-name="Noto Sans" fo:font-family="'Noto Sans'" style:font-family-generic="swiss" style:font-pitch="variable" fo:font-size="8.60000038146973pt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Heading_20_2" style:display-name="Heading 2" style:family="paragraph" style:parent-style-name="Standard" style:class="chapter">
      <style:paragraph-properties fo:margin-left="0in" fo:margin-right="3.5201in" fo:margin-top="0.0453in" fo:margin-bottom="0.0654in" style:contextual-spacing="false" fo:text-align="center" style:justify-single-word="false" style:border-line-width="0.0083in 0.0083in 0.0165in" fo:padding="0.0098in" fo:border="2.41pt double #111111" fo:keep-with-next="always"/>
      <style:text-properties fo:color="#111111" loext:opacity="100%" style:font-name="Noto Sans SemiBold1" fo:font-family="'Noto Sans SemiBold'" style:font-style-name="Regular" style:font-family-generic="swiss" style:font-pitch="variable"/>
    </style:style>
    <style:style style:name="Heading_20_2_20_Long_20_Box" style:display-name="Heading 2 Long Box" style:family="paragraph" style:parent-style-name="Heading_20_2">
      <style:paragraph-properties fo:margin-left="0in" fo:margin-right="0.75in" fo:margin-top="0.0453in" fo:margin-bottom="0.0654in" style:contextual-spacing="false" fo:text-align="center" style:justify-single-word="false" fo:hyphenation-ladder-count="no-limit" fo:hyphenation-keep="auto" loext:hyphenation-keep-type="column" loext:hyphenation-keep-line="false" style:border-line-width="0.0083in 0.0083in 0.0165in" fo:padding="0.0098in" fo:border="2.41pt double #111111" fo:keep-with-next="always"/>
      <style:text-properties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ue-strong" style:family="text">
      <style:text-properties fo:color="#111111" loext:opacity="100%" style:font-name="Noto Sans SemiBold1" fo:font-family="'Noto Sans SemiBold'" style:font-style-name="Regular" style:font-family-generic="swiss" style:font-pitch="variable"/>
    </style:style>
    <style:style style:name="counter-strong" style:family="text">
      <style:text-properties fo:color="#111111" loext:opacity="100%" style:font-name="Noto Sans SemiBold1" fo:font-family="'Noto Sans SemiBold'" style:font-style-name="Regular" style:font-family-generic="swiss" style:font-pitch="variable" fo:font-style="normal"/>
    </style:style>
    <style:style style:name="cue-doxology-spoken" style:family="text">
      <style:text-properties fo:color="#666666" loext:opacity="100%" style:font-name="Noto Sans2" fo:font-family="'Noto Sans'" style:font-style-name="Italic" style:font-family-generic="swiss" style:font-pitch="variable" fo:font-style="italic"/>
    </style:style>
    <style:style style:name="cue-doxology-sung" style:family="text">
      <style:text-properties fo:color="#000000" loext:opacity="100%" style:font-name="Noto Sans SemiBold" fo:font-family="'Noto Sans SemiBold'" style:font-style-name="Italic" style:font-family-generic="swiss" style:font-pitch="variable" fo:font-style="italic"/>
    </style:style>
    <style:style style:name="src-sung" style:family="text">
      <style:text-properties fo:color="#000000" loext:opacity="100%" style:font-name="Noto Sans SemiBold1" fo:font-family="'Noto Sans SemiBold'" style:font-style-name="Regular" style:font-family-generic="swiss" style:font-pitch="variable" fo:font-size="7pt" fo:font-weight="600"/>
    </style:style>
    <style:style style:name="src-spoken" style:family="text">
      <style:text-properties fo:color="#666666" loext:opacity="100%" style:font-name="Noto Sans" fo:font-family="'Noto Sans'" style:font-family-generic="swiss" style:font-pitch="variable" fo:font-size="7pt"/>
    </style:style>
    <style:style style:name="src-tone-sung" style:family="text">
      <style:text-properties fo:color="#000000" loext:opacity="100%" style:font-name="Noto Serif SemiBold" fo:font-family="'Noto Serif SemiBold'" style:font-style-name="Regular" style:font-family-generic="roman" style:font-pitch="variable" fo:font-size="7pt" fo:font-weight="600"/>
    </style:style>
    <style:style style:name="src-tone-spoken" style:family="text">
      <style:text-properties fo:color="#666666" loext:opacity="100%" style:font-name="Noto Serif" fo:font-family="'Noto Serif'" style:font-family-generic="roman" style:font-pitch="variable" fo:font-size="7pt"/>
    </style:style>
    <style:style style:name="incipit-sung" style:family="text">
      <style:text-properties fo:color="#000000" loext:opacity="100%" style:font-name="Noto Sans SemiBold" fo:font-family="'Noto Sans SemiBold'" style:font-style-name="Italic" style:font-family-generic="swiss" style:font-pitch="variable" fo:font-style="italic"/>
    </style:style>
    <style:style style:name="incipit-spoken" style:family="text">
      <style:text-properties fo:color="#666666" loext:opacity="100%" style:font-name="Noto Sans2" fo:font-family="'Noto Sans'" style:font-style-name="Italic" style:font-family-generic="swiss" style:font-pitch="variable" fo:font-style="italic"/>
    </style:style>
    <style:style style:name="bullet-symbol" style:family="text"/>
    <style:style style:name="var-field" style:family="text">
      <style:text-properties fo:color="#111111" loext:opacity="100%" style:font-name="Noto Sans SemiBold1" fo:font-family="'Noto Sans SemiBold'" style:font-style-name="Regular" style:font-family-generic="swiss" style:font-pitch="variable" fo:background-color="#fff2cc"/>
    </style:style>
    <style:style style:name="var-src" style:family="text">
      <style:text-properties fo:color="#000000" loext:opacity="100%" style:font-name="Noto Sans SemiBold1" fo:font-family="'Noto Sans SemiBold'" style:font-style-name="Regular" style:font-family-generic="swiss" style:font-pitch="variable" fo:font-size="7pt" fo:font-weight="600" fo:background-color="#fff2cc"/>
    </style:style>
    <style:style style:name="var-src-tone" style:family="text">
      <style:text-properties fo:color="#000000" loext:opacity="100%" style:font-name="Noto Serif SemiBold" fo:font-family="'Noto Serif SemiBold'" style:font-style-name="Regular" style:font-family-generic="roman" style:font-pitch="variable" fo:font-size="7pt" fo:font-weight="600" fo:background-color="#fff2cc"/>
    </style:style>
    <style:style style:name="var-incipit" style:family="text">
      <style:text-properties fo:color="#666666" loext:opacity="100%" style:font-name="Noto Sans2" fo:font-family="'Noto Sans'" style:font-style-name="Italic" style:font-family-generic="swiss" style:font-pitch="variable" fo:font-style="italic" fo:background-color="#fff2cc"/>
    </style:style>
    <style:style style:name="_5f_myBold" style:display-name="_myBold" style:family="text">
      <style:text-properties fo:color="#000000" loext:opacity="100%" style:font-name="Noto Sans SemiBold1" fo:font-family="'Noto Sans SemiBold'" style:font-style-name="Regular" style:font-family-generic="swiss" style:font-pitch="variable" fo:font-size="8.60000038146973pt"/>
    </style:style>
    <style:style style:name="Bullet_5f_5f_5f_20_5f_5f_5f_Symbols" style:display-name="Bullet_5f_20_5f_Symbols" style:family="text"/>
    <style:style style:name="_5f_myQuotationItalic" style:display-name="_myQuotationItalic" style:family="text">
      <style:text-properties style:font-name="Noto Sans2" fo:font-family="'Noto Sans'" style:font-style-name="Italic" style:font-family-generic="swiss" style:font-pitch="variable" fo:font-size="8.60000038146973pt" fo:font-style="italic"/>
    </style:style>
    <style:style style:name="_5f_myQuotationBold" style:display-name="_myQuotationBold" style:family="text" style:parent-style-name="_5f_myQuotationItalic">
      <style:text-properties fo:color="#000000" loext:opacity="100%" style:font-name="Noto Sans SemiBold" fo:font-family="'Noto Sans SemiBold'" style:font-style-name="Italic" style:font-family-generic="swiss" style:font-pitch="variable" fo:font-weight="600"/>
    </style:style>
    <style:style style:name="var-incipit-sung" style:family="text">
      <style:text-properties fo:color="#000000" loext:opacity="100%" style:font-name="Noto Sans SemiBold" fo:font-family="'Noto Sans SemiBold'" style:font-style-name="Italic" style:font-family-generic="swiss" style:font-pitch="variable" fo:font-style="italic" fo:background-color="#fff2cc"/>
    </style:style>
    <style:style style:name="var-incipit-spoken" style:family="text">
      <style:text-properties fo:color="#666666" loext:opacity="100%" style:font-name="Noto Sans2" fo:font-family="'Noto Sans'" style:font-style-name="Italic" style:font-family-generic="swiss" style:font-pitch="variable" fo:font-style="italic" fo:background-color="#fff2cc"/>
    </style:style>
    <style:style style:name="var-src-sung" style:family="text">
      <style:text-properties fo:color="#000000" loext:opacity="100%" style:font-name="Noto Sans SemiBold1" fo:font-family="'Noto Sans SemiBold'" style:font-style-name="Regular" style:font-family-generic="swiss" style:font-pitch="variable" fo:font-size="7pt" fo:font-weight="600" fo:background-color="#fff2cc"/>
    </style:style>
    <style:style style:name="var-src-spoken" style:family="text">
      <style:text-properties fo:color="#666666" loext:opacity="100%" style:font-name="Noto Sans" fo:font-family="'Noto Sans'" style:font-family-generic="swiss" style:font-pitch="variable" fo:font-size="7pt" fo:background-color="#fff2cc"/>
    </style:style>
    <style:style style:name="var-src-tone-sung" style:family="text">
      <style:text-properties fo:color="#000000" loext:opacity="100%" style:font-name="Noto Serif SemiBold" fo:font-family="'Noto Serif SemiBold'" style:font-style-name="Regular" style:font-family-generic="roman" style:font-pitch="variable" fo:font-size="7pt" fo:font-weight="600" fo:background-color="#fff2cc"/>
    </style:style>
    <style:style style:name="var-src-tone-spoken" style:family="text">
      <style:text-properties fo:color="#666666" loext:opacity="100%" style:font-name="Noto Serif" fo:font-family="'Noto Serif'" style:font-family-generic="roman" style:font-pitch="variable" fo:font-size="7pt" fo:background-color="#fff2c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11in" fo:page-height="8.5in" style:num-format="1" style:print-orientation="landscape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title>Weekly Outline 2026-06-28 Tone III St Jonah print style candidate</meta:title>
    <dc:date>2026-06-17T17:29:05.323503670</dc:date>
    <meta:editing-duration>PT9H44M6S</meta:editing-duration>
    <meta:editing-cycles>13</meta:editing-cycles>
    <meta:generator>LibreOfficeDev/26.2.4.0.0$Linux_X86_64 LibreOffice_project/d9a14b9b3eb39e1636bf69b77bc9945234bcbc5d</meta:generator>
    <meta:document-statistic meta:table-count="1" meta:image-count="0" meta:object-count="0" meta:page-count="2" meta:paragraph-count="104" meta:word-count="911" meta:character-count="5867" meta:non-whitespace-character-count="4828"/>
  </office:meta>
</office:document-meta>
</file>