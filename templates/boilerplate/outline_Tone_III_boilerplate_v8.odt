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d29ec"/>
    </style:style>
    <style:style style:name="P20" style:family="paragraph" style:parent-style-name="Standard">
      <style:text-properties officeooo:paragraph-rsid="0017e1c4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1105c6"/>
    </style:style>
    <style:style style:name="P25" style:family="paragraph" style:parent-style-name="Standard">
      <style:paragraph-properties fo:margin-left="1.5in" fo:text-indent="0in" style:auto-text-indent="false"/>
    </style:style>
    <style:style style:name="P26" style:family="paragraph" style:parent-style-name="Standard">
      <style:text-properties officeooo:paragraph-rsid="00086dd0"/>
    </style:style>
    <style:style style:name="P27" style:family="paragraph" style:parent-style-name="Standard">
      <style:paragraph-properties fo:margin-left="0.5in" fo:text-indent="0in" style:auto-text-indent="false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1c1c1f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9ca7c" fo:background-color="transparent" loext:char-shading-value="0"/>
    </style:style>
    <style:style style:name="T8" style:family="text">
      <style:text-properties officeooo:rsid="001c1c1f"/>
    </style:style>
    <style:style style:name="T9" style:family="text">
      <style:text-properties fo:font-size="8.60000038146973pt"/>
    </style:style>
    <style:style style:name="T10" style:family="text">
      <style:text-properties officeooo:rsid="0016e83a"/>
    </style:style>
    <style:style style:name="T11" style:family="text">
      <style:text-properties officeooo:rsid="00176dab" fo:background-color="transparent" loext:char-shading-value="0"/>
    </style:style>
    <style:style style:name="T12" style:family="text">
      <style:text-properties fo:font-size="8.60000038146973pt" fo:background-color="transparent" loext:char-shading-value="0"/>
    </style:style>
    <style:style style:name="T13" style:family="text">
      <style:text-properties officeooo:rsid="001081f5" fo:background-color="transparent" loext:char-shading-value="0"/>
    </style:style>
    <style:style style:name="T14" style:family="text">
      <style:text-properties officeooo:rsid="0017e1c4"/>
    </style:style>
    <style:style style:name="T15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6" style:family="text">
      <style:text-properties officeooo:rsid="001c2bf2" fo:background-color="transparent" loext:char-shading-value="0"/>
    </style:style>
    <style:style style:name="T17" style:family="text">
      <style:text-properties fo:font-size="8.60000038146973pt" officeooo:rsid="00176dab" fo:background-color="transparent" loext:char-shading-value="0"/>
    </style:style>
    <style:style style:name="T18" style:family="text">
      <style:text-properties fo:font-size="8.60000038146973pt" officeooo:rsid="0000c400"/>
    </style:style>
    <style:style style:name="T19" style:family="text">
      <style:text-properties style:text-position="super 58%" officeooo:rsid="00232009" fo:background-color="transparent" loext:char-shading-value="0"/>
    </style:style>
    <style:style style:name="T20" style:family="text">
      <style:text-properties officeooo:rsid="00232009" fo:background-color="transparent" loext:char-shading-value="0"/>
    </style:style>
    <style:style style:name="T21" style:family="text">
      <style:text-properties style:text-position="super 58%" officeooo:rsid="000e90cb" fo:background-color="transparent" loext:char-shading-value="0"/>
    </style:style>
    <style:style style:name="T22" style:family="text">
      <style:text-properties officeooo:rsid="000e90cb" fo:background-color="transparent" loext:char-shading-value="0"/>
    </style:style>
    <style:style style:name="T23" style:family="text">
      <style:text-properties fo:font-size="7.90000009536743pt" fo:background-color="transparent" loext:char-shading-value="0"/>
    </style:style>
    <style:style style:name="T24" style:family="text">
      <style:text-properties fo:font-size="8.60000038146973pt" officeooo:rsid="001af3bc" fo:background-color="transparent" loext:char-shading-value="0"/>
    </style:style>
    <style:style style:name="T25" style:family="text">
      <style:text-properties officeooo:rsid="000ef31a"/>
    </style:style>
    <style:style style:name="T26" style:family="text">
      <style:text-properties officeooo:rsid="001081f5"/>
    </style:style>
    <style:style style:name="T27" style:family="text">
      <style:text-properties officeooo:rsid="000ef31a" fo:background-color="transparent" loext:char-shading-value="0"/>
    </style:style>
    <style:style style:name="T28" style:family="text">
      <style:text-properties officeooo:rsid="000ce31b" fo:background-color="transparent" loext:char-shading-value="0"/>
    </style:style>
    <style:style style:name="T29" style:family="text">
      <style:text-properties fo:font-size="8.60000038146973pt" officeooo:rsid="001c19ba" fo:background-color="transparent" loext:char-shading-value="0"/>
    </style:style>
    <style:style style:name="T30" style:family="text">
      <style:text-properties officeooo:rsid="00195f46" fo:background-color="transparent" loext:char-shading-value="0"/>
    </style:style>
    <style:style style:name="T31" style:family="text">
      <style:text-properties officeooo:rsid="00113855" fo:background-color="transparent" loext:char-shading-value="0"/>
    </style:style>
    <style:style style:name="T32" style:family="text">
      <style:text-properties style:text-position="super 58%" fo:background-color="transparent" loext:char-shading-value="0"/>
    </style:style>
    <style:style style:name="T33" style:family="text">
      <style:text-properties fo:font-size="8.60000038146973pt" officeooo:rsid="00195f46" fo:background-color="transparent" loext:char-shading-value="0"/>
    </style:style>
    <style:style style:name="T34" style:family="text">
      <style:text-properties officeooo:rsid="0008dabd"/>
    </style:style>
    <style:style style:name="T35" style:family="text">
      <style:text-properties style:text-position="super 58%" fo:font-size="8.60000038146973pt" officeooo:rsid="0019ca7c" fo:background-color="transparent" loext:char-shading-value="0"/>
    </style:style>
    <style:style style:name="T36" style:family="text">
      <style:text-properties fo:font-size="8.60000038146973pt" officeooo:rsid="0019ca7c" fo:background-color="transparent" loext:char-shading-value="0"/>
    </style:style>
    <style:style style:name="T37" style:family="text">
      <style:text-properties fo:font-size="8.60000038146973pt" officeooo:rsid="001c1c1f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___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I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___</text:span></text:span>: <text:span text:style-name="T3">___</text:span></text:p>
              </table:table-cell>
              <table:table-cell table:style-name="Table4.A2" office:value-type="string">
                <text:p text:style-name="P3"><text:span text:style-name="rank-marker-field">[ §___ – ___ svc ]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count-total-field"><text:span text:style-name="count-total-field">10+2 total</text:span></text:span></text:p>
        <text:p text:style-name="P6"><text:span text:style-name="var-field">___</text:span> <text:span text:style-name="src-sung"><text:span text:style-name="T1">stichira:</text:span></text:span><text:tab/><text:span text:style-name="src-sung">[Oktoichos,T.</text:span><text:span text:style-name="src-tone-sung"><text:span text:style-name="T6">III</text:span></text:span><text:span text:style-name="src-sung">]</text:span><text:tab/><text:span text:style-name="incipit-sung">“By Thy Cross hast Thou destroyed the might”…</text:span></text:p>
        <text:p text:style-name="P7"><text:span text:style-name="var-field">___</text:span>” <text:tab/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How can we not marvel at thy bearing the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5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___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O Christ, Who by Thy suffering didst darke</text:span><text:span text:style-name="incipit-sung"><text:span text:style-name="T8">n</text:span></text:span><text:span text:style-name="incipit-sung">”…</text:span></text:p>
        <text:p text:style-name="P7"><text:span text:style-name="cue-doxology-sung"><text:span text:style-name="T9">“Glory”…</text:span></text:span> 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10">III</text:span></text:span><text:span text:style-name="src-sung">]</text:span> <text:tab/><text:tab/><text:span text:style-name="var-incipit-sung">“</text:span><text:span text:style-name="var-incipit-sung"><text:span text:style-name="T8">Through the divine Spirit, by the will of the</text:span></text:span><text:span text:style-name="var-incipit-sung">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1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2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III</text:span></text:span><text:span text:style-name="src-sung">]</text:span><text:tab/> <text:span text:style-name="counter-strong"><text:span text:style-name="T12">2x</text:span></text:span><text:tab/><text:span text:style-name="incipit-sung">“Let the heavens be glad; let earthly thing</text:span><text:span text:style-name="incipit-sung"><text:span text:style-name="T8">s</text:span></text:span><text:span text:style-name="incipit-sung">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3">Minai</text:span></text:span><text:span text:style-name="src-sung"><text:span text:style-name="T1">.,T.</text:span></text:span><text:span text:style-name="var-src-tone">___</text:span><text:span text:style-name="src-sung"><text:span text:style-name="T1">]</text:span></text:span><text:tab/> <text:span text:style-name="counter-strong"><text:span text:style-name="T12">1x</text:span></text:span> <text:tab/><text:span text:style-name="var-incipit-sung">“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4">III</text:span></text:span><text:span text:style-name="src-sung">]</text:span> <text:tab/><text:tab/><text:span text:style-name="var-incipit-sung">“We hymn thee who hast mediated the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1</text:span></text:span><text:span text:style-name="cue-strong"><text:span text:style-name="T15">st</text:span></text:span><text:span text:style-name="cue-strong"><text:span text:style-name="T5"> chant/Psaltiri</text:span></text:span><text:tab/><text:span text:style-name="src-spoken">[Vigil bk p.61]</text:span> <text:tab/><text:tab/><text:span text:style-name="incipit-spoken">“Save me, O Lord, for a righteous man there </text:span><text:span text:style-name="incipit-spoken"><text:span text:style-name="T8">is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III</text:span><text:span text:style-name="src-spoken">]</text:span> <text:tab/><text:tab/><text:span text:style-name="incipit-spoken">“Christ hath arisen from the dead, the firs</text:span><text:span text:style-name="incipit-spoken"><text:span text:style-name="T8">tfruits</text:span></text:span><text:span text:style-name="incipit-spoken">”…</text:span></text:p>
        <text:p text:style-name="P19"><text:span text:style-name="T1"><text:s/></text:span><text:span text:style-name="cue-doxology-spoken"><text:span text:style-name="T1">“Glory”…</text:span></text:span><text:span text:style-name="cue-doxology-sung"><text:span text:style-name="T12">“Now”…</text:span></text:span><text:span text:style-name="src-sung"><text:span text:style-name="T1">Theotok.</text:span></text:span><text:span text:style-name="T1">⮡</text:span><text:tab/><text:tab/><text:span text:style-name="var-incipit-sung"><text:span text:style-name="T9">“We hymn thee who hast mediated the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2</text:span></text:span><text:span text:style-name="cue-strong"><text:span text:style-name="T15">nd</text:span></text:span><text:span text:style-name="cue-strong"><text:span text:style-name="T5"> chant/Psaltiri</text:span></text:span><text:tab/><text:span text:style-name="src-spoken">[Vigil bk p.73]</text:span> <text:tab/><text:tab/><text:span text:style-name="incipit-spoken">“The heavens declare the glory of God, and </text:span><text:span text:style-name="incipit-spoken"><text:span text:style-name="T8">the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III</text:span><text:span text:style-name="src-spoken">]</text:span> <text:tab/><text:tab/><text:span text:style-name="incipit-spoken">“Terrified of Thine immutable divinity and”…</text:span></text:p>
        <text:p text:style-name="Standard"/>
        <text:p text:style-name="P20"><text:span text:style-name="cue-strong"><text:span text:style-name="T12">Psalm 118</text:span></text:span><text:tab/><text:tab/><text:span text:style-name="src-sung"><text:span text:style-name="T1">[Orolog.,p.</text:span></text:span><text:span text:style-name="src-sung"><text:span text:style-name="T16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2">Polyeleos</text:span></text:span><text:tab/><text:tab/><text:tab/><text:tab/><text:span text:style-name="T1">⮡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2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2">“</text:span></text:span><text:span text:style-name="incipit-sung"><text:span text:style-name="T17">We magnify thee, O holy </text:span></text:span><text:span text:style-name="var-incipit-sung"><text:span text:style-name="T18">___</text:span></text:span><text:span text:style-name="incipit-sung"><text:span text:style-name="T12">”…</text:span></text:span></text:p>
        <text:p text:style-name="P21"><text:span text:style-name="cue-strong"><text:span text:style-name="T12">Evlogitaria</text:span></text:span><text:tab/><text:tab/><text:span text:style-name="src-sung"><text:span text:style-name="T1">[Orolog.,p.</text:span></text:span><text:span text:style-name="src-sung"><text:span text:style-name="T16">61</text:span></text:span><text:span text:style-name="src-sung"><text:span text:style-name="T1">]</text:span></text:span><text:tab/><text:tab/><text:span text:style-name="incipit-sung"><text:span text:style-name="T12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5">Ypakoi</text:span></text:span> <text:tab/><text:tab/><text:span text:style-name="src-spoken">[Oktoich.,T.</text:span><text:span text:style-name="src-tone-spoken">III</text:span><text:span text:style-name="src-spoken">]</text:span> <text:tab/><text:tab/><text:tab/><text:span text:style-name="incipit-spoken">“Amazing the myrrh-bearing women by the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2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19">st</text:span></text:span><text:span text:style-name="src-spoken"><text:span text:style-name="T20"> </text:span>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19">nd</text:span><text:span text:style-name="T20"> 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23"><text:span text:style-name="cue-doxology-spoken"><text:span text:style-name="T12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Standard"/>
        <text:p text:style-name="P24"><text:span text:style-name="src-sung"><text:span text:style-name="T1">Hymns/Ascents:1</text:span></text:span><text:span text:style-name="src-sung"><text:span text:style-name="T21">st</text:span></text:span><text:span text:style-name="src-sung"><text:span text:style-name="T22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III</text:span></text:span><text:span text:style-name="src-sung">]</text:span><text:tab/><text:span text:style-name="incipit-sung">“Thou didst move the captivity of Sion away”…</text:span></text:p>
        <text:p text:style-name="Standard"><text:span text:style-name="cue-strong">Prokeimen.</text:span> <text:tab/><text:tab/><text:tab/><text:tab/>⮡ <text:tab/><text:tab/><text:span text:style-name="incipit-sung">“Say among the nations that the Lord is Kin</text:span><text:span text:style-name="incipit-sung"><text:span text:style-name="T8">g</text:span></text:span><text:span text:style-name="incipit-sung">”…</text:span></text:p>
        <text:p text:style-name="P25"><text:span text:style-name="T1">⮡</text:span><text:tab/><text:tab/><text:span text:style-name="incipit-sung"><text:span text:style-name="T1">“Let every breath praise the Lord”</text:span></text:span></text:p>
        <text:p text:style-name="P26"><text:span text:style-name="cue-strong"><text:span text:style-name="T5">Matins Gospel </text:span></text:span><text:span text:style-name="var-src-tone-spoken"><text:span text:style-name="var-src-tone-spoken">___</text:span></text:span><text:tab/> <text:span text:style-name="src-spoken">[</text:span><text:span text:style-name="var-src-tone-spoken"><text:span text:style-name="var-src-tone-spoken">___</text:span></text:span><text:span text:style-name="src-spoken">]</text:span> <text:tab/><text:tab/><text:tab/><text:span text:style-name="var-incipit-spoken">“”…</text:span></text:p>
        <text:p text:style-name="Standard"/>
        <text:p text:style-name="Standard"><text:span text:style-name="src-sung"><text:span text:style-name="T23">Resurr. hymn</text:span></text:span><text:tab/><text:span text:style-name="src-sung"><text:span text:style-name="T23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7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7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7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He, Who of old gathered the waters into on</text:span><text:span text:style-name="incipit-sung"><text:span text:style-name="T8">e</text:span></text:span><text:span text:style-name="incipit-sung">”…</text:span></text:p>
        <text:p text:style-name="P4"><text:span text:style-name="count-total-field">6 total</text:span></text:p>
        <text:p text:style-name="P18"><text:span text:style-name="count-spoken"><text:span text:style-name="count-spoken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count-spoken"><text:span text:style-name="count-spoken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2">“Glory to Thy precious Cross&amp; Resurrection, O Lord”</text:span></text:span></text:p>
        <text:p text:style-name="P18"><text:span text:style-name="count-spoken"><text:span text:style-name="count-spoken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<text:span text:style-name="count-spoken">3</text:span><text:tab/><text:span text:style-name="var-field">___</text:span> <text:tab/><text:tab/><text:tab/><text:span text:style-name="src-spoken">[Minai.]</text:span> <text:tab/><text:tab/><text:span text:style-name="incipit-spoken"><text:span text:style-name="T1">“</text:span></text:span><text:span text:style-name="var-incipit-spoken">___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2">Katavasia</text:span></text:span><text:span text:style-name="cue-strong"><text:span text:style-name="T24">e</text:span></text:span><text:span text:style-name="cue-strong"><text:span text:style-name="T12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1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26">aft. Ode </text:span></text:span><text:span text:style-name="src-tone-sung"><text:span text:style-name="T6">VI</text:span></text:span><text:span text:style-name="src-sung">,T.</text:span><text:span text:style-name="var-src-tone">___</text:span><text:span text:style-name="src-sung">]</text:span><text:tab/><text:span text:style-name="var-incipit-sung">“”…</text:span></text:p>
        <text:p text:style-name="P31"><text:span text:style-name="src-spoken">+ Ichos</text:span> <text:tab/><text:tab/><text:tab/><text:span text:style-name="var-incipit-spoken">“”…</text:span></text:p>
        <text:p text:style-name="P7"><text:span text:style-name="cue-strong"><text:span text:style-name="T5">Sess. hymn</text:span></text:span><text:span text:style-name="cue-strong"> </text:span><text:tab/>⮡<text:span text:style-name="src-spoken"><text:span text:style-name="T1">[</text:span></text:span><text:span text:style-name="src-spoken"><text:span text:style-name="T27">aft. Ode </text:span></text:span><text:span text:style-name="src-tone-spoken">III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“”…</text:span></text:p>
        <text:p text:style-name="P9"><text:span text:style-name="cue-doxology-spoken">“Glory”…“Now”…</text:span><text:tab/>⮡ <text:tab/><text:tab/><text:tab/><text:tab/><text:span text:style-name="var-incipit-spoken">“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Thou didst rise today from the tomb, O”…</text:span></text:p>
        <text:p text:style-name="P32"><text:span text:style-name="src-spoken">+ Ichos</text:span> <text:tab/><text:tab/><text:tab/><text:span text:style-name="incipit-spoken">“Let heaven and earth join chorus today and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5">Exaposteilaria:</text:span></text:span><text:span text:style-name="T1"> Matins Gospel </text:span><text:span text:style-name="var-src-tone-spoken">___</text:span></text:p>
        <text:p text:style-name="P32"><text:span text:style-name="src-spoken">[Oktoich.]</text:span> <text:tab/><text:tab/><text:tab/><text:span text:style-name="var-incipit-spoken"><text:span text:style-name="T9">“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”…</text:span></text:p>
        <text:p text:style-name="P27"><text:span text:style-name="cue-doxology-spoken">“Now”…</text:span> <text:tab/><text:span text:style-name="src-spoken">[Oktoich.]</text:span> <text:tab/><text:tab/><text:tab/><text:span text:style-name="var-incipit-spoken"><text:span text:style-name="T9">“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count-total-field">___ total</text:span></text:p>
        <text:p text:style-name="P35"><text:span text:style-name="var-field">___</text:span> <text:tab/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poken">“Come, all ye nations, and understand the p</text:span><text:span text:style-name="incipit-spoken"><text:span text:style-name="T8">ower</text:span></text:span><text:span text:style-name="incipit-spoken">”…</text:span></text:p>
        <text:p text:style-name="P7"><text:span text:style-name="var-field">___</text:span> <text:tab/><text:tab/><text:tab/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 <text:tab/><text:tab/><text:span text:style-name="var-incipit-spoken">“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”</text:span></text:p>
              <text:p text:style-name="P37"><text:span text:style-name="var-incipit-sung">“”</text:span></text:p>
            </table:table-cell>
          </table:table-row>
        </table:table>
        <text:p text:style-name="P38"><text:span text:style-name="var-field"><text:span text:style-name="T29">1</text:span></text:span><text:tab/><text:tab/><text:tab/><text:span text:style-name="T12">⮡</text:span><text:span text:style-name="src-spoken">Doxastik.</text:span><text:tab/><text:tab/><text:span text:style-name="var-incipit-spoken"><text:span text:style-name="T9">“The Jews closed Life within the tomb, but the”…</text:span></text:span></text:p>
        <text:p text:style-name="P39"><text:span text:style-name="cue-doxology-sung">“Glory”…</text:span> <text:span text:style-name="src-sung">[Evang. Stichiron </text:span><text:span text:style-name="var-src-tone"><text:span text:style-name="T26">___</text:span></text:span><text:span text:style-name="src-sung">]</text:span><text:tab/><text:span text:style-name="var-incipit-sung"><text:span text:style-name="T9">“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0">7</text:span></text:span><text:span text:style-name="src-sung"><text:span text:style-name="T31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III</text:span></text:span><text:span text:style-name="src-sung">]</text:span><text:tab/><text:span text:style-name="incipit-sung">“Today is Salvation come to the world. Let us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2">st</text:span></text:span><text:span text:style-name="cue-strong"><text:span text:style-name="T1"> / 6</text:span></text:span><text:span text:style-name="cue-strong"><text:span text:style-name="T32">th</text:span></text:span></text:p>
        <text:p text:style-name="P18"><text:span text:style-name="cue-strong"><text:span text:style-name="T5">Troparia:</text:span></text:span><text:tab/><text:span text:style-name="src-spoken">[Oktoich.]</text:span> <text:tab/><text:tab/><text:tab/><text:span text:style-name="incipit-spoken">“Let the heavens be glad, let earthly thing</text:span><text:span text:style-name="incipit-spoken"><text:span text:style-name="T8">s</text:span></text:span><text:span text:style-name="incipit-spoken">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18"><text:span text:style-name="cue-strong"><text:span text:style-name="T5">Kontak. </text:span></text:span><text:tab/><text:tab/><text:span text:style-name="src-spoken">[Oktoich.]</text:span> <text:tab/><text:tab/><text:tab/><text:span text:style-name="incipit-spoken">“Thou didst rise today from the tomb, O mer”…</text:span></text:p>
        <text:p text:style-name="Standard"/>
        <text:p text:style-name="P42"><text:span text:style-name="cue-strong"><text:span text:style-name="T1">3</text:span></text:span><text:span text:style-name="cue-strong"><text:span text:style-name="T32">rd</text:span></text:span></text:p>
        <text:p text:style-name="P43"><text:span text:style-name="cue-strong"><text:span text:style-name="T5">Troparia:</text:span></text:span><text:tab/><text:span text:style-name="src-spoken">[Oktoich.]</text:span> <text:tab/><text:tab/><text:tab/><text:span text:style-name="incipit-spoken">“Let the heavens be glad, let earthly thing</text:span><text:span text:style-name="incipit-spoken"><text:span text:style-name="T8">s</text:span></text:span><text:span text:style-name="incipit-spoken">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45"><text:span text:style-name="cue-strong"><text:span text:style-name="T5">Kontak.</text:span></text:span> <text:tab/><text:tab/>⮡ <text:tab/><text:tab/><text:tab/><text:tab/><text:span text:style-name="var-incipit-spoken">“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count-total-field">___ total</text:span></text:p>
        <text:p text:style-name="P47"><text:span text:style-name="var-field">___</text:span> <text:tab/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poken">“From paradise didst Thou drive our forefat</text:span><text:span text:style-name="incipit-spoken"><text:span text:style-name="T8">her</text:span></text:span><text:span text:style-name="incipit-spoken">”…</text:span></text:p>
        <text:p text:style-name="P48"><text:span text:style-name="var-field"><text:span text:style-name="T33">4</text:span></text:span><text:tab/><text:tab/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34">Ode </text:span></text:span><text:span text:style-name="var-src-tone">___</text:span><text:span text:style-name="src-sung">]<text:tab/></text:span><text:tab/><text:span text:style-name="var-incipit-spoken"><text:span text:style-name="T9">“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Let the heavens be glad, let earthly thing</text:span><text:span text:style-name="incipit-sung"><text:span text:style-name="T8">s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2">“From thy youth didst thou love Christ, O”…</text:span></text:span></text:p>
        <text:p text:style-name="P50"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Thou didst rise today from the tomb, O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2">“Having forsaken the beauty of the world and”…</text:span></text:span></text:p>
        <text:p text:style-name="P7"><text:span text:style-name="cue-doxology-sung"><text:span text:style-name="T12">“Glory”…</text:span></text:span><text:tab/><text:tab/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18"><text:span text:style-name="cue-doxology-sung"><text:span text:style-name="T12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O chant unto our God, chant ye; chant unto”…</text:span></text:p>
        <text:p text:style-name="P32"><text:span text:style-name="src-spoken">+ Stichos</text:span> <text:tab/><text:tab/><text:tab/><text:span text:style-name="incipit-spoken">“Clap your hands, all ye nations; shout unt</text:span><text:span text:style-name="incipit-spoken"><text:span text:style-name="T8">o God</text:span></text:span><text:span text:style-name="incipit-spoken">”…</text:span></text:p>
        <text:p text:style-name="P37"><text:span text:style-name="cue-strong"><text:span text:style-name="T12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><text:span text:style-name="cue-strong">Alleluiaria:</text:span> <text:tab/><text:tab/><text:span text:style-name="src-spoken">[Oktoich.,T.</text:span><text:span text:style-name="src-tone-spoken">III</text:span><text:span text:style-name="src-spoken">]</text:span> <text:tab/><text:tab/><text:span text:style-name="incipit-spoken">“Of Thy mercies, O Lord, will I sing foreve</text:span><text:span text:style-name="incipit-spoken"><text:span text:style-name="T8">r, unto</text:span></text:span><text:span text:style-name="incipit-spoken">”…</text:span></text:p>
        <text:p text:style-name="P32"><text:span text:style-name="src-spoken">+ Stichos</text:span> <text:tab/><text:tab/><text:tab/><text:span text:style-name="incipit-spoken">“For Thou hast said: Mercy shall be built u</text:span><text:span text:style-name="incipit-spoken"><text:span text:style-name="T8">p for</text:span></text:span><text:span text:style-name="incipit-spoken">”…</text:span></text:p>
        <text:p text:style-name="P37"><text:span text:style-name="cue-strong"><text:span text:style-name="T36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/>
        <text:p text:style-name="Standard"><text:span text:style-name="cue-strong"><text:span text:style-name="T12">Communion stichoi:</text:span></text:span><text:span text:style-name="T1"> </text:span><text:tab/><text:tab/><text:tab/><text:tab/><text:span text:style-name="incipit-sung"><text:span text:style-name="T12">“Praise the Lord from the heavens, praise </text:span></text:span><text:span text:style-name="incipit-sung"><text:span text:style-name="T37">Him</text:span></text:span><text:span text:style-name="incipit-sung"><text:span text:style-name="T12">”…</text:span></text:span></text:p>
        <text:p text:style-name="P51"><text:span text:style-name="var-incipit-sung"><text:span text:style-name="T9">“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ount-total-field" style:family="text">
      <style:text-properties fo:color="#666666" style:font-name="Noto Sans" fo:font-size="8.60000038146973pt" fo:font-weight="normal" fo:background-color="#fff2cc" style:text-underline-style="solid" style:text-underline-width="auto" style:text-underline-color="font-color"/>
    </style:style>
    <style:style style:name="count-spoken" style:family="text">
      <style:text-properties fo:color="#666666" style:font-name="Noto Sans" fo:font-size="8.60000038146973pt" fo:font-weight="normal" fo:background-color="transparent" style:char-shading-value="0"/>
    </style:style>
    <style:style style:name="count-paired-field" style:family="text">
      <style:text-properties fo:color="#111111" style:font-name="Noto Sans SemiBold1" fo:font-size="8.60000038146973pt" fo:font-weight="600" fo:background-color="#fff2cc"/>
    </style:style>
    <style:style style:name="rank-marker-field" style:family="text">
      <style:text-properties fo:color="#111111" style:font-name="Noto Sans" fo:font-size="7pt" fo:font-weight="normal" fo:background-color="#fff2cc"/>
    </style:style>
    <style:style style:name="var-field-neutral" style:family="text">
      <style:text-properties fo:color="#111111" style:font-name="Noto Sans" fo:font-size="8.60000038146973pt" fo:font-weight="normal" fo:background-color="#fff2cc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00:25:15.194537610</dc:date>
    <meta:editing-duration>PT9H18M9S</meta:editing-duration>
    <meta:editing-cycles>11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924" meta:character-count="6065" meta:non-whitespace-character-count="4988"/>
  </office:meta>
</office:document-meta>
</file>