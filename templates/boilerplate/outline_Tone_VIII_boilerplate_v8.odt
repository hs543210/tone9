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8dabd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08dabd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08dabd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76dab" fo:background-color="transparent" loext:char-shading-value="0"/>
    </style:style>
    <style:style style:name="T12" style:family="text">
      <style:text-properties fo:font-size="8.60000038146973pt" fo:background-color="transparent" loext:char-shading-value="0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font-size="8.60000038146973pt" officeooo:rsid="0008dabd"/>
    </style:style>
    <style:style style:name="T16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7" style:family="text">
      <style:text-properties officeooo:rsid="001c2bf2" fo:background-color="transparent" loext:char-shading-value="0"/>
    </style:style>
    <style:style style:name="T18" style:family="text">
      <style:text-properties fo:font-size="8.60000038146973pt" officeooo:rsid="00176dab" fo:background-color="transparent" loext:char-shading-value="0"/>
    </style:style>
    <style:style style:name="T19" style:family="text">
      <style:text-properties fo:font-size="8.60000038146973pt" officeooo:rsid="0000c400"/>
    </style:style>
    <style:style style:name="T20" style:family="text">
      <style:text-properties style:text-position="super 58%" officeooo:rsid="00232009" fo:background-color="transparent" loext:char-shading-value="0"/>
    </style:style>
    <style:style style:name="T21" style:family="text">
      <style:text-properties officeooo:rsid="00232009" fo:background-color="transparent" loext:char-shading-value="0"/>
    </style:style>
    <style:style style:name="T22" style:family="text">
      <style:text-properties style:text-position="super 58%" officeooo:rsid="000e90cb" fo:background-color="transparent" loext:char-shading-value="0"/>
    </style:style>
    <style:style style:name="T23" style:family="text">
      <style:text-properties officeooo:rsid="000e90cb" fo:background-color="transparent" loext:char-shading-value="0"/>
    </style:style>
    <style:style style:name="T24" style:family="text">
      <style:text-properties fo:font-size="7.90000009536743pt" fo:background-color="transparent" loext:char-shading-value="0"/>
    </style:style>
    <style:style style:name="T25" style:family="text">
      <style:text-properties fo:font-size="8.60000038146973pt" officeooo:rsid="001af3bc" fo:background-color="transparent" loext:char-shading-value="0"/>
    </style:style>
    <style:style style:name="T26" style:family="text">
      <style:text-properties officeooo:rsid="000ef31a"/>
    </style:style>
    <style:style style:name="T27" style:family="text">
      <style:text-properties officeooo:rsid="001081f5"/>
    </style:style>
    <style:style style:name="T28" style:family="text">
      <style:text-properties officeooo:rsid="000ef31a" fo:background-color="transparent" loext:char-shading-value="0"/>
    </style:style>
    <style:style style:name="T29" style:family="text">
      <style:text-properties officeooo:rsid="000ce31b" fo:background-color="transparent" loext:char-shading-value="0"/>
    </style:style>
    <style:style style:name="T30" style:family="text">
      <style:text-properties fo:font-size="8.60000038146973pt" officeooo:rsid="001c19ba" fo:background-color="transparent" loext:char-shading-value="0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fo:font-size="8.60000038146973pt" officeooo:rsid="00195f46" fo:background-color="transparent" loext:char-shading-value="0"/>
    </style:style>
    <style:style style:name="T35" style:family="text">
      <style:text-properties style:text-position="super 58%" fo:font-size="8.60000038146973pt" officeooo:rsid="0019ca7c" fo:background-color="transparent" loext:char-shading-value="0"/>
    </style:style>
    <style:style style:name="T36" style:family="text">
      <style:text-properties fo:font-size="8.60000038146973pt" officeooo:rsid="0019ca7c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VI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VIII</text:span></text:span><text:span text:style-name="src-sung">]</text:span><text:tab/><text:span text:style-name="incipit-sung">“We offer to Thee, O Christ, </text:span><text:span text:style-name="incipit-sung"><text:span text:style-name="T7">evening hymnody</text:span></text:span><text:span text:style-name="incipit-sung">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<text:span text:style-name="T9">“Who doth not call thee blessed, O all-holy”…</text:span>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Having descended from heaven, O Jesus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0">VIII</text:span></text:span><text:span text:style-name="src-sung">]</text:span> <text:tab/><text:span text:style-name="var-incipit-sung">“</text:span><text:span text:style-name="var-incipit-sung"><text:span text:style-name="T7">O unwedded Virgin who ineffably conceived</text:span></text:span><text:span text:style-name="var-incipit-sung">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1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2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VIII</text:span></text:span><text:span text:style-name="src-sung">]</text:span> <text:span text:style-name="counter-strong"><text:span text:style-name="T12">2x</text:span></text:span><text:tab/><text:span text:style-name="incipit-sung">“From on high didst Thou descend, O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2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VIII</text:span></text:span><text:span text:style-name="src-sung">]</text:span> <text:tab/><text:span text:style-name="var-incipit-sung"><text:span text:style-name="T9">“O Good One, Who for our sake </text:span></text:span><text:span text:style-name="var-incipit-sung"><text:span text:style-name="T15">wast born of</text:span></text:span><text:span text:style-name="var-incipit-sung"><text:span text:style-name="T9">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6">st</text:span></text:span><text:span text:style-name="cue-strong"><text:span text:style-name="T5"> chant/Psaltiri</text:span></text:span><text:tab/><text:span text:style-name="src-spoken">[Vigil bk p.66]</text:span> <text:tab/><text:tab/><text:span text:style-name="incipit-spoken">“Hearken, O Lord, unto my righteousness, attend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II</text:span><text:span text:style-name="src-spoken">]</text:span> <text:tab/><text:span text:style-name="incipit-spoken">“Thou didst arise from the dead, O Life of all, and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2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9">“O Good One, Who for our sake </text:span></text:span><text:span text:style-name="var-incipit-sung"><text:span text:style-name="T15">wast born of</text:span></text:span><text:span text:style-name="var-incipit-sung"><text:span text:style-name="T9">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6">nd</text:span></text:span><text:span text:style-name="cue-strong"><text:span text:style-name="T5"> chant/Psaltiri</text:span></text:span><text:tab/><text:span text:style-name="src-spoken">[Vigil bk p.81]</text:span> <text:tab/><text:tab/><text:span text:style-name="incipit-spoken">“The earth is the Lord’s, and the fullness thereof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VIII</text:span><text:span text:style-name="src-spoken">]</text:span> <text:tab/><text:span text:style-name="incipit-spoken">“Men sealed Thy tomb, O Savior, but an angel”…</text:span></text:p>
        <text:p text:style-name="Standard"/>
        <text:p text:style-name="P20"><text:span text:style-name="cue-strong"><text:span text:style-name="T12">Psalm 118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2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2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2">“</text:span></text:span><text:span text:style-name="incipit-sung"><text:span text:style-name="T18">We magnify thee, O holy </text:span></text:span><text:span text:style-name="var-incipit-sung"><text:span text:style-name="T19">___</text:span></text:span><text:span text:style-name="incipit-sung"><text:span text:style-name="T12">”…</text:span></text:span></text:p>
        <text:p text:style-name="P21"><text:span text:style-name="cue-strong"><text:span text:style-name="T12">Evlogitaria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2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VIII</text:span><text:span text:style-name="src-spoken">]</text:span> <text:tab/><text:tab/><text:span text:style-name="incipit-spoken">“Standing before the tomb of the Bestower of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2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20">st</text:span></text:span><text:span text:style-name="src-spoken"><text:span text:style-name="T21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20">nd</text:span><text:span text:style-name="T21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23"><text:span text:style-name="cue-doxology-spoken"><text:span text:style-name="T12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2">st</text:span></text:span><text:span text:style-name="src-sung"><text:span text:style-name="T23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VIII</text:span></text:span><text:span text:style-name="src-sung">]</text:span><text:tab/><text:span text:style-name="incipit-sung">“From my youth hath many passions”…</text:span></text:p>
        <text:p text:style-name="Standard"><text:span text:style-name="cue-strong">Prokeimen.</text:span> <text:tab/><text:tab/><text:tab/><text:tab/>⮡ <text:tab/><text:tab/><text:span text:style-name="incipit-sung">“The Lord shall be king unto eternity, Thy”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4">Resurr. hymn</text:span></text:span><text:tab/><text:span text:style-name="src-sung"><text:span text:style-name="T24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The staff of Moses, once working a wonder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2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2">Katavasia</text:span></text:span><text:span text:style-name="cue-strong"><text:span text:style-name="T25">e</text:span></text:span><text:span text:style-name="cue-strong"><text:span text:style-name="T12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1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27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8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Having risen from the tomb, Thou didst raise”…</text:span></text:p>
        <text:p text:style-name="P32"><text:span text:style-name="src-spoken">+ Ichos</text:span> <text:tab/><text:tab/><text:tab/><text:span text:style-name="incipit-spoken">“O my long-suffering Savior, Bestower of life Who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9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9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poken">“O Lord, though Thou didst stand forth before”…</text:span></text:p>
        <text:p text:style-name="P7"><text:span text:style-name="var-field">___</text:span> <text:tab/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30">1</text:span></text:span><text:tab/><text:tab/><text:tab/><text:span text:style-name="T12">⮡</text:span><text:span text:style-name="src-spoken">Doxastik.</text:span><text:tab/><text:tab/><text:span text:style-name="var-incipit-spoken"><text:span text:style-name="T9">“When Thou, O Lord, didst arrive at the </text:span></text:span><text:span text:style-name="var-incipit-spoken"><text:span text:style-name="T15">gates of</text:span></text:span><text:span text:style-name="var-incipit-spoken"><text:span text:style-name="T9">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7">___</text:span></text:span><text:span text:style-name="src-sung">]</text:span><text:tab/><text:span text:style-name="var-incipit-sung"><text:span text:style-name="T9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VIII</text:span></text:span><text:span text:style-name="src-sung">]</text:span><text:tab/><text:span text:style-name="incipit-sung">“Having risen from the tomb and having </text:span><text:span text:style-name="incipit-sung"><text:span text:style-name="T7">burst</text:span></text:span><text:span text:style-name="incipit-sung">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6</text:span></text:span><text:span text:style-name="cue-strong"><text:span text:style-name="T33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From on high didst Thou </text:span><text:span text:style-name="incipit-spoken"><text:span text:style-name="T7">descend, O</text:span></text:span><text:span text:style-name="incipit-spoken">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Having risen from the tomb, Thou didst raise up”…</text:span></text:p>
        <text:p text:style-name="Standard"/>
        <text:p text:style-name="P42"><text:span text:style-name="cue-strong"><text:span text:style-name="T1">3</text:span></text:span><text:span text:style-name="cue-strong"><text:span text:style-name="T33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From on high didst Thou descend, O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poken">“Remember us, O Christ, Thou Savior of the”…</text:span></text:p>
        <text:p text:style-name="P48"><text:span text:style-name="var-field"><text:span text:style-name="T34">4</text:span></text:span><text:tab/><text:tab/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7">Ode </text:span></text:span><text:span text:style-name="var-src-tone">___</text:span><text:span text:style-name="src-sung">]<text:tab/></text:span><text:tab/><text:span text:style-name="var-incipit-spoken"><text:span text:style-name="T9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From on high didst Thou descend, O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2">“From thy youth didst thou love Christ, O”…</text:span></text:span></text:p>
        <text:p text:style-name="P50"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Having risen from the tomb, Thou didst raise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2">“Having forsaken the beauty of the world and”…</text:span></text:span></text:p>
        <text:p text:style-name="P7"><text:span text:style-name="cue-doxology-sung"><text:span text:style-name="T12">“Glory”…</text:span></text:span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18"><text:span text:style-name="cue-doxology-sung"><text:span text:style-name="T12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VIII</text:span></text:span><text:span text:style-name="src-sung">]</text:span> <text:tab/><text:span text:style-name="incipit-sung">“Make your vows and pay them to the Lord”…</text:span></text:p>
        <text:p text:style-name="P32"><text:span text:style-name="src-spoken">+ Stichos</text:span> <text:tab/><text:tab/><text:tab/><text:span text:style-name="incipit-spoken">“In Judea is God known, His name is great in”…</text:span></text:p>
        <text:p text:style-name="P37"><text:span text:style-name="cue-strong"><text:span text:style-name="T12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VIII</text:span><text:span text:style-name="src-spoken">]</text:span> <text:tab/><text:span text:style-name="incipit-spoken">“Come let us rejoice in the Lord, let us shout with”…</text:span></text:p>
        <text:p text:style-name="P32"><text:span text:style-name="src-spoken">+ Stichos</text:span> <text:tab/><text:tab/><text:tab/><text:span text:style-name="incipit-spoken">“Let us come before His countenance with”…</text:span></text:p>
        <text:p text:style-name="P37"><text:span text:style-name="cue-strong"><text:span text:style-name="T36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8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<text:span text:style-name="T12">Communion stichoi:</text:span></text:span><text:span text:style-name="T1"> </text:span><text:tab/><text:tab/><text:tab/><text:tab/><text:span text:style-name="incipit-sung"><text:span text:style-name="T12">“Praise the Lord from the heavens, praise”…</text:span></text:span></text:p>
        <text:p text:style-name="P51"><text:span text:style-name="var-incipit-sung"><text:span text:style-name="T9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6T23:51:38.864790367</dc:date>
    <meta:editing-duration>PT9H22M41S</meta:editing-duration>
    <meta:editing-cycles>11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20" meta:character-count="6038" meta:non-whitespace-character-count="4981"/>
  </office:meta>
</office:document-meta>
</file>