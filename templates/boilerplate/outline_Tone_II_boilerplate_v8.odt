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0d29ec"/>
    </style:style>
    <style:style style:name="P20" style:family="paragraph" style:parent-style-name="Standard">
      <style:text-properties officeooo:paragraph-rsid="0017e1c4"/>
    </style:style>
    <style:style style:name="P21" style:family="paragraph" style:parent-style-name="Standard">
      <style:text-properties officeooo:paragraph-rsid="001c2bf2"/>
    </style:style>
    <style:style style:name="P22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3" style:family="paragraph" style:parent-style-name="Standard">
      <style:text-properties officeooo:paragraph-rsid="001081f5"/>
    </style:style>
    <style:style style:name="P24" style:family="paragraph" style:parent-style-name="Standard">
      <style:text-properties officeooo:paragraph-rsid="001105c6"/>
    </style:style>
    <style:style style:name="P25" style:family="paragraph" style:parent-style-name="Standard">
      <style:paragraph-properties fo:margin-left="1.5in" fo:text-indent="0in" style:auto-text-indent="false"/>
    </style:style>
    <style:style style:name="P26" style:family="paragraph" style:parent-style-name="Standard">
      <style:text-properties officeooo:paragraph-rsid="00086dd0"/>
    </style:style>
    <style:style style:name="P27" style:family="paragraph" style:parent-style-name="Standard">
      <style:paragraph-properties fo:margin-left="0.5in" fo:text-indent="0in" style:auto-text-indent="false"/>
    </style:style>
    <style:style style:name="P28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9" style:family="paragraph" style:parent-style-name="Standard">
      <style:paragraph-properties fo:margin-left="0.75in" fo:text-indent="0in" style:auto-text-indent="false"/>
    </style:style>
    <style:style style:name="P30" style:family="paragraph" style:parent-style-name="Standard">
      <style:text-properties officeooo:paragraph-rsid="001324cb"/>
    </style:style>
    <style:style style:name="P31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2" style:family="paragraph" style:parent-style-name="Standard">
      <style:paragraph-properties fo:margin-left="1in" fo:text-indent="0in" style:auto-text-indent="false"/>
    </style:style>
    <style:style style:name="P33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4" style:family="paragraph" style:parent-style-name="Standard">
      <style:text-properties officeooo:paragraph-rsid="00195f46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6" style:family="paragraph" style:parent-style-name="Standard">
      <style:paragraph-properties fo:text-align="end" style:justify-single-word="false"/>
      <style:text-properties officeooo:paragraph-rsid="001c19ba"/>
    </style:style>
    <style:style style:name="P37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38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1" style:family="paragraph" style:parent-style-name="Standard">
      <style:paragraph-properties fo:text-align="start" style:justify-single-word="false"/>
      <style:text-properties officeooo:paragraph-rsid="0007bf68"/>
    </style:style>
    <style:style style:name="P42" style:family="paragraph" style:parent-style-name="Standard">
      <style:text-properties officeooo:paragraph-rsid="001e17ae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4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5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6" style:family="paragraph" style:parent-style-name="Heading_20_2_20_Long_20_Box">
      <style:text-properties fo:background-color="transparent"/>
    </style:style>
    <style:style style:name="P47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09d3a4"/>
    </style:style>
    <style:style style:name="P49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0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1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19ca7c" fo:background-color="transparent" loext:char-shading-value="0"/>
    </style:style>
    <style:style style:name="T8" style:family="text">
      <style:text-properties officeooo:rsid="0009d3a4"/>
    </style:style>
    <style:style style:name="T9" style:family="text">
      <style:text-properties fo:font-size="8.60000038146973pt"/>
    </style:style>
    <style:style style:name="T10" style:family="text">
      <style:text-properties officeooo:rsid="0016e83a"/>
    </style:style>
    <style:style style:name="T11" style:family="text">
      <style:text-properties officeooo:rsid="00176dab" fo:background-color="transparent" loext:char-shading-value="0"/>
    </style:style>
    <style:style style:name="T12" style:family="text">
      <style:text-properties fo:font-size="8.60000038146973pt" fo:background-color="transparent" loext:char-shading-value="0"/>
    </style:style>
    <style:style style:name="T13" style:family="text">
      <style:text-properties officeooo:rsid="001081f5" fo:background-color="transparent" loext:char-shading-value="0"/>
    </style:style>
    <style:style style:name="T14" style:family="text">
      <style:text-properties officeooo:rsid="0017e1c4"/>
    </style:style>
    <style:style style:name="T15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6" style:family="text">
      <style:text-properties fo:font-size="8.60000038146973pt" officeooo:rsid="0009d3a4"/>
    </style:style>
    <style:style style:name="T17" style:family="text">
      <style:text-properties officeooo:rsid="001c2bf2" fo:background-color="transparent" loext:char-shading-value="0"/>
    </style:style>
    <style:style style:name="T18" style:family="text">
      <style:text-properties fo:font-size="8.60000038146973pt" officeooo:rsid="00176dab" fo:background-color="transparent" loext:char-shading-value="0"/>
    </style:style>
    <style:style style:name="T19" style:family="text">
      <style:text-properties fo:font-size="8.60000038146973pt" officeooo:rsid="0000c400"/>
    </style:style>
    <style:style style:name="T20" style:family="text">
      <style:text-properties style:text-position="super 58%" officeooo:rsid="00232009" fo:background-color="transparent" loext:char-shading-value="0"/>
    </style:style>
    <style:style style:name="T21" style:family="text">
      <style:text-properties officeooo:rsid="00232009" fo:background-color="transparent" loext:char-shading-value="0"/>
    </style:style>
    <style:style style:name="T22" style:family="text">
      <style:text-properties style:text-position="super 58%" officeooo:rsid="000e90cb" fo:background-color="transparent" loext:char-shading-value="0"/>
    </style:style>
    <style:style style:name="T23" style:family="text">
      <style:text-properties officeooo:rsid="000e90cb" fo:background-color="transparent" loext:char-shading-value="0"/>
    </style:style>
    <style:style style:name="T24" style:family="text">
      <style:text-properties fo:font-size="7.90000009536743pt" fo:background-color="transparent" loext:char-shading-value="0"/>
    </style:style>
    <style:style style:name="T25" style:family="text">
      <style:text-properties fo:font-size="8.60000038146973pt" officeooo:rsid="001af3bc" fo:background-color="transparent" loext:char-shading-value="0"/>
    </style:style>
    <style:style style:name="T26" style:family="text">
      <style:text-properties officeooo:rsid="000ef31a"/>
    </style:style>
    <style:style style:name="T27" style:family="text">
      <style:text-properties officeooo:rsid="001081f5"/>
    </style:style>
    <style:style style:name="T28" style:family="text">
      <style:text-properties officeooo:rsid="000ef31a" fo:background-color="transparent" loext:char-shading-value="0"/>
    </style:style>
    <style:style style:name="T29" style:family="text">
      <style:text-properties officeooo:rsid="000ce31b" fo:background-color="transparent" loext:char-shading-value="0"/>
    </style:style>
    <style:style style:name="T30" style:family="text">
      <style:text-properties fo:font-size="8.60000038146973pt" officeooo:rsid="001c19ba" fo:background-color="transparent" loext:char-shading-value="0"/>
    </style:style>
    <style:style style:name="T31" style:family="text">
      <style:text-properties officeooo:rsid="00195f46" fo:background-color="transparent" loext:char-shading-value="0"/>
    </style:style>
    <style:style style:name="T32" style:family="text">
      <style:text-properties officeooo:rsid="00113855" fo:background-color="transparent" loext:char-shading-value="0"/>
    </style:style>
    <style:style style:name="T33" style:family="text">
      <style:text-properties style:text-position="super 58%" fo:background-color="transparent" loext:char-shading-value="0"/>
    </style:style>
    <style:style style:name="T34" style:family="text">
      <style:text-properties fo:font-size="8.60000038146973pt" officeooo:rsid="00195f46" fo:background-color="transparent" loext:char-shading-value="0"/>
    </style:style>
    <style:style style:name="T35" style:family="text">
      <style:text-properties officeooo:rsid="0008dabd"/>
    </style:style>
    <style:style style:name="T36" style:family="text">
      <style:text-properties style:text-position="super 58%" fo:font-size="8.60000038146973pt" officeooo:rsid="0019ca7c" fo:background-color="transparent" loext:char-shading-value="0"/>
    </style:style>
    <style:style style:name="T37" style:family="text">
      <style:text-properties fo:font-size="8.60000038146973pt" officeooo:rsid="0019ca7c" fo:background-color="transparent" loext:char-shading-value="0"/>
    </style:style>
    <style:style style:name="T38" style:family="text">
      <style:text-properties fo:font-size="8.60000038146973pt" officeooo:rsid="0009d3a4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___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___</text:span></text:span>: <text:span text:style-name="T3">___</text:span></text:p>
              </table:table-cell>
              <table:table-cell table:style-name="Table4.A2" office:value-type="string">
                <text:p text:style-name="P3"><text:span text:style-name="rank-marker-field">[ §___ – ___ svc ]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count-total-field"><text:span text:style-name="count-total-field">10+2 total</text:span></text:span></text:p>
        <text:p text:style-name="P6"><text:span text:style-name="var-field">___</text:span> <text:span text:style-name="src-sung"><text:span text:style-name="T1">stichira:</text:span></text:span><text:tab/><text:span text:style-name="src-sung">[Oktoichos,T.</text:span><text:span text:style-name="src-tone-sung"><text:span text:style-name="T6">II</text:span></text:span><text:span text:style-name="src-sung">]</text:span><text:tab/><text:tab/><text:span text:style-name="incipit-sung">“Come ye, let us worship God the Word, Who”…</text:span></text:p>
        <text:p text:style-name="P7"><text:span text:style-name="var-field">___</text:span>” <text:tab/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e shadow of the law passed away when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5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___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y Resurrection, O Christ our Savior, hat</text:span><text:span text:style-name="incipit-sung"><text:span text:style-name="T8">h</text:span></text:span><text:span text:style-name="incipit-sung">”…</text:span></text:p>
        <text:p text:style-name="P7"><text:span text:style-name="cue-doxology-sung"><text:span text:style-name="T9">“Glory”…</text:span></text:span> 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 <text:tab/><text:tab/><text:span text:style-name="var-incipit-spoken">“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10">II</text:span></text:span><text:span text:style-name="src-sung">]</text:span> <text:tab/><text:tab/><text:span text:style-name="var-incipit-sung">“O new wonder greater than all the wonders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1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2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II</text:span></text:span><text:span text:style-name="src-sung">]</text:span><text:tab/> <text:span text:style-name="counter-strong"><text:span text:style-name="T12">2x</text:span></text:span><text:tab/><text:span text:style-name="incipit-sung">“When Thou didst descend unto death, O Life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3">Minai</text:span></text:span><text:span text:style-name="src-sung"><text:span text:style-name="T1">.,T.</text:span></text:span><text:span text:style-name="var-src-tone">___</text:span><text:span text:style-name="src-sung"><text:span text:style-name="T1">]</text:span></text:span><text:tab/> <text:span text:style-name="counter-strong"><text:span text:style-name="T12">1x</text:span></text:span> <text:tab/><text:span text:style-name="var-incipit-sung">“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4">II</text:span></text:span><text:span text:style-name="src-sung">]</text:span> <text:tab/><text:tab/><text:span text:style-name="var-incipit-sung">“All of thy most glorious mysteries are beyond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1</text:span></text:span><text:span text:style-name="cue-strong"><text:span text:style-name="T15">st</text:span></text:span><text:span text:style-name="cue-strong"><text:span text:style-name="T5"> chant/Psaltiri</text:span></text:span><text:tab/><text:span text:style-name="src-spoken">[Vigil bk p.60]</text:span> <text:tab/><text:tab/><text:span text:style-name="incipit-spoken">“In the Lord have I hoped; how will ye say </text:span><text:span text:style-name="incipit-spoken"><text:span text:style-name="T8">to my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II</text:span><text:span text:style-name="src-spoken">]</text:span> <text:tab/><text:tab/><text:span text:style-name="incipit-spoken">“The noble Joseph, taking Thine all-pure bo</text:span><text:span text:style-name="incipit-spoken"><text:span text:style-name="T8">dy</text:span></text:span><text:span text:style-name="incipit-spoken">”…</text:span></text:p>
        <text:p text:style-name="P19"><text:span text:style-name="T1"><text:s/></text:span><text:span text:style-name="cue-doxology-spoken"><text:span text:style-name="T1">“Glory”…</text:span></text:span><text:span text:style-name="cue-doxology-sung"><text:span text:style-name="T12">“Now”…</text:span></text:span><text:span text:style-name="src-sung"><text:span text:style-name="T1">Theotok.</text:span></text:span><text:span text:style-name="T1">⮡</text:span><text:tab/><text:tab/><text:span text:style-name="var-incipit-sung"><text:span text:style-name="T9">“All of thy most glorious mysteries are bey</text:span></text:span><text:span text:style-name="var-incipit-sung"><text:span text:style-name="T16">ond</text:span></text:span><text:span text:style-name="var-incipit-sung"><text:span text:style-name="T9">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5">2</text:span></text:span><text:span text:style-name="cue-strong"><text:span text:style-name="T15">nd</text:span></text:span><text:span text:style-name="cue-strong"><text:span text:style-name="T5"> chant/Psaltiri</text:span></text:span><text:tab/><text:span text:style-name="src-spoken">[Vigil bk p.71]</text:span> <text:tab/><text:tab/><text:span text:style-name="incipit-spoken">“For who is god, save the Lord? And who is </text:span><text:span text:style-name="incipit-spoken"><text:span text:style-name="T8">God,</text:span></text:span><text:span text:style-name="incipit-spoken">”…</text:span></text:p>
        <text:p text:style-name="P17">Little Ektenia</text:p>
        <text:p text:style-name="P18"><text:span text:style-name="cue-strong"><text:span text:style-name="T5">Sess. hymns:</text:span></text:span><text:tab/><text:span text:style-name="src-spoken">[Oktoich.,T.</text:span><text:span text:style-name="src-tone-spoken">II</text:span><text:span text:style-name="src-spoken">]</text:span> <text:tab/><text:tab/><text:span text:style-name="incipit-spoken">“Without hindering the Jews from sealing th</text:span><text:span text:style-name="incipit-spoken"><text:span text:style-name="T8">e</text:span></text:span><text:span text:style-name="incipit-spoken">”…</text:span></text:p>
        <text:p text:style-name="Standard"/>
        <text:p text:style-name="P20"><text:span text:style-name="cue-strong"><text:span text:style-name="T12">Psalm 118</text:span></text:span><text:tab/><text:tab/><text:span text:style-name="src-sung"><text:span text:style-name="T1">[Orolog.,p.</text:span></text:span><text:span text:style-name="src-sung"><text:span text:style-name="T17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2">Polyeleos</text:span></text:span><text:tab/><text:tab/><text:tab/><text:tab/><text:span text:style-name="T1">⮡</text:span><text:tab/><text:tab/><text:span text:style-name="incipit-sung"><text:span text:style-name="T1">“Praise ye the Name of the Lord, all ye”…</text:span></text:span></text:p>
        <text:p text:style-name="P21"><text:span text:style-name="cue-strong"><text:span text:style-name="T12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2">“</text:span></text:span><text:span text:style-name="incipit-sung"><text:span text:style-name="T18">We magnify thee, O holy </text:span></text:span><text:span text:style-name="var-incipit-sung"><text:span text:style-name="T19">___</text:span></text:span><text:span text:style-name="incipit-sung"><text:span text:style-name="T12">”…</text:span></text:span></text:p>
        <text:p text:style-name="P21"><text:span text:style-name="cue-strong"><text:span text:style-name="T12">Evlogitaria</text:span></text:span><text:tab/><text:tab/><text:span text:style-name="src-sung"><text:span text:style-name="T1">[Orolog.,p.</text:span></text:span><text:span text:style-name="src-sung"><text:span text:style-name="T17">61</text:span></text:span><text:span text:style-name="src-sung"><text:span text:style-name="T1">]</text:span></text:span><text:tab/><text:tab/><text:span text:style-name="incipit-sung"><text:span text:style-name="T12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5">Ypakoi</text:span></text:span> <text:tab/><text:tab/><text:span text:style-name="src-spoken">[Oktoich.,T.</text:span><text:span text:style-name="src-tone-spoken">II</text:span><text:span text:style-name="src-spoken">]</text:span> <text:tab/><text:tab/><text:tab/><text:span text:style-name="incipit-spoken">“The women who after Thy passion went to Th</text:span><text:span text:style-name="incipit-spoken"><text:span text:style-name="T8">y</text:span></text:span><text:span text:style-name="incipit-spoken">”…</text:span></text:p>
        <text:p text:style-name="P22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2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20">st</text:span></text:span><text:span text:style-name="src-spoken"><text:span text:style-name="T21"> </text:span>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20">nd</text:span><text:span text:style-name="T21"> </text:span><text:span text:style-name="src-spoken"><text:span text:style-name="T1">chant/Psalt.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P23"><text:span text:style-name="cue-doxology-spoken"><text:span text:style-name="T12">“Glory”…“Now”…</text:span></text:span><text:span text:style-name="T1">*⮡</text:span><text:span text:style-name="src-spoken"><text:span text:style-name="T1">[aft.Polyelei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<text:span text:style-name="T9">“”…</text:span></text:span></text:p>
        <text:p text:style-name="Standard"/>
        <text:p text:style-name="P24"><text:span text:style-name="src-sung"><text:span text:style-name="T1">Hymns/Ascents:1</text:span></text:span><text:span text:style-name="src-sung"><text:span text:style-name="T22">st</text:span></text:span><text:span text:style-name="src-sung"><text:span text:style-name="T23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II</text:span></text:span><text:span text:style-name="src-sung">]</text:span><text:tab/><text:span text:style-name="incipit-sung">“I cast the eyes of my heart toward Thee”…</text:span></text:p>
        <text:p text:style-name="Standard"><text:span text:style-name="cue-strong">Prokeimen.</text:span> <text:tab/><text:tab/><text:tab/><text:tab/>⮡ <text:tab/><text:tab/><text:span text:style-name="incipit-sung">“Arouse Thyself O Lord my God in the”…</text:span></text:p>
        <text:p text:style-name="P25"><text:span text:style-name="T1">⮡</text:span><text:tab/><text:tab/><text:span text:style-name="incipit-sung"><text:span text:style-name="T1">“Let every breath praise the Lord”</text:span></text:span></text:p>
        <text:p text:style-name="P26"><text:span text:style-name="cue-strong"><text:span text:style-name="T5">Matins Gospel </text:span></text:span><text:span text:style-name="var-src-tone-spoken"><text:span text:style-name="var-src-tone-spoken">___</text:span></text:span><text:tab/> <text:span text:style-name="src-spoken">[</text:span><text:span text:style-name="var-src-tone-spoken"><text:span text:style-name="var-src-tone-spoken">___</text:span></text:span><text:span text:style-name="src-spoken">]</text:span> <text:tab/><text:tab/><text:tab/><text:span text:style-name="var-incipit-spoken">“”…</text:span></text:p>
        <text:p text:style-name="Standard"/>
        <text:p text:style-name="Standard"><text:span text:style-name="src-sung"><text:span text:style-name="T24">Resurr. hymn</text:span></text:span><text:tab/><text:span text:style-name="src-sung"><text:span text:style-name="T24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7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7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7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oft-page-break/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In the deep of old, the infinite power”…</text:span></text:p>
        <text:p text:style-name="P4"><text:span text:style-name="count-total-field">6 total</text:span></text:p>
        <text:p text:style-name="P18"><text:span text:style-name="count-spoken"><text:span text:style-name="count-spoken">1</text:span>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count-spoken"><text:span text:style-name="count-spoken">1</text:span></text:span><text:span text:style-name="T1"> </text:span><text:tab/><text:span text:style-name="T1">Cross/Resurr.</text:span><text:tab/><text:span text:style-name="T1">⮡</text:span><text:tab/><text:tab/><text:span text:style-name="incipit-spoken"><text:span text:style-name="T12">“Glory to Thy precious Cross&amp; Resurrection, O Lord”</text:span></text:span></text:p>
        <text:p text:style-name="P18"><text:span text:style-name="count-spoken"><text:span text:style-name="count-spoken">1</text:span>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8"><text:span text:style-name="count-spoken">3</text:span><text:tab/><text:span text:style-name="var-field">___</text:span> <text:tab/><text:tab/><text:tab/><text:span text:style-name="src-spoken">[Minai.]</text:span> <text:tab/><text:tab/><text:span text:style-name="incipit-spoken"><text:span text:style-name="T1">“</text:span></text:span><text:span text:style-name="var-incipit-spoken">___</text:span><text:span text:style-name="incipit-spoken"><text:span text:style-name="T1">, pray to God for us”</text:span></text:span></text:p>
        <text:p text:style-name="Standard"/>
        <text:p text:style-name="P29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30"><text:span text:style-name="cue-strong"><text:span text:style-name="T12">Katavasia</text:span></text:span><text:span text:style-name="cue-strong"><text:span text:style-name="T25">e</text:span></text:span><text:span text:style-name="cue-strong"><text:span text:style-name="T12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1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6">Minai</text:span></text:span><text:span text:style-name="src-sung">.,</text:span><text:span text:style-name="src-sung"><text:span text:style-name="T27">aft. Ode </text:span></text:span><text:span text:style-name="src-tone-sung"><text:span text:style-name="T6">VI</text:span></text:span><text:span text:style-name="src-sung">,T.</text:span><text:span text:style-name="var-src-tone">___</text:span><text:span text:style-name="src-sung">]</text:span><text:tab/><text:span text:style-name="var-incipit-sung">“”…</text:span></text:p>
        <text:p text:style-name="P31"><text:span text:style-name="src-spoken">+ Ichos</text:span> <text:tab/><text:tab/><text:tab/><text:span text:style-name="var-incipit-spoken">“”…</text:span></text:p>
        <text:p text:style-name="P7"><text:span text:style-name="cue-strong"><text:span text:style-name="T5">Sess. hymn</text:span></text:span><text:span text:style-name="cue-strong"> </text:span><text:tab/>⮡<text:span text:style-name="src-spoken"><text:span text:style-name="T1">[</text:span></text:span><text:span text:style-name="src-spoken"><text:span text:style-name="T28">aft. Ode </text:span></text:span><text:span text:style-name="src-tone-spoken">III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span text:style-name="var-incipit-spoken">“”…</text:span></text:p>
        <text:p text:style-name="P9"><text:span text:style-name="cue-doxology-spoken">“Glory”…“Now”…</text:span><text:tab/>⮡ <text:tab/><text:tab/><text:tab/><text:tab/><text:span text:style-name="var-incipit-spoken">“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ou didst arise from the tomb, O all-”…</text:span></text:p>
        <text:p text:style-name="P32"><text:span text:style-name="src-spoken">+ Ichos</text:span> <text:tab/><text:tab/><text:tab/><text:span text:style-name="incipit-spoken">“Thou art the light of those in darkness; T</text:span><text:span text:style-name="incipit-spoken"><text:span text:style-name="T8">hou art</text:span></text:span><text:span text:style-name="incipit-spoken">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5">Exaposteilaria:</text:span></text:span><text:span text:style-name="T1"> Matins Gospel </text:span><text:span text:style-name="var-src-tone-spoken">___</text:span></text:p>
        <text:p text:style-name="P32"><text:span text:style-name="src-spoken">[Oktoich.]</text:span> <text:tab/><text:tab/><text:tab/><text:span text:style-name="var-incipit-spoken"><text:span text:style-name="T9">“”…</text:span></text:span></text:p>
        <text:p text:style-name="P33"><text:span text:style-name="cue-doxology-spoken">“Glory”…</text:span> <text:tab/><text:span text:style-name="src-spoken">[Minai.]</text:span> <text:tab/><text:tab/><text:tab/><text:span text:style-name="var-incipit-spoken">“”…</text:span></text:p>
        <text:p text:style-name="P27"><text:span text:style-name="cue-doxology-spoken">“Now”…</text:span> <text:tab/><text:span text:style-name="src-spoken">[Oktoich.]</text:span> <text:tab/><text:tab/><text:tab/><text:span text:style-name="var-incipit-spoken"><text:span text:style-name="T9">“”…</text:span></text:span></text:p>
        <text:p text:style-name="Standard"/>
        <text:p text:style-name="P34"><text:span text:style-name="cue-strong">Lauds / Praises</text:span> <text:tab/><text:span text:style-name="src-sung">[Orolog.,p.75]</text:span> <text:tab/><text:tab/><text:span text:style-name="count-total-field">___ total</text:span></text:p>
        <text:p text:style-name="P35"><text:span text:style-name="var-field">___</text:span> <text:tab/>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poken">“Every breath, all creation, glorifieth The</text:span><text:span text:style-name="incipit-spoken"><text:span text:style-name="T8">e, O</text:span></text:span><text:span text:style-name="incipit-spoken">”…</text:span></text:p>
        <text:p text:style-name="P7"><text:span text:style-name="var-field">___</text:span> <text:tab/><text:tab/><text:tab/><text:span text:style-name="src-sung">[</text:span><text:span text:style-name="src-sung"><text:span text:style-name="T26">Minai</text:span></text:span><text:span text:style-name="src-sung">.,T.</text:span><text:span text:style-name="var-src-tone">___</text:span><text:span text:style-name="src-sung">]</text:span> <text:tab/><text:tab/><text:span text:style-name="var-incipit-spoken">“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6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7"><text:span text:style-name="var-incipit-sung">“”</text:span></text:p>
              <text:p text:style-name="P37"><text:span text:style-name="var-incipit-sung">“”</text:span></text:p>
            </table:table-cell>
          </table:table-row>
        </table:table>
        <text:p text:style-name="P38"><text:span text:style-name="var-field"><text:span text:style-name="T30">1</text:span></text:span><text:tab/><text:tab/><text:tab/><text:span text:style-name="T12">⮡</text:span><text:span text:style-name="src-spoken">Doxastik.</text:span><text:tab/><text:tab/><text:span text:style-name="var-incipit-spoken"><text:span text:style-name="T9">“O ye truly iniquitous ones who sealed the stone,”…</text:span></text:span></text:p>
        <text:p text:style-name="P39"><text:span text:style-name="cue-doxology-sung">“Glory”…</text:span> <text:span text:style-name="src-sung">[Evang. Stichiron </text:span><text:span text:style-name="var-src-tone"><text:span text:style-name="T27">___</text:span></text:span><text:span text:style-name="src-sung">]</text:span><text:tab/><text:span text:style-name="var-incipit-sung"><text:span text:style-name="T9">“”…</text:span></text:span></text:p>
        <text:p text:style-name="P40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1">7</text:span></text:span><text:span text:style-name="src-sung"><text:span text:style-name="T32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1"><text:span text:style-name="cue-strong">Resurr. tropar.</text:span><text:tab/>⮡<text:span text:style-name="src-sung">[Week of T.</text:span><text:span text:style-name="src-tone-sung"><text:span text:style-name="T6">II</text:span></text:span><text:span text:style-name="src-sung">]</text:span><text:tab/><text:span text:style-name="incipit-sung">“Having risen from the tomb and having burst”…</text:span></text:p>
        <text:p text:style-name="P41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3">st</text:span></text:span><text:span text:style-name="cue-strong"><text:span text:style-name="T1"> / 6</text:span></text:span><text:span text:style-name="cue-strong"><text:span text:style-name="T33">th</text:span></text:span></text:p>
        <text:p text:style-name="P18"><text:span text:style-name="cue-strong"><text:span text:style-name="T5">Troparia:</text:span></text:span><text:tab/><text:span text:style-name="src-spoken">[Oktoich.]</text:span> <text:tab/><text:tab/><text:tab/><text:span text:style-name="incipit-spoken">“When Thou didst descend unto death, O Life”…</text:span></text:p>
        <text:p text:style-name="P32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18"><text:span text:style-name="cue-strong"><text:span text:style-name="T5">Kontak. </text:span></text:span><text:tab/><text:tab/><text:span text:style-name="src-spoken">[Oktoich.]</text:span> <text:tab/><text:tab/><text:tab/><text:span text:style-name="incipit-spoken">“Thou didst rise from the tomb, O Omnipoten</text:span><text:span text:style-name="incipit-spoken"><text:span text:style-name="T8">t</text:span></text:span><text:span text:style-name="incipit-spoken">”…</text:span></text:p>
        <text:p text:style-name="Standard"/>
        <text:p text:style-name="P42"><text:span text:style-name="cue-strong"><text:span text:style-name="T1">3</text:span></text:span><text:span text:style-name="cue-strong"><text:span text:style-name="T33">rd</text:span></text:span></text:p>
        <text:p text:style-name="P43"><text:span text:style-name="cue-strong"><text:span text:style-name="T5">Troparia:</text:span></text:span><text:tab/><text:span text:style-name="src-spoken">[Oktoich.]</text:span> <text:tab/><text:tab/><text:tab/><text:span text:style-name="incipit-spoken">“When Thou didst descend unto death, O Life”…</text:span></text:p>
        <text:p text:style-name="P44"><text:span text:style-name="src-spoken"><text:span text:style-name="T1">[Minai.]</text:span></text:span><text:tab/><text:tab/><text:tab/><text:span text:style-name="var-incipit-spoken"><text:span text:style-name="T9">“”…</text:span></text:span></text:p>
        <text:p text:style-name="P45"><text:span text:style-name="cue-strong"><text:span text:style-name="T5">Kontak.</text:span></text:span> <text:tab/><text:tab/>⮡ <text:tab/><text:tab/><text:tab/><text:tab/><text:span text:style-name="var-incipit-spoken">“”…</text:span></text:p>
        <text:h text:style-name="P46" text:outline-level="2">LITURGY OF ST JOHN CHRYSOS-TOMOS</text:h>
        <text:p text:style-name="P34"><text:span text:style-name="cue-strong">Beatitudes: </text:span><text:tab/><text:tab/><text:span text:style-name="src-sung">[Orolog.,p.136]</text:span><text:tab/><text:tab/><text:span text:style-name="count-total-field">___ total</text:span></text:p>
        <text:p text:style-name="P47"><text:span text:style-name="var-field">___</text:span> <text:tab/>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poken">“We offer Thee the cry of the thief, and we </text:span><text:span text:style-name="incipit-spoken"><text:span text:style-name="T8">pray:</text:span></text:span><text:span text:style-name="incipit-spoken">”…</text:span></text:p>
        <text:p text:style-name="P48"><text:span text:style-name="var-field"><text:span text:style-name="T34">4</text:span></text:span><text:tab/><text:tab/><text:tab/><text:span text:style-name="src-sung">[</text:span><text:span text:style-name="src-sung"><text:span text:style-name="T26">Minai</text:span></text:span><text:span text:style-name="src-sung">.,</text:span><text:span text:style-name="src-sung"><text:span text:style-name="T35">Ode </text:span></text:span><text:span text:style-name="var-src-tone">___</text:span><text:span text:style-name="src-sung">]<text:tab/></text:span><text:tab/><text:span text:style-name="var-incipit-spoken"><text:span text:style-name="T9">“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When Thou didst descend unto death, O Life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2">“From thy youth didst thou love Christ, O”…</text:span></text:span></text:p>
        <text:p text:style-name="P50"><text:span text:style-name="src-sung">[</text:span><text:span text:style-name="src-sung"><text:span text:style-name="T26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34"><text:span text:style-name="cue-strong">Kontakia: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ou didst rise from the tomb, O omnipoten</text:span><text:span text:style-name="incipit-sung"><text:span text:style-name="T8">t</text:span></text:span><text:span text:style-name="incipit-sung">”…</text:span></text:p>
        <text:p text:style-name="P49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2">“Having forsaken the beauty of the world and”…</text:span></text:span></text:p>
        <text:p text:style-name="P7"><text:span text:style-name="cue-doxology-sung"><text:span text:style-name="T12">“Glory”…</text:span></text:span><text:tab/><text:tab/><text:span text:style-name="src-sung">[</text:span><text:span text:style-name="src-sung"><text:span text:style-name="T26">Minai</text:span></text:span><text:span text:style-name="src-sung">.,T.</text:span><text:span text:style-name="var-src-tone">___</text:span><text:span text:style-name="src-sung">]</text:span><text:tab/><text:tab/><text:span text:style-name="var-incipit-sung"><text:span text:style-name="T9">“”…</text:span></text:span></text:p>
        <text:p text:style-name="P18"><text:span text:style-name="cue-doxology-sung"><text:span text:style-name="T12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4"><text:span text:style-name="cue-strong">Prokeimena:</text:span> 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e Lord is my strength and my song, and H</text:span><text:span text:style-name="incipit-sung"><text:span text:style-name="T8">e</text:span></text:span><text:span text:style-name="incipit-sung">”…</text:span></text:p>
        <text:p text:style-name="P32"><text:span text:style-name="src-spoken">+ Stichos</text:span> <text:tab/><text:tab/><text:tab/><text:span text:style-name="incipit-spoken">“With chastisement hath the Lord chastened </text:span><text:span text:style-name="incipit-spoken"><text:span text:style-name="T8">me</text:span></text:span><text:span text:style-name="incipit-spoken">”…</text:span></text:p>
        <text:p text:style-name="P37"><text:span text:style-name="cue-strong"><text:span text:style-name="T12">2</text:span></text:span><text:span text:style-name="cue-strong"><text:span text:style-name="T36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><text:span text:style-name="cue-strong">Alleluiaria:</text:span> <text:tab/><text:tab/><text:span text:style-name="src-spoken">[Oktoich.,T.</text:span><text:span text:style-name="src-tone-spoken">II</text:span><text:span text:style-name="src-spoken">]</text:span> <text:tab/><text:tab/><text:span text:style-name="incipit-spoken">“The Lord hear thee in the day of afflictio</text:span><text:span text:style-name="incipit-spoken"><text:span text:style-name="T8">n; the</text:span></text:span><text:span text:style-name="incipit-spoken">”…</text:span></text:p>
        <text:p text:style-name="P32"><text:span text:style-name="src-spoken">+ Stichos</text:span> <text:tab/><text:tab/><text:tab/><text:span text:style-name="incipit-spoken">“O Lord, save the king, and hearken unto us </text:span><text:span text:style-name="incipit-spoken"><text:span text:style-name="T8">in</text:span></text:span><text:span text:style-name="incipit-spoken">”…</text:span></text:p>
        <text:p text:style-name="P37"><text:span text:style-name="cue-strong"><text:span text:style-name="T37">2</text:span></text:span><text:span text:style-name="cue-strong"><text:span text:style-name="T36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___</text:span></text:span><text:span text:style-name="src-spoken"><text:span text:style-name="T1">]</text:span></text:span><text:tab/><text:tab/><text:span text:style-name="var-incipit-spoken"><text:span text:style-name="T9">“”…</text:span></text:span></text:p>
        <text:p text:style-name="Standard"/>
        <text:p text:style-name="Standard"><text:span text:style-name="cue-strong"><text:span text:style-name="T12">Communion stichoi:</text:span></text:span><text:span text:style-name="T1"> </text:span><text:tab/><text:tab/><text:tab/><text:tab/><text:span text:style-name="incipit-sung"><text:span text:style-name="T12">“Praise the Lord from the heavens, praise </text:span></text:span><text:span text:style-name="incipit-sung"><text:span text:style-name="T38">Him</text:span></text:span><text:span text:style-name="incipit-sung"><text:span text:style-name="T12">”…</text:span></text:span></text:p>
        <text:p text:style-name="P51"><text:span text:style-name="var-incipit-sung"><text:span text:style-name="T9">“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count-total-field" style:family="text">
      <style:text-properties fo:color="#666666" style:font-name="Noto Sans" fo:font-size="8.60000038146973pt" fo:font-weight="normal" fo:background-color="#fff2cc" style:text-underline-style="solid" style:text-underline-width="auto" style:text-underline-color="font-color"/>
    </style:style>
    <style:style style:name="count-spoken" style:family="text">
      <style:text-properties fo:color="#666666" style:font-name="Noto Sans" fo:font-size="8.60000038146973pt" fo:font-weight="normal" fo:background-color="transparent" style:char-shading-value="0"/>
    </style:style>
    <style:style style:name="count-paired-field" style:family="text">
      <style:text-properties fo:color="#111111" style:font-name="Noto Sans SemiBold1" fo:font-size="8.60000038146973pt" fo:font-weight="600" fo:background-color="#fff2cc"/>
    </style:style>
    <style:style style:name="rank-marker-field" style:family="text">
      <style:text-properties fo:color="#111111" style:font-name="Noto Sans" fo:font-size="7pt" fo:font-weight="normal" fo:background-color="#fff2cc"/>
    </style:style>
    <style:style style:name="var-field-neutral" style:family="text">
      <style:text-properties fo:color="#111111" style:font-name="Noto Sans" fo:font-size="8.60000038146973pt" fo:font-weight="normal" fo:background-color="#fff2cc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00:29:55.623152877</dc:date>
    <meta:editing-duration>PT9H18M10S</meta:editing-duration>
    <meta:editing-cycles>11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8" meta:word-count="932" meta:character-count="6059" meta:non-whitespace-character-count="4973"/>
  </office:meta>
</office:document-meta>
</file>