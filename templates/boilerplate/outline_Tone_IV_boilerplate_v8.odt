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Table1" style:family="table">
      <style:table-properties style:width="4.7486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0.3701in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.25in" fo:text-indent="0in" style:auto-text-indent="false"/>
      <style:text-properties officeooo:paragraph-rsid="000e76b0"/>
    </style:style>
    <style:style style:name="P9" style:family="paragraph" style:parent-style-name="Standard">
      <style:paragraph-properties fo:margin-left="0in" fo:text-indent="0in" style:auto-text-indent="false"/>
    </style:style>
    <style:style style:name="P10" style:family="paragraph" style:parent-style-name="Standard">
      <style:text-properties officeooo:paragraph-rsid="0011a6cd"/>
    </style:style>
    <style:style style:name="P11" style:family="paragraph" style:parent-style-name="Standard">
      <style:paragraph-properties fo:margin-left="0.25in" fo:text-indent="0in" style:auto-text-indent="false"/>
      <style:text-properties officeooo:paragraph-rsid="000ef31a"/>
    </style:style>
    <style:style style:name="P12" style:family="paragraph" style:parent-style-name="Standard">
      <style:text-properties officeooo:paragraph-rsid="00176dab"/>
    </style:style>
    <style:style style:name="P13" style:family="paragraph" style:parent-style-name="Standard">
      <style:paragraph-properties fo:margin-left="1.25in" fo:text-indent="0in" style:auto-text-indent="false"/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5" style:family="paragraph" style:parent-style-name="Standard">
      <style:paragraph-properties fo:margin-left="0in" fo:text-indent="0in" style:auto-text-indent="false"/>
      <style:text-properties officeooo:paragraph-rsid="000ef31a"/>
    </style:style>
    <style:style style:name="P16" style:family="paragraph" style:parent-style-name="Standard">
      <style:paragraph-properties fo:margin-left="1.75in" fo:text-indent="0in" style:auto-text-indent="false"/>
    </style:style>
    <style:style style:name="P17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8" style:family="paragraph" style:parent-style-name="Standard">
      <style:paragraph-properties fo:margin-left="0.25in" fo:text-indent="0in" style:auto-text-indent="false"/>
    </style:style>
    <style:style style:name="P19" style:family="paragraph" style:parent-style-name="Standard">
      <style:paragraph-properties fo:margin-left="0.25in" fo:text-indent="0in" style:auto-text-indent="false"/>
      <style:text-properties officeooo:paragraph-rsid="000d29ec"/>
    </style:style>
    <style:style style:name="P20" style:family="paragraph" style:parent-style-name="Standard">
      <style:text-properties officeooo:paragraph-rsid="0017e1c4"/>
    </style:style>
    <style:style style:name="P21" style:family="paragraph" style:parent-style-name="Standard">
      <style:text-properties officeooo:paragraph-rsid="001c2bf2"/>
    </style:style>
    <style:style style:name="P22" style:family="paragraph" style:parent-style-name="Standard">
      <style:paragraph-properties fo:margin-left="0in" fo:text-indent="0in" style:auto-text-indent="false"/>
      <style:text-properties officeooo:paragraph-rsid="002312db"/>
    </style:style>
    <style:style style:name="P23" style:family="paragraph" style:parent-style-name="Standard">
      <style:text-properties officeooo:paragraph-rsid="001081f5"/>
    </style:style>
    <style:style style:name="P24" style:family="paragraph" style:parent-style-name="Standard">
      <style:text-properties officeooo:paragraph-rsid="001105c6"/>
    </style:style>
    <style:style style:name="P25" style:family="paragraph" style:parent-style-name="Standard">
      <style:paragraph-properties fo:margin-left="1.5in" fo:text-indent="0in" style:auto-text-indent="false"/>
    </style:style>
    <style:style style:name="P26" style:family="paragraph" style:parent-style-name="Standard">
      <style:text-properties officeooo:paragraph-rsid="00086dd0"/>
    </style:style>
    <style:style style:name="P27" style:family="paragraph" style:parent-style-name="Standard">
      <style:paragraph-properties fo:margin-left="0.5in" fo:text-indent="0in" style:auto-text-indent="false"/>
    </style:style>
    <style:style style:name="P28" style:family="paragraph" style:parent-style-name="Standard">
      <style:paragraph-properties fo:margin-left="0.25in" fo:text-indent="0in" style:auto-text-indent="false"/>
      <style:text-properties officeooo:paragraph-rsid="00086dd0"/>
    </style:style>
    <style:style style:name="P29" style:family="paragraph" style:parent-style-name="Standard">
      <style:paragraph-properties fo:margin-left="0.75in" fo:text-indent="0in" style:auto-text-indent="false"/>
    </style:style>
    <style:style style:name="P30" style:family="paragraph" style:parent-style-name="Standard">
      <style:text-properties officeooo:paragraph-rsid="001324cb"/>
    </style:style>
    <style:style style:name="P31" style:family="paragraph" style:parent-style-name="Standard">
      <style:paragraph-properties fo:margin-left="1in" fo:text-indent="0in" style:auto-text-indent="false"/>
      <style:text-properties officeooo:paragraph-rsid="000f8816"/>
    </style:style>
    <style:style style:name="P32" style:family="paragraph" style:parent-style-name="Standard">
      <style:paragraph-properties fo:margin-left="1in" fo:text-indent="0in" style:auto-text-indent="false"/>
    </style:style>
    <style:style style:name="P33" style:family="paragraph" style:parent-style-name="Standard">
      <style:paragraph-properties fo:margin-left="0.5in" fo:text-indent="0in" style:auto-text-indent="false"/>
      <style:text-properties officeooo:paragraph-rsid="001324cb"/>
    </style:style>
    <style:style style:name="P34" style:family="paragraph" style:parent-style-name="Standard">
      <style:text-properties officeooo:paragraph-rsid="00195f46"/>
    </style:style>
    <style:style style:name="P35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36" style:family="paragraph" style:parent-style-name="Standard">
      <style:paragraph-properties fo:text-align="end" style:justify-single-word="false"/>
      <style:text-properties officeooo:paragraph-rsid="001c19ba"/>
    </style:style>
    <style:style style:name="P37" style:family="paragraph" style:parent-style-name="Standard">
      <style:paragraph-properties fo:margin-left="0.5in" fo:text-indent="0in" style:auto-text-indent="false"/>
      <style:text-properties officeooo:paragraph-rsid="001081f5"/>
    </style:style>
    <style:style style:name="P38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39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40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41" style:family="paragraph" style:parent-style-name="Standard">
      <style:paragraph-properties fo:text-align="start" style:justify-single-word="false"/>
      <style:text-properties officeooo:paragraph-rsid="0007bf68"/>
    </style:style>
    <style:style style:name="P42" style:family="paragraph" style:parent-style-name="Standard">
      <style:text-properties officeooo:paragraph-rsid="001e17ae"/>
    </style:style>
    <style:style style:name="P43" style:family="paragraph" style:parent-style-name="Standard">
      <style:paragraph-properties fo:margin-left="0.25in" fo:text-indent="0in" style:auto-text-indent="false"/>
      <style:text-properties officeooo:paragraph-rsid="0000c400"/>
    </style:style>
    <style:style style:name="P44" style:family="paragraph" style:parent-style-name="Standard">
      <style:paragraph-properties fo:margin-left="1in" fo:text-indent="0in" style:auto-text-indent="false"/>
      <style:text-properties officeooo:paragraph-rsid="001e17ae"/>
    </style:style>
    <style:style style:name="P45" style:family="paragraph" style:parent-style-name="Standard">
      <style:paragraph-properties fo:margin-left="0.25in" fo:text-indent="0in" style:auto-text-indent="false"/>
      <style:text-properties officeooo:paragraph-rsid="001f9474"/>
    </style:style>
    <style:style style:name="P46" style:family="paragraph" style:parent-style-name="Heading_20_2_20_Long_20_Box">
      <style:text-properties fo:background-color="transparent"/>
    </style:style>
    <style:style style:name="P47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48" style:family="paragraph" style:parent-style-name="Standard">
      <style:paragraph-properties fo:margin-left="0.25in" fo:text-indent="0in" style:auto-text-indent="false"/>
      <style:text-properties officeooo:paragraph-rsid="001682d6"/>
    </style:style>
    <style:style style:name="P49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50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P51" style:family="paragraph" style:parent-style-name="Standard">
      <style:paragraph-properties fo:margin-left="2in" fo:text-indent="0in" style:auto-text-indent="false"/>
      <style:text-properties officeooo:paragraph-rsid="00086dd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color="#666666" loext:opacity="100%" style:font-name="Noto Sans" fo:font-size="8.60000038146973pt" fo:background-color="transparent" loext:char-shading-value="0"/>
    </style:style>
    <style:style style:name="T6" style:family="text">
      <style:text-properties officeooo:rsid="001324cb" fo:background-color="transparent" loext:char-shading-value="0"/>
    </style:style>
    <style:style style:name="T7" style:family="text">
      <style:text-properties officeooo:rsid="0019ca7c" fo:background-color="transparent" loext:char-shading-value="0"/>
    </style:style>
    <style:style style:name="T8" style:family="text">
      <style:text-properties fo:font-size="8.60000038146973pt"/>
    </style:style>
    <style:style style:name="T9" style:family="text">
      <style:text-properties officeooo:rsid="0016e83a"/>
    </style:style>
    <style:style style:name="T10" style:family="text">
      <style:text-properties officeooo:rsid="00176dab" fo:background-color="transparent" loext:char-shading-value="0"/>
    </style:style>
    <style:style style:name="T11" style:family="text">
      <style:text-properties fo:font-size="8.60000038146973pt" fo:background-color="transparent" loext:char-shading-value="0"/>
    </style:style>
    <style:style style:name="T12" style:family="text">
      <style:text-properties officeooo:rsid="001682d6"/>
    </style:style>
    <style:style style:name="T13" style:family="text">
      <style:text-properties officeooo:rsid="001081f5" fo:background-color="transparent" loext:char-shading-value="0"/>
    </style:style>
    <style:style style:name="T14" style:family="text">
      <style:text-properties officeooo:rsid="0017e1c4"/>
    </style:style>
    <style:style style:name="T15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6" style:family="text">
      <style:text-properties officeooo:rsid="001c2bf2" fo:background-color="transparent" loext:char-shading-value="0"/>
    </style:style>
    <style:style style:name="T17" style:family="text">
      <style:text-properties fo:font-size="8.60000038146973pt" officeooo:rsid="00176dab" fo:background-color="transparent" loext:char-shading-value="0"/>
    </style:style>
    <style:style style:name="T18" style:family="text">
      <style:text-properties fo:font-size="8.60000038146973pt" officeooo:rsid="0000c400"/>
    </style:style>
    <style:style style:name="T19" style:family="text">
      <style:text-properties style:text-position="super 58%" officeooo:rsid="00232009" fo:background-color="transparent" loext:char-shading-value="0"/>
    </style:style>
    <style:style style:name="T20" style:family="text">
      <style:text-properties officeooo:rsid="00232009" fo:background-color="transparent" loext:char-shading-value="0"/>
    </style:style>
    <style:style style:name="T21" style:family="text">
      <style:text-properties style:text-position="super 58%" officeooo:rsid="000e90cb" fo:background-color="transparent" loext:char-shading-value="0"/>
    </style:style>
    <style:style style:name="T22" style:family="text">
      <style:text-properties officeooo:rsid="000e90cb" fo:background-color="transparent" loext:char-shading-value="0"/>
    </style:style>
    <style:style style:name="T23" style:family="text">
      <style:text-properties fo:font-size="7.90000009536743pt" fo:background-color="transparent" loext:char-shading-value="0"/>
    </style:style>
    <style:style style:name="T24" style:family="text">
      <style:text-properties fo:font-size="8.60000038146973pt" officeooo:rsid="001af3bc" fo:background-color="transparent" loext:char-shading-value="0"/>
    </style:style>
    <style:style style:name="T25" style:family="text">
      <style:text-properties officeooo:rsid="000ef31a"/>
    </style:style>
    <style:style style:name="T26" style:family="text">
      <style:text-properties officeooo:rsid="001081f5"/>
    </style:style>
    <style:style style:name="T27" style:family="text">
      <style:text-properties officeooo:rsid="000ef31a" fo:background-color="transparent" loext:char-shading-value="0"/>
    </style:style>
    <style:style style:name="T28" style:family="text">
      <style:text-properties officeooo:rsid="000ce31b" fo:background-color="transparent" loext:char-shading-value="0"/>
    </style:style>
    <style:style style:name="T29" style:family="text">
      <style:text-properties fo:font-size="8.60000038146973pt" officeooo:rsid="001c19ba" fo:background-color="transparent" loext:char-shading-value="0"/>
    </style:style>
    <style:style style:name="T30" style:family="text">
      <style:text-properties officeooo:rsid="00195f46" fo:background-color="transparent" loext:char-shading-value="0"/>
    </style:style>
    <style:style style:name="T31" style:family="text">
      <style:text-properties officeooo:rsid="00113855" fo:background-color="transparent" loext:char-shading-value="0"/>
    </style:style>
    <style:style style:name="T32" style:family="text">
      <style:text-properties style:text-position="super 58%" fo:background-color="transparent" loext:char-shading-value="0"/>
    </style:style>
    <style:style style:name="T33" style:family="text">
      <style:text-properties fo:font-size="8.60000038146973pt" officeooo:rsid="00195f46" fo:background-color="transparent" loext:char-shading-value="0"/>
    </style:style>
    <style:style style:name="T34" style:family="text">
      <style:text-properties officeooo:rsid="0008dabd"/>
    </style:style>
    <style:style style:name="T35" style:family="text">
      <style:text-properties style:text-position="super 58%" fo:font-size="8.60000038146973pt" officeooo:rsid="0019ca7c" fo:background-color="transparent" loext:char-shading-value="0"/>
    </style:style>
    <style:style style:name="T36" style:family="text">
      <style:text-properties fo:font-size="8.60000038146973pt" officeooo:rsid="0019ca7c" fo:background-color="transparent" loext:char-shading-value="0"/>
    </style:style>
    <style:style style:name="T37" style:family="text">
      <style:text-properties fo:font-size="8.60000038146973pt" officeooo:rsid="001682d6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___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IV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___</text:span></text:span>: <text:span text:style-name="T3">___</text:span></text:p>
              </table:table-cell>
              <table:table-cell table:style-name="Table4.A2" office:value-type="string">
                <text:p text:style-name="P3"><text:span text:style-name="rank-marker-field">[ §___ – ___ svc ]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4">“Lord, I Have Cried”…</text:span></text:span><text:tab/><text:tab/><text:span text:style-name="T1">⮡</text:span><text:tab/><text:tab/><text:tab/><text:span text:style-name="count-total-field"><text:span text:style-name="count-total-field">10+2 total</text:span></text:span></text:p>
        <text:p text:style-name="P6"><text:span text:style-name="var-field">___</text:span> <text:span text:style-name="src-sung"><text:span text:style-name="T1">stichira:</text:span></text:span><text:tab/><text:span text:style-name="src-sung">[Oktoichos,T.</text:span><text:span text:style-name="src-tone-sung"><text:span text:style-name="T6">IV</text:span></text:span><text:span text:style-name="src-sung">]</text:span><text:tab/><text:span text:style-name="incipit-sung">“Bowing down unceasingly before Thy life-”…</text:span></text:p>
        <text:p text:style-name="P7"><text:span text:style-name="var-field">___</text:span>” <text:tab/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7"><text:span text:style-name="cue-doxology-sung">“Glory”…</text:span> <text:tab/><text:tab/>⮡<text:span text:style-name="src-spoken"><text:span text:style-name="T1">[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8"><text:span text:style-name="cue-doxology-sung">“Now”…</text:span><text:tab/><text:tab/><text:span text:style-name="src-sung">[Oktoich.,T.</text:span><text:span text:style-name="src-tone-sung"><text:span text:style-name="T6">IV</text:span></text:span><text:span text:style-name="src-sung">]</text:span> <text:tab/><text:tab/><text:span text:style-name="incipit-sung">“The prophet David, who through thee is the”…</text:span></text:p>
        <text:p text:style-name="Standard"/>
        <text:p text:style-name="P9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6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P10"><text:span text:style-name="cue-strong"><text:span text:style-name="T5">3 Readings:</text:span></text:span><text:span text:style-name="cue-strong"><text:span text:style-name="T1"> </text:span></text:span><text:tab/><text:tab/><text:span text:style-name="src-spoken"><text:span text:style-name="T1">[Minai.]</text:span></text:span><text:tab/><text:tab/><text:tab/><text:span text:style-name="incipit-spoken"><text:span text:style-name="T1">“A Reading from </text:span></text:span><text:span text:style-name="var-incipit-spoken">___</text:span><text:span text:style-name="incipit-spoken"><text:span text:style-name="T1">”…</text:span></text:span></text:p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6">IV</text:span></text:span><text:span text:style-name="src-sung">]</text:span> <text:tab/><text:tab/><text:span text:style-name="incipit-sung">“Having ascended the Cross, O Lord, Thou”…</text:span></text:p>
        <text:p text:style-name="P7"><text:span text:style-name="cue-doxology-sung"><text:span text:style-name="T8">“Glory”…</text:span></text:span> 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11"><text:span text:style-name="cue-doxology-sung">“Now”…</text:span> <text:tab/><text:tab/><text:span text:style-name="src-sung">[Oktoich.,T.</text:span><text:span text:style-name="var-src-tone"><text:span text:style-name="T9">IV</text:span></text:span><text:span text:style-name="src-sung">]</text:span> <text:tab/><text:tab/><text:span text:style-name="var-incipit-sung">“Mercifully regard the supplications of thy”…</text:span></text:p>
        <text:p text:style-name="Standard"/>
        <text:p text:style-name="P9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2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0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1">“O Theotokos and Virgin, rejoice, O Mary full of”…</text:span></text:span></text:p>
        <text:p text:style-name="P13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p text:style-name="Standard"/>
        <text:h text:style-name="P5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4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6">IV</text:span></text:span><text:span text:style-name="src-sung">]</text:span><text:tab/> <text:span text:style-name="counter-strong"><text:span text:style-name="T11">2x</text:span></text:span><text:tab/><text:span text:style-name="incipit-sung">“Having learned the joyful proclamation </text:span><text:span text:style-name="incipit-sung"><text:span text:style-name="T12">of the</text:span></text:span><text:span text:style-name="incipit-sung">”…</text:span></text:p>
        <text:p text:style-name="P14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3">Minai</text:span></text:span><text:span text:style-name="src-sung"><text:span text:style-name="T1">.,T.</text:span></text:span><text:span text:style-name="var-src-tone">___</text:span><text:span text:style-name="src-sung"><text:span text:style-name="T1">]</text:span></text:span><text:tab/> <text:span text:style-name="counter-strong"><text:span text:style-name="T11">1x</text:span></text:span> <text:tab/><text:span text:style-name="var-incipit-sung">“”…</text:span></text:p>
        <text:p text:style-name="P15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4">IV</text:span></text:span><text:span text:style-name="src-sung">]</text:span> <text:tab/><text:tab/><text:span text:style-name="var-incipit-sung">“The mystery hidden from before the ages an</text:span><text:span text:style-name="var-incipit-sung"><text:span text:style-name="T12">d</text:span></text:span><text:span text:style-name="var-incipit-sung">”…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1</text:span></text:span><text:span text:style-name="cue-strong"><text:span text:style-name="T15">st</text:span></text:span><text:span text:style-name="cue-strong"><text:span text:style-name="T5"> chant/Psaltiri</text:span></text:span><text:tab/><text:span text:style-name="src-spoken">[Vigil bk p.62]</text:span> <text:tab/><text:tab/><text:span text:style-name="incipit-spoken">“How long, O Lord, wilt Thou utterly forget </text:span><text:span text:style-name="incipit-spoken"><text:span text:style-name="T12">me?</text:span></text:span><text:span text:style-name="incipit-spoken">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IV</text:span><text:span text:style-name="src-spoken">]</text:span> <text:tab/><text:tab/><text:span text:style-name="incipit-spoken">“Gazing upon the entrance to the tomb, and”…</text:span></text:p>
        <text:p text:style-name="P19"><text:span text:style-name="T1"><text:s/></text:span><text:span text:style-name="cue-doxology-spoken"><text:span text:style-name="T1">“Glory”…</text:span></text:span><text:span text:style-name="cue-doxology-sung"><text:span text:style-name="T11">“Now”…</text:span></text:span><text:span text:style-name="src-sung"><text:span text:style-name="T1">Theotok.</text:span></text:span><text:span text:style-name="T1">⮡</text:span><text:tab/><text:tab/><text:span text:style-name="var-incipit-sung"><text:span text:style-name="T8">“The mystery hidden from before the ages and”…</text:span>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2</text:span></text:span><text:span text:style-name="cue-strong"><text:span text:style-name="T15">nd</text:span></text:span><text:span text:style-name="cue-strong"><text:span text:style-name="T5"> chant/Psaltiri</text:span></text:span><text:tab/><text:span text:style-name="src-spoken">[Vigil bk p.75]</text:span> <text:tab/><text:tab/><text:span text:style-name="incipit-spoken">“The Lord hear thee in the day of afflictio</text:span><text:span text:style-name="incipit-spoken"><text:span text:style-name="T12">n; the</text:span></text:span><text:span text:style-name="incipit-spoken">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IV</text:span><text:span text:style-name="src-spoken">]</text:span> <text:tab/><text:tab/><text:span text:style-name="incipit-spoken">“Thou didst arise from the tomb as One”…</text:span></text:p>
        <text:p text:style-name="Standard"/>
        <text:p text:style-name="P20"><text:span text:style-name="cue-strong"><text:span text:style-name="T11">Psalm 118</text:span></text:span><text:tab/><text:tab/><text:span text:style-name="src-sung"><text:span text:style-name="T1">[Orolog.,p.</text:span></text:span><text:span text:style-name="src-sung"><text:span text:style-name="T16">61</text:span></text:span><text:span text:style-name="src-sung"><text:span text:style-name="T1">]</text:span></text:span><text:tab/><text:tab/><text:span text:style-name="incipit-sung"><text:span text:style-name="T1">“Blessed are the blameless in the way who”…</text:span></text:span></text:p>
        <text:p text:style-name="P20"><text:span text:style-name="cue-strong"><text:span text:style-name="T11">Polyeleos</text:span></text:span><text:tab/><text:tab/><text:tab/><text:tab/><text:span text:style-name="T1">⮡</text:span><text:tab/><text:tab/><text:span text:style-name="incipit-sung"><text:span text:style-name="T1">“Praise ye the Name of the Lord, all ye”…</text:span></text:span></text:p>
        <text:p text:style-name="P21"><text:span text:style-name="cue-strong"><text:span text:style-name="T11">Megalynarion</text:span></text:span><text:tab/><text:span text:style-name="src-sung"><text:span text:style-name="T1">[</text:span></text:span><text:span text:style-name="src-sung"><text:span text:style-name="T6">Minai.</text:span></text:span><text:span text:style-name="src-sung"><text:span text:style-name="T1">]</text:span></text:span><text:tab/><text:tab/><text:tab/><text:span text:style-name="incipit-sung"><text:span text:style-name="T11">“</text:span></text:span><text:span text:style-name="incipit-sung"><text:span text:style-name="T17">We magnify thee, O holy </text:span></text:span><text:span text:style-name="var-incipit-sung"><text:span text:style-name="T18">___</text:span></text:span><text:span text:style-name="incipit-sung"><text:span text:style-name="T11">”…</text:span></text:span></text:p>
        <text:p text:style-name="P21"><text:span text:style-name="cue-strong"><text:span text:style-name="T11">Evlogitaria</text:span></text:span><text:tab/><text:tab/><text:span text:style-name="src-sung"><text:span text:style-name="T1">[Orolog.,p.</text:span></text:span><text:span text:style-name="src-sung"><text:span text:style-name="T16">61</text:span></text:span><text:span text:style-name="src-sung"><text:span text:style-name="T1">]</text:span></text:span><text:tab/><text:tab/><text:span text:style-name="incipit-sung"><text:span text:style-name="T11">“Blessed art Thou O Lord, teach me Thy”…</text:span></text:span></text:p>
        <text:p text:style-name="Standard"/>
        <text:p text:style-name="P4">Little Ektenia</text:p>
        <text:p text:style-name="Standard"><text:span text:style-name="cue-strong"><text:span text:style-name="T5">Ypakoi</text:span></text:span> <text:tab/><text:tab/><text:span text:style-name="src-spoken">[Oktoich.,T.</text:span><text:span text:style-name="src-tone-spoken">IV</text:span><text:span text:style-name="src-spoken">]</text:span> <text:tab/><text:tab/><text:tab/><text:span text:style-name="incipit-spoken">“Running on before, the myrrh-bearing </text:span><text:span text:style-name="incipit-spoken"><text:span text:style-name="T12">women</text:span></text:span><text:span text:style-name="incipit-spoken">”…</text:span></text:p>
        <text:p text:style-name="P22"><text:span text:style-name="T1">Sess. hymns:</text:span><text:tab/><text:span text:style-name="src-spoken"><text:span text:style-name="T1">[</text:span></text:span><text:span text:style-name="src-spoken"><text:span text:style-name="T6">Minai.</text:span></text:span><text:span text:style-name="src-spoken"><text:span text:style-name="T1">]</text:span></text:span><text:tab/><text:span text:style-name="T1">(omit all Theotokia except </text:span><text:span text:style-name="cue-doxology-spoken"><text:span text:style-name="T11">“Now”…</text:span></text:span><text:span text:style-name="T1">*) :</text:span></text:p>
        <text:p text:style-name="P14"><text:tab/><text:tab/><text:tab/><text:span text:style-name="T1">⮡</text:span><text:span text:style-name="src-spoken"><text:span text:style-name="T1">[1</text:span></text:span><text:span text:style-name="src-spoken"><text:span text:style-name="T19">st</text:span></text:span><text:span text:style-name="src-spoken"><text:span text:style-name="T20"> </text:span>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8">“”…</text:span></text:span></text:p>
        <text:p text:style-name="P14"><text:tab/><text:tab/><text:tab/><text:span text:style-name="T1">⮡</text:span><text:span text:style-name="src-spoken"><text:span text:style-name="T1">[2</text:span></text:span><text:span text:style-name="T19">nd</text:span><text:span text:style-name="T20"> 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8">“”…</text:span></text:span></text:p>
        <text:p text:style-name="P23"><text:span text:style-name="cue-doxology-spoken"><text:span text:style-name="T11">“Glory”…“Now”…</text:span></text:span><text:span text:style-name="T1">*⮡</text:span><text:span text:style-name="src-spoken"><text:span text:style-name="T1">[aft.Polyelei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8">“”…</text:span></text:span></text:p>
        <text:p text:style-name="Standard"/>
        <text:p text:style-name="P24"><text:span text:style-name="src-sung"><text:span text:style-name="T1">Hymns/Ascents:1</text:span></text:span><text:span text:style-name="src-sung"><text:span text:style-name="T21">st</text:span></text:span><text:span text:style-name="src-sung"><text:span text:style-name="T22"> </text:span></text:span><text:span text:style-name="src-sung"><text:span text:style-name="T1">antif.</text:span></text:span><text:span text:style-name="cue-strong"> </text:span><text:span text:style-name="src-sung">[Oktoich.,T.</text:span><text:span text:style-name="src-tone-sung"><text:span text:style-name="T6">IV</text:span></text:span><text:span text:style-name="src-sung">]</text:span><text:tab/><text:span text:style-name="incipit-sung">“From my youth have the many passions”…</text:span></text:p>
        <text:p text:style-name="Standard"><text:span text:style-name="cue-strong">Prokeimen.</text:span> <text:tab/><text:tab/><text:tab/><text:tab/>⮡ <text:tab/><text:tab/><text:span text:style-name="incipit-sung">“Arise, O Lord, help us, and redeem us”…</text:span></text:p>
        <text:p text:style-name="P25"><text:span text:style-name="T1">⮡</text:span><text:tab/><text:tab/><text:span text:style-name="incipit-sung"><text:span text:style-name="T1">“Let every breath praise the Lord”</text:span></text:span></text:p>
        <text:p text:style-name="P26"><text:span text:style-name="cue-strong"><text:span text:style-name="T5">Matins Gospel </text:span></text:span><text:span text:style-name="var-src-tone-spoken"><text:span text:style-name="var-src-tone-spoken">___</text:span></text:span><text:tab/> <text:span text:style-name="src-spoken">[</text:span><text:span text:style-name="var-src-tone-spoken"><text:span text:style-name="var-src-tone-spoken">___</text:span></text:span><text:span text:style-name="src-spoken">]</text:span> <text:tab/><text:tab/><text:tab/><text:span text:style-name="var-incipit-spoken">“”…</text:span></text:p>
        <text:p text:style-name="Standard"/>
        <text:p text:style-name="Standard"><text:span text:style-name="src-sung"><text:span text:style-name="T23">Resurr. hymn</text:span></text:span><text:tab/><text:span text:style-name="src-sung"><text:span text:style-name="T23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7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7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7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Standard"/>
        <text:p text:style-name="Standard"><text:soft-page-break/><text:span text:style-name="cue-strong"><text:span text:style-name="T1">Kanon</text:span></text:span></text:p>
        <text:p text:style-name="Standard"><text:span text:style-name="cue-strong">Resurr. irmoi:</text:span><text:tab/><text:span text:style-name="src-sung">[Oktoich.,T.</text:span><text:span text:style-name="src-tone-sung"><text:span text:style-name="T6">IV</text:span></text:span><text:span text:style-name="src-sung">]</text:span> <text:tab/><text:tab/><text:span text:style-name="incipit-sung">“Israel of old, having traversed the depths </text:span><text:span text:style-name="incipit-sung"><text:span text:style-name="T12">of</text:span></text:span><text:span text:style-name="incipit-sung">”…</text:span></text:p>
        <text:p text:style-name="P4"><text:span text:style-name="count-total-field">6 total</text:span></text:p>
        <text:p text:style-name="P18"><text:span text:style-name="count-spoken"><text:span text:style-name="count-spoken">1</text:span>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8"><text:span text:style-name="count-spoken"><text:span text:style-name="count-spoken">1</text:span></text:span><text:span text:style-name="T1"> </text:span><text:tab/><text:span text:style-name="T1">Cross/Resurr.</text:span><text:tab/><text:span text:style-name="T1">⮡</text:span><text:tab/><text:tab/><text:span text:style-name="incipit-spoken"><text:span text:style-name="T11">“Glory to Thy precious Cross&amp; Resurrection, O Lord”</text:span></text:span></text:p>
        <text:p text:style-name="P18"><text:span text:style-name="count-spoken"><text:span text:style-name="count-spoken">1</text:span>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28"><text:span text:style-name="count-spoken">3</text:span><text:tab/><text:span text:style-name="var-field">___</text:span> <text:tab/><text:tab/><text:tab/><text:span text:style-name="src-spoken">[Minai.]</text:span> <text:tab/><text:tab/><text:span text:style-name="incipit-spoken"><text:span text:style-name="T1">“</text:span></text:span><text:span text:style-name="var-incipit-spoken">___</text:span><text:span text:style-name="incipit-spoken"><text:span text:style-name="T1">, pray to God for us”</text:span></text:span></text:p>
        <text:p text:style-name="Standard"/>
        <text:p text:style-name="P29"><text:span text:style-name="T1">Before last tropar.:</text:span><text:tab/><text:span text:style-name="cue-doxology-spoken"><text:span text:style-name="T1">“Glory”…“Now”…</text:span></text:span></text:p>
        <text:p text:style-name="P18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tab/><text:tab/><text:tab/><text:tab/><text:tab/><text:tab/><text:tab/><text:span text:style-name="incipit-spoken"><text:span text:style-name="T1">both now and ever and unto the ages of ages”…</text:span></text:span></text:p>
        <text:p text:style-name="P30"><text:span text:style-name="cue-strong"><text:span text:style-name="T11">Katavasia</text:span></text:span><text:span text:style-name="cue-strong"><text:span text:style-name="T24">e</text:span></text:span><text:span text:style-name="cue-strong"><text:span text:style-name="T11">:</text:span></text:span><text:tab/><text:tab/><text:span text:style-name="src-sung"><text:span text:style-name="T1">[MΘ,T.</text:span></text:span><text:span text:style-name="src-tone-sung"><text:span text:style-name="T6">IV</text:span></text:span><text:span text:style-name="src-sung"><text:span text:style-name="T10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7">Little Ektenia</text:p>
        <text:p text:style-name="P7"><text:span text:style-name="cue-strong">Kontak.</text:span><text:tab/><text:span text:style-name="src-sung">[</text:span><text:span text:style-name="src-sung"><text:span text:style-name="T25">Minai</text:span></text:span><text:span text:style-name="src-sung">.,</text:span><text:span text:style-name="src-sung"><text:span text:style-name="T26">aft. Ode </text:span></text:span><text:span text:style-name="src-tone-sung"><text:span text:style-name="T6">VI</text:span></text:span><text:span text:style-name="src-sung">,T.</text:span><text:span text:style-name="var-src-tone">___</text:span><text:span text:style-name="src-sung">]</text:span><text:tab/><text:span text:style-name="var-incipit-sung">“”…</text:span></text:p>
        <text:p text:style-name="P31"><text:span text:style-name="src-spoken">+ Ichos</text:span> <text:tab/><text:tab/><text:tab/><text:span text:style-name="var-incipit-spoken">“”…</text:span></text:p>
        <text:p text:style-name="P7"><text:span text:style-name="cue-strong"><text:span text:style-name="T5">Sess. hymn</text:span></text:span><text:span text:style-name="cue-strong"> </text:span><text:tab/>⮡<text:span text:style-name="src-spoken"><text:span text:style-name="T1">[</text:span></text:span><text:span text:style-name="src-spoken"><text:span text:style-name="T27">aft. Ode </text:span></text:span><text:span text:style-name="src-tone-spoken">III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“”…</text:span></text:p>
        <text:p text:style-name="P9"><text:span text:style-name="cue-doxology-spoken">“Glory”…“Now”…</text:span><text:tab/>⮡ <text:tab/><text:tab/><text:tab/><text:tab/><text:span text:style-name="var-incipit-spoken">“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7">Little Ektenia</text:p>
        <text:p text:style-name="P18"><text:span text:style-name="cue-strong">Kontak.</text:span> <text:tab/><text:tab/><text:span text:style-name="src-sung">[Oktoich.,T.</text:span><text:span text:style-name="src-tone-sung"><text:span text:style-name="T6">IV</text:span></text:span><text:span text:style-name="src-sung">]</text:span> <text:tab/><text:tab/><text:span text:style-name="incipit-sung">“My Savior and Redeemer hath, as God, raise</text:span><text:span text:style-name="incipit-sung"><text:span text:style-name="T12">d</text:span></text:span><text:span text:style-name="incipit-sung">”…</text:span></text:p>
        <text:p text:style-name="P32"><text:span text:style-name="src-spoken">+ Ichos</text:span> <text:tab/><text:tab/><text:tab/><text:span text:style-name="incipit-spoken">“O all ye mortals, let us all hymn Christ, </text:span><text:span text:style-name="incipit-spoken"><text:span text:style-name="T12">the</text:span></text:span><text:span text:style-name="incipit-spoken">”…</text:span></text:p>
        <text:p text:style-name="P9"><text:span text:style-name="T1">aft. Ode </text:span><text:span text:style-name="src-tone-spoken"><text:span text:style-name="T1">VIII</text:span></text:span><text:span text:style-name="T1">:</text:span></text:p>
        <text:p text:style-name="P18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Standard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8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8"><text:span text:style-name="cue-strong"><text:span text:style-name="T5">Exaposteilaria:</text:span></text:span><text:span text:style-name="T1"> Matins Gospel </text:span><text:span text:style-name="var-src-tone-spoken">___</text:span></text:p>
        <text:p text:style-name="P32"><text:span text:style-name="src-spoken">[Oktoich.]</text:span> <text:tab/><text:tab/><text:tab/><text:span text:style-name="var-incipit-spoken"><text:span text:style-name="T8">“”…</text:span></text:span></text:p>
        <text:p text:style-name="P33"><text:span text:style-name="cue-doxology-spoken">“Glory”…</text:span> <text:tab/><text:span text:style-name="src-spoken">[Minai.]</text:span> <text:tab/><text:tab/><text:tab/><text:span text:style-name="var-incipit-spoken">“”…</text:span></text:p>
        <text:p text:style-name="P27"><text:span text:style-name="cue-doxology-spoken">“Now”…</text:span> <text:tab/><text:span text:style-name="src-spoken">[Oktoich.]</text:span> <text:tab/><text:tab/><text:tab/><text:span text:style-name="var-incipit-spoken"><text:span text:style-name="T8">“”…</text:span></text:span></text:p>
        <text:p text:style-name="Standard"/>
        <text:p text:style-name="P34"><text:span text:style-name="cue-strong">Lauds / Praises</text:span> <text:tab/><text:span text:style-name="src-sung">[Orolog.,p.75]</text:span> <text:tab/><text:tab/><text:span text:style-name="count-total-field">___ total</text:span></text:p>
        <text:p text:style-name="P35"><text:span text:style-name="var-field">___</text:span> <text:tab/><text:tab/><text:tab/><text:span text:style-name="src-sung">[Oktoich.,T.</text:span><text:span text:style-name="src-tone-sung"><text:span text:style-name="T6">IV</text:span></text:span><text:span text:style-name="src-sung">]</text:span> <text:tab/><text:tab/><text:span text:style-name="incipit-spoken">“O Almighty Lord, Who didst endure the Cros</text:span><text:span text:style-name="incipit-spoken"><text:span text:style-name="T12">s</text:span></text:span><text:span text:style-name="incipit-spoken">”…</text:span></text:p>
        <text:p text:style-name="P7"><text:span text:style-name="var-field">___</text:span> <text:tab/><text:tab/><text:tab/><text:span text:style-name="src-sung">[</text:span><text:span text:style-name="src-sung"><text:span text:style-name="T25">Minai</text:span></text:span><text:span text:style-name="src-sung">.,T.</text:span><text:span text:style-name="var-src-tone">___</text:span><text:span text:style-name="src-sung">]</text:span> <text:tab/><text:tab/><text:span text:style-name="var-incipit-spoken">“”…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6"><text:span text:style-name="_5f_myBold"><text:span text:style-name="T1">Stichoi for 7&amp;8:</text:span></text:span></text:p>
            </table:table-cell>
            <table:table-cell table:style-name="Table1.B1" office:value-type="string">
              <text:p text:style-name="P37"><text:span text:style-name="var-incipit-sung">“”</text:span></text:p>
              <text:p text:style-name="P37"><text:span text:style-name="var-incipit-sung">“”</text:span></text:p>
            </table:table-cell>
          </table:table-row>
        </table:table>
        <text:p text:style-name="P38"><text:span text:style-name="var-field"><text:span text:style-name="T29">1</text:span></text:span><text:tab/><text:tab/><text:tab/><text:span text:style-name="T11">⮡</text:span><text:span text:style-name="src-spoken">Doxastik.</text:span><text:tab/><text:tab/><text:span text:style-name="var-incipit-spoken"><text:span text:style-name="T8">“Tell us, O Jews, where is Jesus Whom ye thought”…</text:span></text:span></text:p>
        <text:p text:style-name="P39"><text:span text:style-name="cue-doxology-sung">“Glory”…</text:span> <text:span text:style-name="src-sung">[Evang. Stichiron </text:span><text:span text:style-name="var-src-tone"><text:span text:style-name="T26">___</text:span></text:span><text:span text:style-name="src-sung">]</text:span><text:tab/><text:span text:style-name="var-incipit-sung"><text:span text:style-name="T8">“”…</text:span></text:span></text:p>
        <text:p text:style-name="P40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30">7</text:span></text:span><text:span text:style-name="src-sung"><text:span text:style-name="T31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41"><text:span text:style-name="cue-strong">Resurr. tropar.</text:span><text:tab/>⮡<text:span text:style-name="src-sung">[Week of T.</text:span><text:span text:style-name="src-tone-sung"><text:span text:style-name="T6">IV</text:span></text:span><text:span text:style-name="src-sung">]</text:span><text:tab/><text:span text:style-name="incipit-sung">“Having risen from the tomb and having”…</text:span></text:p>
        <text:p text:style-name="P41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5" text:outline-level="2">HOURS</text:h>
        <text:p text:style-name="Standard"><text:span text:style-name="cue-strong"><text:span text:style-name="T1">1</text:span></text:span><text:span text:style-name="cue-strong"><text:span text:style-name="T32">st</text:span></text:span><text:span text:style-name="cue-strong"><text:span text:style-name="T1"> / 6</text:span></text:span><text:span text:style-name="cue-strong"><text:span text:style-name="T32">th</text:span></text:span></text:p>
        <text:p text:style-name="P18"><text:span text:style-name="cue-strong"><text:span text:style-name="T5">Troparia:</text:span></text:span><text:tab/><text:span text:style-name="src-spoken">[Oktoich.]</text:span> <text:tab/><text:tab/><text:tab/><text:span text:style-name="incipit-spoken">“Having learned the joyful proclamation of </text:span><text:span text:style-name="incipit-spoken"><text:span text:style-name="T12">the</text:span></text:span><text:span text:style-name="incipit-spoken">”…</text:span></text:p>
        <text:p text:style-name="P32"><text:span text:style-name="src-spoken"><text:span text:style-name="T1">[Minai.]</text:span></text:span><text:tab/><text:tab/><text:tab/><text:span text:style-name="var-incipit-spoken"><text:span text:style-name="T8">“”…</text:span></text:span></text:p>
        <text:p text:style-name="P18"><text:span text:style-name="cue-strong"><text:span text:style-name="T5">Kontak. </text:span></text:span><text:tab/><text:tab/><text:span text:style-name="src-spoken">[Oktoich.]</text:span> <text:tab/><text:tab/><text:tab/><text:span text:style-name="incipit-spoken">“My Savior and Redeemer hath, as God, raise</text:span><text:span text:style-name="incipit-spoken"><text:span text:style-name="T12">d</text:span></text:span><text:span text:style-name="incipit-spoken">”…</text:span></text:p>
        <text:p text:style-name="Standard"/>
        <text:p text:style-name="P42"><text:span text:style-name="cue-strong"><text:span text:style-name="T1">3</text:span></text:span><text:span text:style-name="cue-strong"><text:span text:style-name="T32">rd</text:span></text:span></text:p>
        <text:p text:style-name="P43"><text:span text:style-name="cue-strong"><text:span text:style-name="T5">Troparia:</text:span></text:span><text:tab/><text:span text:style-name="src-spoken">[Oktoich.]</text:span> <text:tab/><text:tab/><text:tab/><text:span text:style-name="incipit-spoken">“Having learned the joyful proclamation of </text:span><text:span text:style-name="incipit-spoken"><text:span text:style-name="T12">the</text:span></text:span><text:span text:style-name="incipit-spoken">”…</text:span></text:p>
        <text:p text:style-name="P44"><text:span text:style-name="src-spoken"><text:span text:style-name="T1">[Minai.]</text:span></text:span><text:tab/><text:tab/><text:tab/><text:span text:style-name="var-incipit-spoken"><text:span text:style-name="T8">“”…</text:span></text:span></text:p>
        <text:p text:style-name="P45"><text:span text:style-name="cue-strong"><text:span text:style-name="T5">Kontak.</text:span></text:span> <text:tab/><text:tab/>⮡ <text:tab/><text:tab/><text:tab/><text:tab/><text:span text:style-name="var-incipit-spoken">“”…</text:span></text:p>
        <text:h text:style-name="P46" text:outline-level="2">LITURGY OF ST JOHN CHRYSOS-TOMOS</text:h>
        <text:p text:style-name="P34"><text:span text:style-name="cue-strong">Beatitudes: </text:span><text:tab/><text:tab/><text:span text:style-name="src-sung">[Orolog.,p.136]</text:span><text:tab/><text:tab/><text:span text:style-name="count-total-field">___ total</text:span></text:p>
        <text:p text:style-name="P47"><text:span text:style-name="var-field">___</text:span> <text:tab/><text:tab/><text:tab/><text:span text:style-name="src-sung">[Oktoich.,T.</text:span><text:span text:style-name="src-tone-sung"><text:span text:style-name="T6">IV</text:span></text:span><text:span text:style-name="src-sung">]</text:span> <text:tab/><text:tab/><text:span text:style-name="incipit-spoken">“By the tree was Adam forced to depart from”…</text:span></text:p>
        <text:p text:style-name="P48"><text:span text:style-name="var-field"><text:span text:style-name="T33">4</text:span></text:span><text:tab/><text:tab/><text:tab/><text:span text:style-name="src-sung">[</text:span><text:span text:style-name="src-sung"><text:span text:style-name="T25">Minai</text:span></text:span><text:span text:style-name="src-sung">.,</text:span><text:span text:style-name="src-sung"><text:span text:style-name="T34">Ode </text:span></text:span><text:span text:style-name="var-src-tone">___</text:span><text:span text:style-name="src-sung">]<text:tab/></text:span><text:tab/><text:span text:style-name="var-incipit-spoken"><text:span text:style-name="T8">“”…</text:span>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6">IV</text:span></text:span><text:span text:style-name="src-sung">]</text:span> <text:tab/><text:tab/><text:span text:style-name="incipit-sung">“Having learned the joyful proclamation of </text:span><text:span text:style-name="incipit-sung"><text:span text:style-name="T12">the</text:span></text:span><text:span text:style-name="incipit-sung">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6">V</text:span></text:span><text:span text:style-name="src-sung"><text:span text:style-name="T1">]</text:span></text:span><text:tab/><text:tab/><text:span text:style-name="incipit-sung"><text:span text:style-name="T11">“From thy youth didst thou love Christ, O”…</text:span></text:span></text:p>
        <text:p text:style-name="P50"><text:span text:style-name="src-sung">[</text:span><text:span text:style-name="src-sung"><text:span text:style-name="T25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8">“”…</text:span></text:span></text:p>
        <text:p text:style-name="P34"><text:span text:style-name="cue-strong">Kontakia:</text:span> <text:tab/><text:tab/><text:span text:style-name="src-sung">[Oktoich.,T.</text:span><text:span text:style-name="src-tone-sung"><text:span text:style-name="T6">IV</text:span></text:span><text:span text:style-name="src-sung">]</text:span> <text:tab/><text:tab/><text:span text:style-name="incipit-sung">“My Savior and Redeemer hath, as God, raise</text:span><text:span text:style-name="incipit-sung"><text:span text:style-name="T12">d</text:span></text:span><text:span text:style-name="incipit-sung">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6">II</text:span></text:span><text:span text:style-name="src-sung"><text:span text:style-name="T1">]</text:span></text:span><text:tab/><text:tab/><text:span text:style-name="incipit-sung"><text:span text:style-name="T11">“Having forsaken the beauty of the world and”…</text:span></text:span></text:p>
        <text:p text:style-name="P7"><text:span text:style-name="cue-doxology-sung"><text:span text:style-name="T11">“Glory”…</text:span></text:span><text:tab/><text:tab/><text:span text:style-name="src-sung">[</text:span><text:span text:style-name="src-sung"><text:span text:style-name="T25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8">“”…</text:span></text:span></text:p>
        <text:p text:style-name="P18"><text:span text:style-name="cue-doxology-sung"><text:span text:style-name="T11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34"><text:span text:style-name="cue-strong">Prokeimena:</text:span> <text:tab/><text:span text:style-name="src-sung">[Oktoich.,T.</text:span><text:span text:style-name="src-tone-sung"><text:span text:style-name="T6">IV</text:span></text:span><text:span text:style-name="src-sung">]</text:span> <text:tab/><text:tab/><text:span text:style-name="incipit-sung">“How magnified are Thy works O Lord! In”…</text:span></text:p>
        <text:p text:style-name="P32"><text:span text:style-name="src-spoken">+ Stichos</text:span> <text:tab/><text:tab/><text:tab/><text:span text:style-name="incipit-spoken">“Bless the Lord, O my soul; O Lord my God, </text:span><text:span text:style-name="incipit-spoken"><text:span text:style-name="T12">Thou</text:span></text:span><text:span text:style-name="incipit-spoken">”…</text:span></text:p>
        <text:p text:style-name="P37"><text:span text:style-name="cue-strong"><text:span text:style-name="T11">2</text:span></text:span><text:span text:style-name="cue-strong"><text:span text:style-name="T35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8">“”…</text:span></text:span></text:p>
        <text:p text:style-name="Standard"><text:span text:style-name="cue-strong">Alleluiaria:</text:span> <text:tab/><text:tab/><text:span text:style-name="src-spoken">[Oktoich.,T.</text:span><text:span text:style-name="src-tone-spoken">IV</text:span><text:span text:style-name="src-spoken">]</text:span> <text:tab/><text:tab/><text:span text:style-name="incipit-spoken">“Bend Thy bow, and proceed prosperously, an</text:span><text:span text:style-name="incipit-spoken"><text:span text:style-name="T12">d</text:span></text:span><text:span text:style-name="incipit-spoken">”…</text:span></text:p>
        <text:p text:style-name="P32"><text:span text:style-name="src-spoken">+ Stichos</text:span> <text:tab/><text:tab/><text:tab/><text:span text:style-name="incipit-spoken">“Thou hast loved righteousness and hated”…</text:span></text:p>
        <text:p text:style-name="P37"><text:span text:style-name="cue-strong"><text:span text:style-name="T36">2</text:span></text:span><text:span text:style-name="cue-strong"><text:span text:style-name="T35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8">“”…</text:span></text:span></text:p>
        <text:p text:style-name="Standard"/>
        <text:p text:style-name="Standard"><text:span text:style-name="cue-strong"><text:span text:style-name="T11">Communion stichoi:</text:span></text:span><text:span text:style-name="T1"> </text:span><text:tab/><text:tab/><text:tab/><text:tab/><text:span text:style-name="incipit-sung"><text:span text:style-name="T11">“Praise the Lord from the heavens, praise </text:span></text:span><text:span text:style-name="incipit-sung"><text:span text:style-name="T37">Him</text:span></text:span><text:span text:style-name="incipit-sung"><text:span text:style-name="T11">”…</text:span></text:span></text:p>
        <text:p text:style-name="P51"><text:span text:style-name="var-incipit-sung"><text:span text:style-name="T8">“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count-total-field" style:family="text">
      <style:text-properties fo:color="#666666" style:font-name="Noto Sans" fo:font-size="8.60000038146973pt" fo:font-weight="normal" fo:background-color="#fff2cc" style:text-underline-style="solid" style:text-underline-width="auto" style:text-underline-color="font-color"/>
    </style:style>
    <style:style style:name="count-spoken" style:family="text">
      <style:text-properties fo:color="#666666" style:font-name="Noto Sans" fo:font-size="8.60000038146973pt" fo:font-weight="normal" fo:background-color="transparent" style:char-shading-value="0"/>
    </style:style>
    <style:style style:name="count-paired-field" style:family="text">
      <style:text-properties fo:color="#111111" style:font-name="Noto Sans SemiBold1" fo:font-size="8.60000038146973pt" fo:font-weight="600" fo:background-color="#fff2cc"/>
    </style:style>
    <style:style style:name="rank-marker-field" style:family="text">
      <style:text-properties fo:color="#111111" style:font-name="Noto Sans" fo:font-size="7pt" fo:font-weight="normal" fo:background-color="#fff2cc"/>
    </style:style>
    <style:style style:name="var-field-neutral" style:family="text">
      <style:text-properties fo:color="#111111" style:font-name="Noto Sans" fo:font-size="8.60000038146973pt" fo:font-weight="normal" fo:background-color="#fff2cc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17T00:20:35.844388670</dc:date>
    <meta:editing-duration>PT9H17M32S</meta:editing-duration>
    <meta:editing-cycles>11</meta:editing-cycles>
    <meta:generator>LibreOfficeDev/26.2.4.0.0$Linux_X86_64 LibreOffice_project/d9a14b9b3eb39e1636bf69b77bc9945234bcbc5d</meta:generator>
    <meta:document-statistic meta:table-count="2" meta:image-count="0" meta:object-count="0" meta:page-count="2" meta:paragraph-count="128" meta:word-count="910" meta:character-count="6034" meta:non-whitespace-character-count="4971"/>
  </office:meta>
</office:document-meta>
</file>