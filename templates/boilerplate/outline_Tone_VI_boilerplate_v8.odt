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17c264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7c264"/>
    </style:style>
    <style:style style:name="T8" style:family="text">
      <style:text-properties officeooo:rsid="0019ca7c" fo:background-color="transparent" loext:char-shading-value="0"/>
    </style:style>
    <style:style style:name="T9" style:family="text">
      <style:text-properties fo:font-size="8.60000038146973pt"/>
    </style:style>
    <style:style style:name="T10" style:family="text">
      <style:text-properties officeooo:rsid="0016e83a"/>
    </style:style>
    <style:style style:name="T11" style:family="text">
      <style:text-properties officeooo:rsid="00188ee9"/>
    </style:style>
    <style:style style:name="T12" style:family="text">
      <style:text-properties officeooo:rsid="00176dab" fo:background-color="transparent" loext:char-shading-value="0"/>
    </style:style>
    <style:style style:name="T13" style:family="text">
      <style:text-properties fo:font-size="8.60000038146973pt" fo:background-color="transparent" loext:char-shading-value="0"/>
    </style:style>
    <style:style style:name="T14" style:family="text">
      <style:text-properties officeooo:rsid="001081f5" fo:background-color="transparent" loext:char-shading-value="0"/>
    </style:style>
    <style:style style:name="T15" style:family="text">
      <style:text-properties officeooo:rsid="0017e1c4"/>
    </style:style>
    <style:style style:name="T16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7" style:family="text">
      <style:text-properties officeooo:rsid="001c2bf2" fo:background-color="transparent" loext:char-shading-value="0"/>
    </style:style>
    <style:style style:name="T18" style:family="text">
      <style:text-properties fo:font-size="8.60000038146973pt" officeooo:rsid="00176dab" fo:background-color="transparent" loext:char-shading-value="0"/>
    </style:style>
    <style:style style:name="T19" style:family="text">
      <style:text-properties fo:font-size="8.60000038146973pt" officeooo:rsid="0000c400"/>
    </style:style>
    <style:style style:name="T20" style:family="text">
      <style:text-properties style:text-position="super 58%" officeooo:rsid="00232009" fo:background-color="transparent" loext:char-shading-value="0"/>
    </style:style>
    <style:style style:name="T21" style:family="text">
      <style:text-properties officeooo:rsid="00232009" fo:background-color="transparent" loext:char-shading-value="0"/>
    </style:style>
    <style:style style:name="T22" style:family="text">
      <style:text-properties style:text-position="super 58%" officeooo:rsid="000e90cb" fo:background-color="transparent" loext:char-shading-value="0"/>
    </style:style>
    <style:style style:name="T23" style:family="text">
      <style:text-properties officeooo:rsid="000e90cb" fo:background-color="transparent" loext:char-shading-value="0"/>
    </style:style>
    <style:style style:name="T24" style:family="text">
      <style:text-properties fo:font-size="7.90000009536743pt" fo:background-color="transparent" loext:char-shading-value="0"/>
    </style:style>
    <style:style style:name="T25" style:family="text">
      <style:text-properties fo:font-size="8.60000038146973pt" officeooo:rsid="001af3bc" fo:background-color="transparent" loext:char-shading-value="0"/>
    </style:style>
    <style:style style:name="T26" style:family="text">
      <style:text-properties officeooo:rsid="000ef31a"/>
    </style:style>
    <style:style style:name="T27" style:family="text">
      <style:text-properties officeooo:rsid="001081f5"/>
    </style:style>
    <style:style style:name="T28" style:family="text">
      <style:text-properties officeooo:rsid="000ef31a" fo:background-color="transparent" loext:char-shading-value="0"/>
    </style:style>
    <style:style style:name="T29" style:family="text">
      <style:text-properties officeooo:rsid="000ce31b" fo:background-color="transparent" loext:char-shading-value="0"/>
    </style:style>
    <style:style style:name="T30" style:family="text">
      <style:text-properties fo:font-size="8.60000038146973pt" officeooo:rsid="001c19ba" fo:background-color="transparent" loext:char-shading-value="0"/>
    </style:style>
    <style:style style:name="T31" style:family="text">
      <style:text-properties officeooo:rsid="00195f46" fo:background-color="transparent" loext:char-shading-value="0"/>
    </style:style>
    <style:style style:name="T32" style:family="text">
      <style:text-properties officeooo:rsid="00113855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fo:font-size="8.60000038146973pt" officeooo:rsid="00195f46" fo:background-color="transparent" loext:char-shading-value="0"/>
    </style:style>
    <style:style style:name="T35" style:family="text">
      <style:text-properties style:text-position="super 58%" fo:font-size="8.60000038146973pt" officeooo:rsid="0019ca7c" fo:background-color="transparent" loext:char-shading-value="0"/>
    </style:style>
    <style:style style:name="T36" style:family="text">
      <style:text-properties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17c264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V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VI</text:span></text:span><text:span text:style-name="src-sung">]</text:span><text:tab/><text:span text:style-name="incipit-sung">“Gaining victory over hades, Thou didst asc</text:span><text:span text:style-name="incipit-sung"><text:span text:style-name="T7">end</text:span></text:span><text:span text:style-name="incipit-sung">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Who doth not call thee blessed, O all-holy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Thy Resurrection, O Christ Saviour, the an</text:span><text:span text:style-name="incipit-sung"><text:span text:style-name="T7">gels</text:span></text:span><text:span text:style-name="incipit-sung">”…</text:span></text:p>
        <text:p text:style-name="P7"><text:span text:style-name="cue-doxology-sung"><text:span text:style-name="T9">“Glory”…</text:span></text:span> 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0">VI</text:span></text:span><text:span text:style-name="src-sung">]</text:span> <text:tab/><text:tab/><text:span text:style-name="var-incipit-sung">“</text:span><text:span text:style-name="var-incipit-sung"><text:span text:style-name="T11">Christ the Lord, my Creator and Deliverer,</text:span></text:span><text:span text:style-name="var-incipit-sung">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2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3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VI</text:span></text:span><text:span text:style-name="src-sung">]</text:span><text:tab/> <text:span text:style-name="counter-strong"><text:span text:style-name="T13">2x</text:span></text:span><text:tab/><text:span text:style-name="incipit-sung">“Angelic hosts were above Thy tomb, and the</text:span><text:span text:style-name="incipit-sung"><text:span text:style-name="T7">y</text:span></text:span><text:span text:style-name="incipit-sung">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4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3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5">VI</text:span></text:span><text:span text:style-name="src-sung">]</text:span> <text:tab/><text:tab/><text:span text:style-name="var-incipit-sung">“O Thou Who hast called Thy Mother blessed,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6">st</text:span></text:span><text:span text:style-name="cue-strong"><text:span text:style-name="T5"> chant/Psaltiri</text:span></text:span><text:tab/><text:span text:style-name="src-spoken">[Vigil bk p.64]</text:span> <text:tab/><text:tab/><text:span text:style-name="incipit-spoken">“O Lord, who shall abide in Thy tabernacle? </text:span><text:span text:style-name="incipit-spoken"><text:span text:style-name="T7">and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I</text:span><text:span text:style-name="src-spoken">]</text:span> <text:tab/><text:tab/><text:span text:style-name="incipit-spoken">“When the tomb was opened and hades wept,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3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9">“O Thou Who hast called Thy Mother blessed,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6">nd</text:span></text:span><text:span text:style-name="cue-strong"><text:span text:style-name="T5"> chant/Psaltiri</text:span></text:span><text:tab/><text:span text:style-name="src-spoken">[Vigil bk p.77]</text:span> <text:tab/><text:tab/><text:span text:style-name="incipit-spoken">“O God, my God, attend unto me; why hast Th</text:span><text:span text:style-name="incipit-spoken"><text:span text:style-name="T7">ou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I</text:span><text:span text:style-name="src-spoken">]</text:span> <text:tab/><text:tab/><text:span text:style-name="incipit-spoken">“Life lay in the tomb, and a seal was affix</text:span><text:span text:style-name="incipit-spoken"><text:span text:style-name="T7">ed to</text:span></text:span><text:span text:style-name="incipit-spoken">”…</text:span></text:p>
        <text:p text:style-name="Standard"/>
        <text:p text:style-name="P20"><text:span text:style-name="cue-strong"><text:span text:style-name="T13">Psalm 118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3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3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3">“</text:span></text:span><text:span text:style-name="incipit-sung"><text:span text:style-name="T18">We magnify thee, O holy </text:span></text:span><text:span text:style-name="var-incipit-sung"><text:span text:style-name="T19">___</text:span></text:span><text:span text:style-name="incipit-sung"><text:span text:style-name="T13">”…</text:span></text:span></text:p>
        <text:p text:style-name="P21"><text:span text:style-name="cue-strong"><text:span text:style-name="T13">Evlogitaria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3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VI</text:span><text:span text:style-name="src-spoken">]</text:span> <text:tab/><text:tab/><text:tab/><text:span text:style-name="incipit-spoken">“Having as God broken down the gates of had</text:span><text:span text:style-name="incipit-spoken"><text:span text:style-name="T7">es</text:span></text:span><text:span text:style-name="incipit-spoken">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3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20">st</text:span></text:span><text:span text:style-name="src-spoken"><text:span text:style-name="T21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20">nd</text:span><text:span text:style-name="T21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23"><text:span text:style-name="cue-doxology-spoken"><text:span text:style-name="T13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2">st</text:span></text:span><text:span text:style-name="src-sung"><text:span text:style-name="T23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VI</text:span></text:span><text:span text:style-name="src-sung">]</text:span><text:tab/><text:span text:style-name="incipit-sung">“I lift up mine eyes to heaven, to Thee, O </text:span><text:span text:style-name="incipit-sung"><text:span text:style-name="T7">Word</text:span></text:span><text:span text:style-name="incipit-sung">”…</text:span></text:p>
        <text:p text:style-name="Standard"><text:span text:style-name="cue-strong">Prokeimen.</text:span> <text:tab/><text:tab/><text:tab/><text:tab/>⮡ <text:tab/><text:tab/><text:span text:style-name="incipit-sung">“O Lord, stir up Thy might and come to save </text:span><text:span text:style-name="incipit-sung"><text:span text:style-name="T7">us</text:span></text:span><text:span text:style-name="incipit-sung">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4">Resurr. hymn</text:span></text:span><text:tab/><text:span text:style-name="src-sung"><text:span text:style-name="T24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Traversing the deep on foot, as though it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3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3">Katavasia</text:span></text:span><text:span text:style-name="cue-strong"><text:span text:style-name="T25">e</text:span></text:span><text:span text:style-name="cue-strong"><text:span text:style-name="T13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2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6">Minai</text:span></text:span><text:span text:style-name="src-sung">.,</text:span><text:span text:style-name="src-sung"><text:span text:style-name="T27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8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Having by His life-bestowing hand raised u</text:span><text:span text:style-name="incipit-sung"><text:span text:style-name="T7">p</text:span></text:span><text:span text:style-name="incipit-sung">”…</text:span></text:p>
        <text:p text:style-name="P32"><text:span text:style-name="src-spoken">+ Ichos</text:span> <text:tab/><text:tab/><text:tab/><text:span text:style-name="incipit-spoken">“Christ the God of all, the Bestower of life, having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9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9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poken">“Thy Cross, O Lord, is the life and resurre</text:span><text:span text:style-name="incipit-spoken"><text:span text:style-name="T7">ction of</text:span></text:span><text:span text:style-name="incipit-spoken">”…</text:span></text:p>
        <text:p text:style-name="P7"><text:span text:style-name="var-field">___</text:span> <text:tab/><text:tab/><text:tab/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30">1</text:span></text:span><text:tab/><text:tab/><text:tab/><text:span text:style-name="T13">⮡</text:span><text:span text:style-name="src-spoken">Doxastik.</text:span><text:tab/><text:tab/><text:span text:style-name="var-incipit-spoken"><text:span text:style-name="T9">“The myrrh-bearing women, lamenting, reached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7">___</text:span></text:span><text:span text:style-name="src-sung">]</text:span><text:tab/><text:span text:style-name="var-incipit-sung"><text:span text:style-name="T9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1">7</text:span></text:span><text:span text:style-name="src-sung"><text:span text:style-name="T32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VI</text:span></text:span><text:span text:style-name="src-sung">]</text:span><text:tab/><text:span text:style-name="incipit-sung">“Having risen from the tomb and having burst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3">st</text:span></text:span><text:span text:style-name="cue-strong"><text:span text:style-name="T1"> / 6</text:span></text:span><text:span text:style-name="cue-strong"><text:span text:style-name="T33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Angelic hosts were above Thy tomb, and the</text:span><text:span text:style-name="incipit-spoken"><text:span text:style-name="T7">y</text:span></text:span><text:span text:style-name="incipit-spoken">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Having by His life-bestowing hand raised u</text:span><text:span text:style-name="incipit-spoken"><text:span text:style-name="T7">p</text:span></text:span><text:span text:style-name="incipit-spoken">”…</text:span></text:p>
        <text:p text:style-name="Standard"/>
        <text:p text:style-name="P42"><text:span text:style-name="cue-strong"><text:span text:style-name="T1">3</text:span></text:span><text:span text:style-name="cue-strong"><text:span text:style-name="T33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Angelic hosts were above Thy tomb, and the</text:span><text:span text:style-name="incipit-spoken"><text:span text:style-name="T7">y</text:span></text:span><text:span text:style-name="incipit-spoken">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var-incipit-spoken">“”…</text:span></text:p>
        <text:p text:style-name="P48"><text:span text:style-name="var-field"><text:span text:style-name="T34">4</text:span></text:span><text:tab/><text:tab/><text:tab/><text:span text:style-name="src-sung">[</text:span><text:span text:style-name="src-sung"><text:span text:style-name="T26">Minai</text:span></text:span><text:span text:style-name="src-sung">.,</text:span><text:span text:style-name="src-sung"><text:span text:style-name="T7">Ode </text:span></text:span><text:span text:style-name="var-src-tone">___</text:span><text:span text:style-name="src-sung">]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Angelic hosts were above Thy tomb, and the</text:span><text:span text:style-name="incipit-sung"><text:span text:style-name="T7">y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3">“From thy youth didst thou love Christ, O”…</text:span></text:span></text:p>
        <text:p text:style-name="P50"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Having by His life-bestowing hand raised u</text:span><text:span text:style-name="incipit-sung"><text:span text:style-name="T7">p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3">“Having forsaken the beauty of the world and”…</text:span></text:span></text:p>
        <text:p text:style-name="P7"><text:span text:style-name="cue-doxology-sung"><text:span text:style-name="T13">“Glory”…</text:span></text:span><text:tab/><text:tab/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18"><text:span text:style-name="cue-doxology-sung"><text:span text:style-name="T13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VI</text:span></text:span><text:span text:style-name="src-sung">]</text:span> <text:tab/><text:tab/><text:span text:style-name="incipit-sung">“Save, O Lord, Thy people and bless Thine”…</text:span></text:p>
        <text:p text:style-name="P32"><text:span text:style-name="src-spoken">+ Stichos</text:span> <text:tab/><text:tab/><text:tab/><text:span text:style-name="incipit-spoken">“Unto Thee, O Lord, Will I cry; O my God, b</text:span><text:span text:style-name="incipit-spoken"><text:span text:style-name="T7">e not</text:span></text:span><text:span text:style-name="incipit-spoken">”…</text:span></text:p>
        <text:p text:style-name="P37"><text:span text:style-name="cue-strong"><text:span text:style-name="T13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VI</text:span><text:span text:style-name="src-spoken">]</text:span> <text:tab/><text:tab/><text:span text:style-name="incipit-spoken">“He that dwelleth in the help of the Most H</text:span><text:span text:style-name="incipit-spoken"><text:span text:style-name="T7">igh</text:span></text:span><text:span text:style-name="incipit-spoken">”…</text:span></text:p>
        <text:p text:style-name="P32"><text:span text:style-name="src-spoken">+ Stichos</text:span> <text:tab/><text:tab/><text:tab/><text:span text:style-name="incipit-spoken">“He shall say unto the Lord: Thou art my he</text:span><text:span text:style-name="incipit-spoken"><text:span text:style-name="T7">lper</text:span></text:span><text:span text:style-name="incipit-spoken">”…</text:span></text:p>
        <text:p text:style-name="P37"><text:span text:style-name="cue-strong"><text:span text:style-name="T36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<text:span text:style-name="T13">Communion stichoi:</text:span></text:span><text:span text:style-name="T1"> </text:span><text:tab/><text:tab/><text:tab/><text:tab/><text:span text:style-name="incipit-sung"><text:span text:style-name="T13">“Praise the Lord from the heavens, praise </text:span></text:span><text:span text:style-name="incipit-sung"><text:span text:style-name="T37">Him</text:span></text:span><text:span text:style-name="incipit-sung"><text:span text:style-name="T13">”…</text:span></text:span></text:p>
        <text:p text:style-name="P51"><text:span text:style-name="var-incipit-sung"><text:span text:style-name="T9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35:57.642397379</dc:date>
    <meta:editing-duration>PT9H20M14S</meta:editing-duration>
    <meta:editing-cycles>12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24" meta:character-count="6042" meta:non-whitespace-character-count="4965"/>
  </office:meta>
</office:document-meta>
</file>